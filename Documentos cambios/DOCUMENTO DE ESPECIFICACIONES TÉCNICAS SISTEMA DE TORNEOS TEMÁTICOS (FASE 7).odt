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23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weight="normal"/>
    </style:style>
    <style:style style:name="P3" style:family="paragraph" style:parent-style-name="Heading_20_2">
      <style:paragraph-properties fo:margin-left="0cm" fo:margin-right="0cm" fo:margin-top="0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7pt" fo:font-style="normal" style:text-underline-style="none" fo:font-weight="bold" style:text-blinking="false" fo:background-color="transparent"/>
    </style:style>
    <style:style style:name="P4" style:family="paragraph" style:parent-style-name="Heading_20_3">
      <style:paragraph-properties fo:margin-left="0cm" fo:margin-right="0cm" fo:margin-top="0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5"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6" style:family="paragraph" style:parent-style-name="Text_20_body" style:list-style-name="L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7"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0"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officeooo:paragraph-rsid="000e4ccb"/>
    </style:style>
    <style:style style:name="P12"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4"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5" style:family="paragraph" style:parent-style-name="Text_20_body" style:list-style-name="L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6" style:family="paragraph" style:parent-style-name="Text_20_body" style:list-style-name="L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7" style:family="paragraph" style:parent-style-name="Text_20_body" style:list-style-name="L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8"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19" style:family="paragraph" style:parent-style-name="Text_20_body" style:list-style-name="L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20" style:family="paragraph" style:parent-style-name="Text_20_body" style:list-style-name="L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21" style:family="paragraph" style:parent-style-name="Text_20_body" style:list-style-name="L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22" style:family="paragraph" style:parent-style-name="Text_20_body" style:list-style-name="L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23" style:family="paragraph" style:parent-style-name="Text_20_body" style:list-style-name="L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24" style:family="paragraph" style:parent-style-name="Text_20_body">
      <style:paragraph-properties fo:margin-left="1.058cm" fo:margin-right="1.058cm" fo:margin-top="0cm" fo:margin-bottom="0.423cm" style:contextual-spacing="false" fo:line-height="138%" fo:text-indent="0cm" style:auto-text-indent="false" style:writing-mode="lr-tb"/>
    </style:style>
    <style:style style:name="P25"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26" style:family="paragraph" style:parent-style-name="Text_20_body" style:list-style-name="L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27" style:family="paragraph" style:parent-style-name="Text_20_body" style:list-style-name="L1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28" style:family="paragraph" style:parent-style-name="Text_20_body" style:list-style-name="L1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9" style:family="paragraph" style:parent-style-name="Text_20_body" style:list-style-name="L1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30" style:family="paragraph" style:parent-style-name="Text_20_body">
      <style:paragraph-properties fo:margin-left="1.058cm" fo:margin-right="1.058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1" style:family="paragraph" style:parent-style-name="Text_20_body">
      <style:paragraph-properties fo:margin-left="1.058cm" fo:margin-right="1.058cm" fo:margin-top="0cm" fo:margin-bottom="0.423cm" style:contextual-spacing="false" fo:line-height="138%" fo:text-indent="0cm" style:auto-text-indent="false" style:writing-mode="lr-tb"/>
      <style:text-properties fo:font-weight="normal"/>
    </style:style>
    <style:style style:name="P32" style:family="paragraph" style:parent-style-name="Text_20_body">
      <style:paragraph-properties fo:margin-left="1.058cm" fo:margin-right="1.058cm" fo:margin-top="0cm" fo:margin-bottom="0.423cm" style:contextual-spacing="false" fo:line-height="138%" fo:text-indent="0cm" style:auto-text-indent="false" style:writing-mode="lr-tb"/>
      <style:text-properties fo:font-variant="normal" fo:text-transform="none" fo:color="#188038" loext:opacity="100%" style:text-line-through-style="none" style:text-line-through-type="none" style:font-name="Arial2" fo:font-size="11pt" fo:font-style="normal" style:text-underline-style="none" fo:font-weight="normal" style:text-blinking="false" fo:background-color="transparent"/>
    </style:style>
    <style:style style:name="P33"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34" style:family="paragraph" style:parent-style-name="Text_20_body" style:list-style-name="L1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5" style:family="paragraph" style:parent-style-name="Text_20_body" style:list-style-name="L1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36" style:family="paragraph" style:parent-style-name="Text_20_body" style:list-style-name="L1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37" style:family="paragraph" style:parent-style-name="Text_20_body" style:list-style-name="L1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38" style:family="paragraph" style:parent-style-name="Text_20_body" style:list-style-name="L1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39"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40"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41" style:family="paragraph" style:parent-style-name="Text_20_body" style:list-style-name="L1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42" style:family="paragraph" style:parent-style-name="Text_20_body" style:list-style-name="L1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43" style:family="paragraph" style:parent-style-name="Text_20_body" style:list-style-name="L1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44" style:family="paragraph" style:parent-style-name="Text_20_body" style:list-style-name="L1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45" style:family="paragraph" style:parent-style-name="Text_20_body" style:list-style-name="L1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46" style:family="paragraph" style:parent-style-name="Text_20_body" style:list-style-name="L1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47" style:family="paragraph" style:parent-style-name="Text_20_body" style:list-style-name="L1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T1" style:family="text">
      <style:text-properties fo:font-variant="normal" fo:text-transform="none" fo:color="#000000" loext:opacity="100%" style:text-line-through-style="none" style:text-line-through-type="none" style:font-name="Arial2"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2" fo:font-size="11pt" fo:font-style="italic" style:text-underline-style="none" style:text-blinking="false" fo:background-color="transparent" loext:char-shading-value="0"/>
    </style:style>
    <style:style style:name="T5" style:family="text">
      <style:text-properties fo:font-variant="normal" fo:text-transform="none" fo:color="#188038" loext:opacity="100%" style:text-line-through-style="none" style:text-line-through-type="none" style:font-name="Arial2" fo:font-size="11pt" fo:font-style="normal" style:text-underline-style="none"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fo:font-style="italic" fo:background-color="transparent" loext:char-shading-value="0"/>
    </style:style>
    <style:style style:name="T9" style:family="text">
      <style:text-properties style:font-name="Arial2" fo:font-size="11pt" fo:font-style="normal" fo:font-weight="normal"/>
    </style:style>
    <style:style style:name="T10" style:family="text">
      <style:text-properties fo:color="#188038" loext:opacity="100%" fo:background-color="transparent" loext:char-shading-value="0"/>
    </style:style>
    <style:style style:name="T11"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2" fo:font-size="11pt" fo:font-style="italic" style:text-underline-style="none" fo:font-weight="normal" style:text-blinking="false" fo:background-color="transparent" loext:char-shading-value="0"/>
    </style:style>
    <style:style style:name="T14" style:family="text">
      <style:text-properties style:font-name="Arial2" fo:font-size="11pt" fo:font-style="normal" fo:font-weight="bold" fo:background-color="transparent" loext:char-shading-value="0"/>
    </style:style>
    <style:style style:name="T15" style:family="text">
      <style:text-properties style:font-name="Arial2" fo:font-size="11pt" fo:font-style="normal" fo:font-weight="normal" fo:background-color="transparent" loext:char-shading-value="0"/>
    </style:style>
    <style:style style:name="T16" style:family="text">
      <style:text-properties fo:color="#188038" loext:opacity="100%" fo:font-weight="bold"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56aa0d63-7fff-19de-caf4-381b18c6537d"/>DOCUMENTO DE ESPECIFICACIONES TÉCNICAS: SISTEMA DE TORNEOS TEMÁTICOS (FASE 7)</text:h>
      <text:p text:style-name="P2"><text:span text:style-name="T1">Este documento detalla la arquitectura lógica, económica y de interfaz para el módulo de </text:span><text:span text:style-name="T2">Torneos Temáticos (Fase 7)</text:span><text:span text:style-name="T3"> </text:span><text:span text:style-name="T1">de </text:span><text:span text:style-name="T4">Proyecto Genos</text:span><text:span text:style-name="T1">. Está diseñado para servir como pliego de condiciones de desarrollo directo para la implementación en el contrato inteligente </text:span><text:span text:style-name="T5">GenosTorneos.sol</text:span><text:span text:style-name="T1">, el backend de Supabase y el gestor de cliente </text:span><text:span text:style-name="T5">TournamentManager.js</text:span><text:span text:style-name="T1">.</text:span></text:p>
      <text:h text:style-name="P3" text:outline-level="2">1. FILOSOFÍA DEL MÓDULO Y MITIGACIÓN DE FRAGMENTACIÓN</text:h>
      <text:p text:style-name="P2"><text:span text:style-name="T1">El diseño original de 12 torneos individuales independientes presentaba un riesgo crítico de sobre-diseño (</text:span><text:span text:style-name="T4">over-scoping</text:span><text:span text:style-name="T1">) y fragmentación extrema de la comunidad. Para garantizar que los cuadros de emparejamiento se llenen de forma instantánea y maximizar la generación de comisiones recurrentes sin dividir a los jugadores, el sistema se transforma en un modelo </text:span><text:span text:style-name="T2">"Sit &amp; Go" por Ventanas Horarias Unificadas de Gobernanza Comunitaria</text:span><text:span text:style-name="T1">.</text:span></text:p>
      <text:h text:style-name="P4" text:outline-level="3">Características Principales:</text:h>
      <text:list text:style-name="L1">
        <text:list-item>
          <text:p text:style-name="P5"><text:span text:style-name="T6">Bucle de Fin de Semana:</text:span><text:span text:style-name="T7"> Los torneos no requieren registros previos durante los días laborables. Se concentran exclusivamente en </text:span><text:span text:style-name="T6">ventanas de 1 hora</text:span><text:span text:style-name="T7"> a lo largo del fin de semana para acumular picos masivos de concurrencia global en vivo.</text:span></text:p>
        </text:list-item>
        <text:list-item>
          <text:p text:style-name="P5"><text:span text:style-name="T6">Cola Unificada de Modificador Único:</text:span><text:span text:style-name="T7"> No se ejecutan múltiples temáticas a la vez. Todo el servidor compite bajo el mismo y único modificador ambiental que haya ganado la votación semanal.</text:span></text:p>
        </text:list-item>
        <text:list-item>
          <text:p text:style-name="P6"><text:span text:style-name="T6">Bloqueo Temporal de Criatura:</text:span><text:span text:style-name="T7"> El Geno inscrito queda congelado en la base de datos </text:span><text:span text:style-name="T8">únicamente</text:span><text:span text:style-name="T7"> mientras esté compitiendo de forma activa dentro de su cuadro eliminatorio. Si es eliminado, se desbloquea al instante, permitiendo al jugador volver a pagar otra entrada con la misma criatura dentro de la hora activa.</text:span></text:p>
        </text:list-item>
      </text:list>
      <text:h text:style-name="P3" text:outline-level="2">2. EL CICLO DE GOBERNANZA SEMANAL (LUNES A JUEVES)</text:h>
      <text:p text:style-name="P7">Para involucrar a la comunidad y mantener el juego en constante evolución táctica, el modificador del fin de semana se somete a un sistema de votación descentralizado off-chain gestionado por Supabase.</text:p>
      <text:p text:style-name="P8">Plaintext</text:p>
      <text:p text:style-name="P8"><text:soft-page-break/>[LUNES] ──────────────────► [LUNES A JUEVES] ──────────────► [JUEVES NOCHE] ──────────► [FIN DE SEMANA]</text:p>
      <text:p text:style-name="P9"> <text:span text:style-name="T9">El servidor elige           Ventana de Votación             Cierre de Urnas            Se abre la ventana</text:span></text:p>
      <text:p text:style-name="P9"> <text:span text:style-name="T9">3 torneos al azar           Solo jugadores Nivel 5+         Se anuncia el ganador      "Sit &amp; Go" unificada</text:span></text:p>
      <text:p text:style-name="Text_20_body"/>
      <text:h text:style-name="P4" text:outline-level="3">Flujo Técnico Paso a Paso:</text:h>
      <text:list text:style-name="L2">
        <text:list-item>
          <text:p text:style-name="P10"><text:span text:style-name="T6">Lunes (Selección Aleatoria):</text:span><text:span text:style-name="T7"> El servidor ejecuta una función automatizada (</text:span><text:span text:style-name="T8">Cron Job</text:span><text:span text:style-name="T7">) que selecciona al azar </text:span><text:span text:style-name="T6">3 opciones</text:span><text:span text:style-name="T7"> de un catálogo cerrado de 6 torneos maestros.</text:span></text:p>
        </text:list-item>
        <text:list-item>
          <text:p text:style-name="P10"><text:span text:style-name="T6">Muro de Seguridad del Voto:</text:span><text:span text:style-name="T7"> No todos los perfiles pueden votar. El sistema valida en la tabla </text:span><text:span text:style-name="T10">profiles</text:span><text:span text:style-name="T7"> de Supabase que el usuario posea de forma estricta un </text:span><text:span text:style-name="T6">Nivel 5 de Laboratorio</text:span><text:span text:style-name="T7"> y tenga el campo </text:span><text:span text:style-name="T10">comercio_desbloqueado = true</text:span><text:span text:style-name="T7"> (Licencia de Comerciante adquirida en el Bazar por 15 EV). Esto neutraliza de forma matemática los ataques de granjas de bots e impide que cuentas falsas manipulen el meta del juego.</text:span></text:p>
        </text:list-item>
        <text:list-item>
          <text:p text:style-name="P10"><text:span text:style-name="T6">Jueves por la Noche (Cierre y Congelación):</text:span><text:span text:style-name="T7"> El sistema cierra las urnas, realiza el recuento de la tabla </text:span><text:span text:style-name="T10">tournament_votes</text:span><text:span text:style-name="T7"> y actualiza la variable de entorno global </text:span><text:span text:style-name="T10">current_weekend_tournament</text:span><text:span text:style-name="T7">.</text:span></text:p>
        </text:list-item>
        <text:list-item>
          <text:p text:style-name="P11"><text:span text:style-name="T2">Viernes (Ventana de Preparación):</text:span><text:span text:style-name="T11"> La comunidad dispone de 24 horas para adaptar las builds de sus criaturas, comprar ataques específicos en el </text:span><text:bookmark text:name="docs-internal-guid-cac81f61-7fff-081f-c02b-05ea221ee8be"/><text:span text:style-name="T2">Laboratorio de Implantes</text:span> <text:span text:style-name="T11"><text:s/>con descuento elemental si aplica, y reconfigurar sus scripts defensivos IFTTT.</text:span></text:p>
        </text:list-item>
      </text:list>
      <text:h text:style-name="P3" text:outline-level="2">3. CATÁLOGO CERRADO DE LOS 6 TORNEOS MAESTROS</text:h>
      <text:p text:style-name="P7">El bombo de votación se compone exclusivamente de estos 6 formatos optimizados para albergar la máxima masa crítica de usuarios, eliminando categorías ultra-exclusivas que ralentizan el emparejamiento:</text:p>
      <text:h text:style-name="P4" text:outline-level="3">1. Solo Comunes</text:h>
      <text:list text:style-name="L3">
        <text:list-item>
          <text:p text:style-name="P12"><text:span text:style-name="T6">Mecánica:</text:span><text:span text:style-name="T7"> Restricción estricta de rareza base. Solo se permite el ingreso de Genos de rareza Común de cualquier nivel.</text:span></text:p>
        </text:list-item>
        <text:list-item>
          <text:p text:style-name="P13"><text:span text:style-name="T6">Filtro de Rareza:</text:span><text:span text:style-name="T7"> No aplica (el formato es el filtro). Los brackets de 16 son de Comunes compitiendo contra Comunes. Premia el grindeo y la optimización a largo plazo de criaturas básicas.</text:span></text:p>
        </text:list-item>
      </text:list>
      <text:h text:style-name="P4" text:outline-level="3">2. Copa Raro</text:h>
      <text:list text:style-name="L4">
        <text:list-item>
          <text:p text:style-name="P14"><text:span text:style-name="T6">Mecánica:</text:span><text:span text:style-name="T7"> Restricción estricta de rareza intermedia. Solo se permite inscribir Genos de rareza Rara.</text:span></text:p>
        </text:list-item>
        <text:list-item>
          <text:p text:style-name="P15"><text:span text:style-name="T6">Filtro de Rareza:</text:span><text:span text:style-name="T7"> No aplica. Brackets puros de rareza Rara donde destacan las estrategias de herencia avanzada y alelos idénticos.</text:span></text:p>
        </text:list-item>
      </text:list>
      <text:h text:style-name="P4" text:outline-level="3"><text:soft-page-break/>3. Modo Berserker</text:h>
      <text:list text:style-name="L5">
        <text:list-item>
          <text:p text:style-name="P16"><text:span text:style-name="T6">Mecánica:</text:span><text:span text:style-name="T7"> Regla extrema de velocidad y daño. El stat de Defensa (DEF) se desactiva y se reduce a cero de forma global en el motor de combate para todos los combatientes. Los combates se vuelven frenéticos (3 a 5 turnos).</text:span></text:p>
        </text:list-item>
        <text:list-item>
          <text:p text:style-name="P17"><text:span text:style-name="T6">Filtro de Rareza APLICADO:</text:span><text:span text:style-name="T7"> El servidor organiza los brackets de 16 segregándolos de forma estricta por rareza (Comunes contra Comunes, Raros contra Raros). Esto evita que un Geno de mayor rareza borre de un golpe a uno básico por pura diferencia de ATK base.</text:span></text:p>
        </text:list-item>
      </text:list>
      <text:h text:style-name="P4" text:outline-level="3">4. Torneo Sin Genes</text:h>
      <text:list text:style-name="L6">
        <text:list-item>
          <text:p text:style-name="P18"><text:span text:style-name="T6">Mecánica:</text:span><text:span text:style-name="T7"> Prueba de habilidad táctica pura. Toda la cadena de genes ocultos y pasivas biológicas del ADN queda apagada en el motor de combate. Solo importan los 5 stats numéricos base, el nivel y la sinergia del catálogo de ataques elegidos.</text:span></text:p>
        </text:list-item>
        <text:list-item>
          <text:p text:style-name="P19"><text:span text:style-name="T6">Filtro de Rareza APLICADO:</text:span><text:span text:style-name="T7"> Las llaves de 16 se segregan por rareza (Comunes con Comunes, Raros con Raros) debido a que las estadísticas base de las escalas biológicas superiores siguen contando.</text:span></text:p>
        </text:list-item>
      </text:list>
      <text:h text:style-name="P4" text:outline-level="3">5. Liga Elemental Pura</text:h>
      <text:list text:style-name="L7">
        <text:list-item>
          <text:p text:style-name="P20"><text:span text:style-name="T6">Mecánica:</text:span><text:span text:style-name="T7"> El servidor activa un elemento específico del ciclo circular (ej. Radiactivo). Solo pueden inscribirse Genos que pertenezcan a ese tipo o a sus elementos adyacentes de ventaja/desventaja directa.</text:span></text:p>
        </text:list-item>
        <text:list-item>
          <text:p text:style-name="P21"><text:span text:style-name="T6">Filtro de Rareza APLICADO:</text:span><text:span text:style-name="T7"> Aislamiento biológico estricto. Los cuadros de 16 se dividen por rareza para que las diferencias de poder numérico no pisen las estrategias de contrarresto elemental.</text:span></text:p>
        </text:list-item>
      </text:list>
      <text:h text:style-name="P4" text:outline-level="3">6. El Espejo</text:h>
      <text:list text:style-name="L8">
        <text:list-item>
          <text:p text:style-name="P22"><text:span text:style-name="T6">Mecánica:</text:span><text:span text:style-name="T7"> El ecualizador absoluto de condiciones. El sistema clona un Geno exactamente idéntico en nivel, estadísticas y rareza para todos los participantes de la llave. La victoria depende en un 100% de la selección de movimientos para los Slots 2, 3 y 4 (Ataque Especial, Soporte y Definitivo).</text:span></text:p>
        </text:list-item>
        <text:list-item>
          <text:p text:style-name="P23"><text:span text:style-name="T6">Filtro de Rareza:</text:span><text:span text:style-name="T7"> No aplica. Al ser clones exactos, jugadores de cualquier nivel y con cualquier inventario se mezclan en los mismos brackets de forma totalmente equitativa y justa.</text:span></text:p>
        </text:list-item>
      </text:list>
      <text:p text:style-name="P24"><text:span text:style-name="T3">📢 </text:span><text:span text:style-name="T2">Nota de Producción sobre Rarezas Altas (Épicos, Legendarios y Míticos):</text:span><text:span text:style-name="T12"> </text:span><text:span text:style-name="T11">Para evitar botones muertos y frustración al principio del ciclo de vida del juego, estas rarezas quedan </text:span><text:span text:style-name="T2">excluidas</text:span><text:span text:style-name="T12"> </text:span><text:span text:style-name="T11">de la rotación diaria de torneos rápidos por dinero. Su terreno competitivo exclusivo queda reservado para los </text:span><text:span text:style-name="T2">Eventos de Gala de Fin de Temporada</text:span><text:span text:style-name="T12"> </text:span><text:span text:style-name="T11">(como el histórico </text:span><text:span text:style-name="T13">Torneo del Fundador</text:span><text:span text:style-name="T11">), los cuales se organizan de forma síncrona cada 3 meses como campañas de marketing masivas para elevar el valor del marketplace P2P.</text:span></text:p>
      <text:h text:style-name="P3" text:outline-level="2"><text:soft-page-break/>4. COLA UNIFICADA DE RIESGO Y CASCADA DINÁMICA FIFO</text:h>
      <text:p text:style-name="P2"><text:span text:style-name="T1">Para permitir que los jugadores veteranos o de perfil "ballena" puedan competir por bolsas de dinero real altas sin fragmentar las salas de espera, se descartan las salas separadas de inscripción. El sistema implementa un </text:span><text:span text:style-name="T2">Matchmaking Unificado de Riesgo Flexible</text:span><text:span text:style-name="T3"> </text:span><text:span text:style-name="T1">controlado por capas de precio.</text:span></text:p>
      <text:h text:style-name="P4" text:outline-level="3">Los 3 Montos de Entrada Disponibles:</text:h>
      <text:list text:style-name="L9">
        <text:list-item>
          <text:p text:style-name="P25"><text:span text:style-name="T7">🟢 </text:span><text:span text:style-name="T14">Nivel Casual:</text:span><text:span text:style-name="T15"> 1.00 $POL</text:span></text:p>
        </text:list-item>
        <text:list-item>
          <text:p text:style-name="P25"><text:span text:style-name="T7">🟡 </text:span><text:span text:style-name="T14">Nivel Competitivo:</text:span><text:span text:style-name="T15"> 5.00 $POL</text:span></text:p>
        </text:list-item>
        <text:list-item>
          <text:p text:style-name="P26"><text:span text:style-name="T7">🔴 </text:span><text:span text:style-name="T14">Nivel Élite:</text:span><text:span text:style-name="T15"> 10.00 $POL</text:span></text:p>
        </text:list-item>
      </text:list>
      <text:h text:style-name="P4" text:outline-level="3">Algoritmo del Flujo de Cascada en Servidor:</text:h>
      <text:list text:style-name="L10">
        <text:list-item>
          <text:p text:style-name="P27"><text:span text:style-name="T6">Inscripción Intencional:</text:span><text:span text:style-name="T7"> El jugador selecciona a su Geno elegible para el modificador activo y elige el monto máximo que está dispuesto a arriesgar (ej. </text:span><text:span text:style-name="T6">10.00 $POL</text:span><text:span text:style-name="T7">). El contrato inteligente retiene los fondos y lo añade a la </text:span><text:span text:style-name="T6">Cola Élite</text:span><text:span text:style-name="T7">.</text:span></text:p>
        </text:list-item>
        <text:list-item>
          <text:p text:style-name="P27"><text:span text:style-name="T6">El Temporizador de Corte (3 Minutos):</text:span><text:span text:style-name="T7"> El backend abre un cuadro de espera con una duración estricta de 3 minutos para juntar 16 jugadores reales de 10.00 $POL.</text:span></text:p>
          <text:list>
            <text:list-item>
              <text:p text:style-name="P27"><text:span text:style-name="T8">Si se llena (16/16):</text:span><text:span text:style-name="T7"> Se cierra el Bracket Élite y arranca el torneo de alto riesgo de forma inmediata.</text:span></text:p>
            </text:list-item>
            <text:list-item>
              <text:p text:style-name="P27"><text:span text:style-name="T8">Si expira el tiempo sin llenarse:</text:span><text:span text:style-name="T7"> El sistema activa el protocolo de </text:span><text:span text:style-name="T6">Descenso FIFO (First In, First Out)</text:span><text:span text:style-name="T7">.</text:span></text:p>
            </text:list-item>
          </text:list>
        </text:list-item>
        <text:list-item>
          <text:p text:style-name="P27"><text:span text:style-name="T6">El Descenso y la Liquidación de "Vueltas":</text:span><text:span text:style-name="T7"> Los jugadores estancados en la Cola Élite son desplazados de forma pasiva en bloque hacia la </text:span><text:span text:style-name="T6">Cola Competitiva (5.00 $POL)</text:span><text:span text:style-name="T7"> para fusionarse con la masa crítica de usuarios esperando en ese nivel.</text:span></text:p>
          <text:list>
            <text:list-item>
              <text:p text:style-name="P28">El contrato inteligente reajusta el coste de su participación a 5.00 $POL.</text:p>
            </text:list-item>
            <text:list-item>
              <text:p text:style-name="P27"><text:span text:style-name="T6">Garantía Contable de Gas Cero:</text:span><text:span text:style-name="T7"> El contrato inteligente prohíbe realizar transferencias salientes de devolución automáticas hacia la wallet on-chain del usuario para evitar el gasto innecesario de tarifas de gas de la tesorería. En su lugar, el contrato aplica el </text:span><text:span text:style-name="T8">Patrón de Retiro (Pull-over-Push)</text:span><text:span text:style-name="T7">: calcula la diferencia exacta (</text:span><text:span text:style-name="T6">5.00 $POL</text:span><text:span text:style-name="T7">) y la acredita instantáneamente en la variable interna </text:span><text:span text:style-name="T16">saldosPendientes</text:span><text:span text:style-name="T7"> del perfil del usuario.</text:span></text:p>
            </text:list-item>
            <text:list-item>
              <text:p text:style-name="P28">Este saldo queda reflejado en la UI del Baúl del jugador como crédito interno libre de gas para ser reinvertido en otra inscripción de la ventana horaria o retirado de forma física hacia su wallet Privy bajo demanda directa.</text:p>
            </text:list-item>
          </text:list>
        </text:list-item>
        <text:list-item>
          <text:p text:style-name="P29"><text:span text:style-name="T6">Suelo de Seguridad:</text:span><text:span text:style-name="T7"> Si la cola de 5.00 $POL tampoco lograra cerrarse, el algoritmo aplica el último descenso hacia la </text:span><text:span text:style-name="T6">Cola Casual de 1.00 $POL</text:span><text:span text:style-name="T7">, acreditando las diferencias correspondientes en </text:span><text:span text:style-name="T10">saldosPendientes</text:span><text:span text:style-name="T7">. Al ser el nivel de volumen masivo, el cuadro de 16 personas se cerrará de manera garantizada e instantánea.</text:span></text:p>
        </text:list-item>
      </text:list>
      <text:h text:style-name="P4" text:outline-level="3"><text:soft-page-break/>Interfaz de Usuario (UX) Transparency Pop-up:</text:h>
      <text:p text:style-name="P7">Cuando el backend ejecuta el descenso FIFO, el cliente web interceptará el estado y desplegará de forma obligatoria el siguiente modal informativo para garantizar transparencia absoluta y evitar pánico financiero:</text:p>
      <text:p text:style-name="P24"><text:span text:style-name="T3">🤝 </text:span><text:span text:style-name="T2">¡Ajuste de categoría para inicio rápido!</text:span></text:p>
      <text:p text:style-name="P30">El temporizador de la cola Élite (10.00 $POL) ha expirado sin encontrar los 16 rivales requeridos para cerrar el cuadro. Para que no tengas que seguir esperando, el Laboratorio te ha trasladado automáticamente al próximo torneo de la categoría Competitiva (5.00 $POL), donde la batalla comienza ya.</text:p>
      <text:p text:style-name="P31"><text:span text:style-name="T2">¡Tus fondos están seguros!</text:span><text:span text:style-name="T3"> </text:span><text:span text:style-name="T1">Los 5.00 $POL de diferencia han sido devueltos instantáneamente a tus </text:span><text:span text:style-name="T5">saldosPendientes</text:span><text:span text:style-name="T3"> </text:span><text:span text:style-name="T1">en el Baúl. Puedes usarlos para volver a inscribirte gratis en esta misma ventana o retirarlos cuando desees.</text:span></text:p>
      <text:p text:style-name="P32">[ ¡ENTRAR A LA ARENA! ]</text:p>
      <text:h text:style-name="P3" text:outline-level="2">5. BLINDAJE DE EQUIDAD MATEMÁTICA Y AJUSTE DE LLAVES</text:h>
      <text:p text:style-name="P7">Manejar dinero real ($POL) transforma el balance en un elemento crítico de seguridad. Se eliminan los algoritmos de emparejamiento asimétricos para asegurar justicia absoluta en el entorno competitivo.</text:p>
      <text:h text:style-name="P4" text:outline-level="3">1. Desactivación del "Jefe de Liga" (0% Asimetría)</text:h>
      <text:list text:style-name="L11">
        <text:list-item>
          <text:p text:style-name="P33"><text:span text:style-name="T7">La regla del 15% de probabilidad de cruzarse con una rareza superior (de la sección 5.4 del GDD original) queda </text:span><text:span text:style-name="T6">completamente eliminada</text:span><text:span text:style-name="T7"> de los torneos de fin de semana.</text:span></text:p>
        </text:list-item>
        <text:list-item>
          <text:p text:style-name="P34">Ningún jugador que arriesgue capital real será emparejado en desventaja de estadísticas contra una escala biológica superior. Un Geno Común solo compite contra Genos Comunes.</text:p>
        </text:list-item>
      </text:list>
      <text:h text:style-name="P4" text:outline-level="3">2. Protocolo de Contracción de Bracket a 8 Participantes</text:h>
      <text:p text:style-name="P7">Si el temporizador de la cola expira y una copa de rareza específica (ej. Copa Raro) registra un volumen bajo de participación que impide alcanzar los 16 mínimos, el sistema aplica la regla de contracción estructural de la sección 8.4 del documento maestro:</text:p>
      <text:list text:style-name="L12">
        <text:list-item>
          <text:p text:style-name="P35"><text:span text:style-name="T6">Si hay entre 8 y 15 inscritos:</text:span><text:span text:style-name="T7"> El servidor reduce automáticamente el tamaño del bracket de la llave de </text:span><text:span text:style-name="T6">16 a 8 participantes</text:span><text:span text:style-name="T7"> (Fases: Cuartos, Semifinal y Final). El torneo arranca inmediatamente de forma rentable respetando las entradas proporcionales.</text:span></text:p>
        </text:list-item>
        <text:list-item>
          <text:p text:style-name="P36"><text:soft-page-break/><text:span text:style-name="T6">Si hay menos de 4 inscritos:</text:span><text:span text:style-name="T7"> El torneo de esa categoría se cancela de forma off-chain, devolviendo el 100% de las entradas al pool de </text:span><text:span text:style-name="T10">saldosPendientes</text:span><text:span text:style-name="T7"> de los usuarios con un coste de gas plano de una sola firma de administración.</text:span></text:p>
        </text:list-item>
      </text:list>
      <text:h text:style-name="P4" text:outline-level="3">3. Protocolo de Inyección de NPC (Semicompletado)</text:h>
      <text:p text:style-name="P2"><text:span text:style-name="T1">Si al expirar el tiempo de matchmaking de un torneo reducido de 8 participantes, el grupo registra exactamente a </text:span><text:span text:style-name="T2">7 jugadores humanos reales</text:span><text:span text:style-name="T1">, el juego inyecta de forma automatizada un agente virtual (NPC) como el competidor número 8 para iniciar la partida de inmediato bajo las siguientes reglas económicas de tu GDD:</text:span></text:p>
      <text:list text:style-name="L13">
        <text:list-item>
          <text:p text:style-name="P37"><text:span text:style-name="T6">Subvención del Pozo:</text:span><text:span text:style-name="T7"> El pool de premios se mantiene inalterable calculado sobre un torneo completo de 8 participantes. La entrada ficticia del NPC se subsidia de forma matemática a través de la retención del organizador (10%) cobrada a los 7 participantes humanos, asegurando la rentabilidad del gas sin aportar capital de desarrollo.</text:span></text:p>
        </text:list-item>
        <text:list-item>
          <text:p text:style-name="P38"><text:span text:style-name="T6">Rescate de Liquidez Contable:</text:span><text:span text:style-name="T7"> El NPC ejecuta de forma pasiva su script defensivo IFTTT en el servidor consumiendo cero firmas de gas. Si el bot finaliza el torneo en posiciones de podio (1º, 2º o 3º lugar), el contrato inteligente intercepta la dirección y desvía de forma atómica el premio en $POL de vuelta a la wallet </text:span><text:span text:style-name="T6">Safe de tesorería multi-firma</text:span><text:span text:style-name="T7"> del equipo de desarrollo, usándose como colchón para financiar el Paymaster.</text:span></text:p>
        </text:list-item>
      </text:list>
      <text:h text:style-name="P3" text:outline-level="2">6. INGENIERÍA ECONÓMICA: MATEMÁTICA DEL PAYOUT EN $POL</text:h>
      <text:p text:style-name="P7">Cada bracket de 16 jugadores reales (o 8 en caso de contracción) constituye un circuito financiero cerrado e independiente en la blockchain de Polygon. No se crea dinero de la nada, impidiendo la inflación y asegurando liquidez inmediata.</text:p>
      <text:h text:style-name="P4" text:outline-level="3">Distribución de Fondos de un Bracket (Monto Base de Entrada: 1.00 $POL):</text:h>
      <text:list text:style-name="L14">
        <text:list-item>
          <text:p text:style-name="P39"><text:span text:style-name="T6">Recaudación Bruta de la Llave:</text:span><text:span text:style-name="T7"> 16 jugadores $\times$ 1.00 $POL$ = </text:span><text:span text:style-name="T6">16.00 $POL</text:span><text:span text:style-name="T7">.</text:span></text:p>
        </text:list-item>
        <text:list-item>
          <text:p text:style-name="P40"><text:span text:style-name="T7">🛡️ </text:span><text:span text:style-name="T14">Retención de la Casa (10%):</text:span><text:span text:style-name="T15"> </text:span><text:span text:style-name="T14">1.60 $POL</text:span><text:span text:style-name="T15"> se transfieren directamente y de forma automatizada hardcodeada en el contrato inteligente hacia la wallet multi-firma </text:span><text:span text:style-name="T14">Safe de Tesorería</text:span><text:span text:style-name="T15"> del estudio (Gobernanza 2 de 3 con llaves físicas de hardware) para cubrir infraestructura y gas del Paymaster.</text:span></text:p>
        </text:list-item>
        <text:list-item>
          <text:p text:style-name="P41"><text:span text:style-name="T7">💰 </text:span><text:span text:style-name="T14">Bolsa Neta para el Podio (90%):</text:span><text:span text:style-name="T15"> Quedan exactamente </text:span><text:span text:style-name="T14">14.40 $POL</text:span><text:span text:style-name="T15"> líquidos a repartir de forma atómica entre los 3 primeros puestos de la clasificación.</text:span></text:p>
        </text:list-item>
      </text:list>
      <text:p text:style-name="P7">Acatando los porcentajes exactos fijados en el balance del juego, el contrato inteligente ejecuta los siguientes pagos directos a las carteras Privy/MetaMask de los ganadores:</text:p>
      <text:list text:style-name="L15">
        <text:list-item>
          <text:p text:style-name="P42"><text:span text:style-name="T7">🥇 </text:span><text:span text:style-name="T14">1º Puesto (Campeón):</text:span><text:span text:style-name="T15"> Se lleva el </text:span><text:span text:style-name="T14">55.55%</text:span><text:span text:style-name="T15"> del pool de premios neto ──► </text:span><text:span text:style-name="T14">8.00 $POL</text:span><text:span text:style-name="T15"> (Multiplica por x8 su inversión original).</text:span></text:p>
        </text:list-item>
        <text:list-item>
          <text:p text:style-name="P42"><text:soft-page-break/><text:span text:style-name="T7">🥈 </text:span><text:span text:style-name="T14">2º Puesto (Subcampeón):</text:span><text:span text:style-name="T15"> Se lleva el </text:span><text:span text:style-name="T14">30.55%</text:span><text:span text:style-name="T15"> del pool de premios neto ──► </text:span><text:span text:style-name="T14">4.40 $POL</text:span><text:span text:style-name="T15">.</text:span></text:p>
        </text:list-item>
        <text:list-item>
          <text:p text:style-name="P43"><text:span text:style-name="T7">🥉 </text:span><text:span text:style-name="T14">3º Puesto (Ganador del duelo de consolación):</text:span><text:span text:style-name="T15"> Se lleva un multiplicador fijo inmutable de </text:span><text:span text:style-name="T14">x2.0</text:span><text:span text:style-name="T15"> de su coste de entrada original ──► </text:span><text:span text:style-name="T14">2.00 $POL</text:span><text:span text:style-name="T15">.</text:span></text:p>
        </text:list-item>
      </text:list>
      <text:p text:style-name="P8">$$\text{Comprobación Contable: } 8.00\ (\text{1º}) + 4.40\ (\text{2º}) + 2.00\ (\text{3º}) + 1.60\ (\text{Casa}) = \mathbf{16.00\ POL}$$</text:p>
      <text:h text:style-name="P4" text:outline-level="3">Mitigación del Riesgo Financiero por Esencia Vital (EV) Off-chain:</text:h>
      <text:p text:style-name="P7">Para eliminar la frustración competitiva de los 13 jugadores que se quedan fuera del dinero en las llaves eliminatorias, el backend de Supabase compensa de forma inmediata e off-chain a las cuentas inyectando recursos de progreso según la ronda alcanzada:</text:p>
      <text:list text:style-name="L16">
        <text:list-item>
          <text:p text:style-name="P44"><text:span text:style-name="T7">❌ </text:span><text:span text:style-name="T14">Eliminados en Octavos de Final (Ronda 1):</text:span><text:span text:style-name="T15"> Caen al inicio. Reciben el </text:span><text:span text:style-name="T14">Premio de Consolación Máximo en EV</text:span><text:span text:style-name="T15"> (Ej: 15.00 EV), aportando la energía necesaria para ir directo al Laboratorio de Implantes a modificar su estrategia.</text:span></text:p>
        </text:list-item>
        <text:list-item>
          <text:p text:style-name="P44"><text:span text:style-name="T7">📉 </text:span><text:span text:style-name="T14">Eliminados en Cuartos de Final (Ronda 2):</text:span><text:span text:style-name="T15"> Reciben un pellizco intermedio de </text:span><text:span text:style-name="T14">8.00 EV</text:span><text:span text:style-name="T15">.</text:span></text:p>
        </text:list-item>
        <text:list-item>
          <text:p text:style-name="P45"><text:span text:style-name="T7">🏅 </text:span><text:span text:style-name="T14">4º Puesto (El que pierde la final de consolación por el 3º puesto):</text:span><text:span text:style-name="T15"> Se queda a las puertas de las criptomonedas. El juego lo premia con un incentivo genético: </text:span><text:span text:style-name="T14">4.00 EV + un plano procedural para un Accesorio Cosmético de la Torre</text:span><text:span text:style-name="T15">.</text:span></text:p>
        </text:list-item>
      </text:list>
      <text:h text:style-name="P3" text:outline-level="2">7. PROTOCOLO DE DESCONEXIÓN ASÍNCRONA (SOPORTE IFTTT)</text:h>
      <text:p text:style-name="P7">Al tratarse de torneos de fin de semana con horarios específicos en vivo, el jugador que está conectado controla de forma manual turno a turno las acciones de su Geno. Sin embargo, para evitar que una caída de red o un abandono congele el torneo de forma indefinida para el rival puntual, entra en juego el sistema de respaldo híbrido:</text:p>
      <text:list text:style-name="L17">
        <text:list-item>
          <text:p text:style-name="P46"><text:span text:style-name="T6">El Servidor Toma el Control Pasivo:</text:span><text:span text:style-name="T7"> Si en el transcurso de una ronda el temporizador de turno (30 segundos de decisión) expira dos veces consecutivas sin recibir respuesta del cliente del Jugador A, el backend de Supabase altera el estado del jugador a </text:span><text:span text:style-name="T10">offline</text:span><text:span text:style-name="T7">.</text:span></text:p>
        </text:list-item>
        <text:list-item>
          <text:p text:style-name="P46"><text:span text:style-name="T6">Activación de Piloto Automático:</text:span><text:span text:style-name="T7"> El motor de combate central (</text:span><text:span text:style-name="T10">ColiseumLogic.js</text:span><text:span text:style-name="T7">) lee de forma pasiva e instantánea el script de condiciones </text:span><text:span text:style-name="T6">IFTTT</text:span><text:span text:style-name="T7"> preprogramado que el Jugador A dejó configurado en su perfil de base de datos.</text:span></text:p>
        </text:list-item>
        <text:list-item>
          <text:p text:style-name="P47"><text:span text:style-name="T6">Fluidez de la Llave:</text:span><text:span text:style-name="T7"> El combate continúa ejecutándose en milisegundos en el servidor. El Jugador B (que sigue online) continúa jugando de forma manual en vivo contra la mente automatizada del rival, asegurando que el bracket no sufra retrasos y finalice dentro de los tiempos estipulados de la ventana horaria.</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0T18:46:10.955351200</meta:creation-date>
    <dc:date>2026-06-10T18:59:12.201188400</dc:date>
    <meta:editing-duration>PT34S</meta:editing-duration>
    <meta:editing-cycles>2</meta:editing-cycles>
    <meta:generator>LibreOffice/26.2.1.2$Windows_X86_64 LibreOffice_project/620$Build-2</meta:generator>
    <meta:document-statistic meta:table-count="0" meta:image-count="0" meta:object-count="0" meta:page-count="7" meta:paragraph-count="96" meta:word-count="2576" meta:character-count="15896" meta:non-whitespace-character-count="13406"/>
  </office:meta>
</office:document-meta>
</file>