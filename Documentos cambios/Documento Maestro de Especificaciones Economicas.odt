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185cm" table:align="left"/>
    </style:style>
    <style:style style:name="Tabla1.A" style:family="table-column">
      <style:table-column-properties style:column-width="16.185cm"/>
    </style:style>
    <style:style style:name="Tabla1.A1" style:family="table-cell">
      <style:table-cell-properties style:vertical-align="middle" fo:background-color="#d5e8f0" fo:padding-left="0.282cm" fo:padding-right="0.282cm" fo:padding-top="0.176cm" fo:padding-bottom="0.106cm" fo:border="0.6pt solid #cccccc">
        <style:background-image/>
      </style:table-cell-properties>
    </style:style>
    <style:style style:name="Tabla1.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2" style:family="table">
      <style:table-properties style:width="16.489cm" table:align="left"/>
    </style:style>
    <style:style style:name="Tabla2.A" style:family="table-column">
      <style:table-column-properties style:column-width="7.613cm"/>
    </style:style>
    <style:style style:name="Tabla2.B" style:family="table-column">
      <style:table-column-properties style:column-width="4.226cm"/>
    </style:style>
    <style:style style:name="Tabla2.C" style:family="table-column">
      <style:table-column-properties style:column-width="4.65cm"/>
    </style:style>
    <style:style style:name="Tabla2.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2.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2.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3" style:family="table">
      <style:table-properties style:width="16.489cm" table:align="left"/>
    </style:style>
    <style:style style:name="Tabla3.A" style:family="table-column">
      <style:table-column-properties style:column-width="7.639cm"/>
    </style:style>
    <style:style style:name="Tabla3.B" style:family="table-column">
      <style:table-column-properties style:column-width="4.2cm"/>
    </style:style>
    <style:style style:name="Tabla3.C" style:family="table-column">
      <style:table-column-properties style:column-width="4.65cm"/>
    </style:style>
    <style:style style:name="Tabla3.A1" style:family="table-cell">
      <style:table-cell-properties style:vertical-align="middle" fo:background-color="#1f3864" fo:padding-left="0.212cm" fo:padding-right="0.212cm" fo:padding-top="0.141cm" fo:padding-bottom="0.141cm" fo:border="0.6pt solid #cccccc">
        <style:background-image/>
      </style:table-cell-properties>
    </style:style>
    <style:style style:name="Tabla3.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3.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4" style:family="table">
      <style:table-properties style:width="16.185cm" table:align="left"/>
    </style:style>
    <style:style style:name="Tabla4.A" style:family="table-column">
      <style:table-column-properties style:column-width="16.185cm"/>
    </style:style>
    <style:style style:name="Tabla4.A1" style:family="table-cell">
      <style:table-cell-properties style:vertical-align="middle" fo:background-color="#d5ede8" fo:padding-left="0.282cm" fo:padding-right="0.282cm" fo:padding-top="0.176cm" fo:padding-bottom="0.106cm" fo:border="0.6pt solid #cccccc">
        <style:background-image/>
      </style:table-cell-properties>
    </style:style>
    <style:style style:name="Tabla4.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5" style:family="table">
      <style:table-properties style:width="16.185cm" table:align="left"/>
    </style:style>
    <style:style style:name="Tabla5.A" style:family="table-column">
      <style:table-column-properties style:column-width="16.185cm"/>
    </style:style>
    <style:style style:name="Tabla5.A1" style:family="table-cell">
      <style:table-cell-properties style:vertical-align="middle" fo:background-color="#d5e8f0" fo:padding-left="0.282cm" fo:padding-right="0.282cm" fo:padding-top="0.176cm" fo:padding-bottom="0.106cm" fo:border="0.6pt solid #cccccc">
        <style:background-image/>
      </style:table-cell-properties>
    </style:style>
    <style:style style:name="Tabla5.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6" style:family="table">
      <style:table-properties style:width="16.641cm" table:align="left"/>
    </style:style>
    <style:style style:name="Tabla6.A" style:family="table-column">
      <style:table-column-properties style:column-width="3.089cm"/>
    </style:style>
    <style:style style:name="Tabla6.B" style:family="table-column">
      <style:table-column-properties style:column-width="2.533cm"/>
    </style:style>
    <style:style style:name="Tabla6.C" style:family="table-column">
      <style:table-column-properties style:column-width="7.004cm"/>
    </style:style>
    <style:style style:name="Tabla6.D" style:family="table-column">
      <style:table-column-properties style:column-width="4.015cm"/>
    </style:style>
    <style:style style:name="Tabla6.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6.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6.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7" style:family="table">
      <style:table-properties style:width="16.185cm" table:align="left"/>
    </style:style>
    <style:style style:name="Tabla7.A" style:family="table-column">
      <style:table-column-properties style:column-width="16.185cm"/>
    </style:style>
    <style:style style:name="Tabla7.A1" style:family="table-cell">
      <style:table-cell-properties style:vertical-align="middle" fo:background-color="#e0f0e5" fo:padding-left="0.282cm" fo:padding-right="0.282cm" fo:padding-top="0.176cm" fo:padding-bottom="0.106cm" fo:border="0.6pt solid #cccccc">
        <style:background-image/>
      </style:table-cell-properties>
    </style:style>
    <style:style style:name="Tabla7.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8" style:family="table">
      <style:table-properties style:width="16.185cm" table:align="left"/>
    </style:style>
    <style:style style:name="Tabla8.A" style:family="table-column">
      <style:table-column-properties style:column-width="16.185cm"/>
    </style:style>
    <style:style style:name="Tabla8.A1" style:family="table-cell">
      <style:table-cell-properties style:vertical-align="middle" fo:background-color="#fff3cd" fo:padding-left="0.282cm" fo:padding-right="0.282cm" fo:padding-top="0.176cm" fo:padding-bottom="0.106cm" fo:border="0.6pt solid #cccccc">
        <style:background-image/>
      </style:table-cell-properties>
    </style:style>
    <style:style style:name="Tabla8.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9" style:family="table">
      <style:table-properties style:width="16.614cm" table:align="left"/>
    </style:style>
    <style:style style:name="Tabla9.A" style:family="table-column">
      <style:table-column-properties style:column-width="4.438cm"/>
    </style:style>
    <style:style style:name="Tabla9.B" style:family="table-column">
      <style:table-column-properties style:column-width="3.644cm"/>
    </style:style>
    <style:style style:name="Tabla9.C" style:family="table-column">
      <style:table-column-properties style:column-width="4.332cm"/>
    </style:style>
    <style:style style:name="Tabla9.D" style:family="table-column">
      <style:table-column-properties style:column-width="4.2cm"/>
    </style:style>
    <style:style style:name="Tabla9.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9.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9.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10" style:family="table">
      <style:table-properties style:width="16.185cm" table:align="left"/>
    </style:style>
    <style:style style:name="Tabla10.A" style:family="table-column">
      <style:table-column-properties style:column-width="16.185cm"/>
    </style:style>
    <style:style style:name="Tabla10.A1" style:family="table-cell">
      <style:table-cell-properties style:vertical-align="middle" fo:background-color="#fdecea" fo:padding-left="0.282cm" fo:padding-right="0.282cm" fo:padding-top="0.176cm" fo:padding-bottom="0.106cm" fo:border="0.6pt solid #cccccc">
        <style:background-image/>
      </style:table-cell-properties>
    </style:style>
    <style:style style:name="Tabla10.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11" style:family="table">
      <style:table-properties style:width="16.185cm" table:align="left"/>
    </style:style>
    <style:style style:name="Tabla11.A" style:family="table-column">
      <style:table-column-properties style:column-width="16.185cm"/>
    </style:style>
    <style:style style:name="Tabla11.A1" style:family="table-cell">
      <style:table-cell-properties style:vertical-align="middle" fo:background-color="#fff3cd" fo:padding-left="0.282cm" fo:padding-right="0.282cm" fo:padding-top="0.176cm" fo:padding-bottom="0.106cm" fo:border="0.6pt solid #cccccc">
        <style:background-image/>
      </style:table-cell-properties>
    </style:style>
    <style:style style:name="Tabla11.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12" style:family="table">
      <style:table-properties style:width="16.739cm" table:align="left"/>
    </style:style>
    <style:style style:name="Tabla12.A" style:family="table-column">
      <style:table-column-properties style:column-width="3.538cm"/>
    </style:style>
    <style:style style:name="Tabla12.B" style:family="table-column">
      <style:table-column-properties style:column-width="2.083cm"/>
    </style:style>
    <style:style style:name="Tabla12.C" style:family="table-column">
      <style:table-column-properties style:column-width="4.411cm"/>
    </style:style>
    <style:style style:name="Tabla12.D" style:family="table-column">
      <style:table-column-properties style:column-width="2.983cm"/>
    </style:style>
    <style:style style:name="Tabla12.E" style:family="table-column">
      <style:table-column-properties style:column-width="3.724cm"/>
    </style:style>
    <style:style style:name="Tabla12.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12.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12.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13" style:family="table">
      <style:table-properties style:width="16.614cm" table:align="left"/>
    </style:style>
    <style:style style:name="Tabla13.A" style:family="table-column">
      <style:table-column-properties style:column-width="3.062cm"/>
    </style:style>
    <style:style style:name="Tabla13.B" style:family="table-column">
      <style:table-column-properties style:column-width="3.194cm"/>
    </style:style>
    <style:style style:name="Tabla13.C" style:family="table-column">
      <style:table-column-properties style:column-width="4.411cm"/>
    </style:style>
    <style:style style:name="Tabla13.D" style:family="table-column">
      <style:table-column-properties style:column-width="5.946cm"/>
    </style:style>
    <style:style style:name="Tabla13.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13.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13.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14" style:family="table">
      <style:table-properties style:width="16.462cm" table:align="left"/>
    </style:style>
    <style:style style:name="Tabla14.A" style:family="table-column">
      <style:table-column-properties style:column-width="6.211cm"/>
    </style:style>
    <style:style style:name="Tabla14.B" style:family="table-column">
      <style:table-column-properties style:column-width="4.359cm"/>
    </style:style>
    <style:style style:name="Tabla14.C" style:family="table-column">
      <style:table-column-properties style:column-width="5.893cm"/>
    </style:style>
    <style:style style:name="Tabla14.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14.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14.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15" style:family="table">
      <style:table-properties style:width="16.462cm" table:align="left"/>
    </style:style>
    <style:style style:name="Tabla15.A" style:family="table-column">
      <style:table-column-properties style:column-width="3.724cm"/>
    </style:style>
    <style:style style:name="Tabla15.B" style:family="table-column">
      <style:table-column-properties style:column-width="8.301cm"/>
    </style:style>
    <style:style style:name="Tabla15.C" style:family="table-column">
      <style:table-column-properties style:column-width="4.438cm"/>
    </style:style>
    <style:style style:name="Tabla15.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15.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15.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16" style:family="table">
      <style:table-properties style:width="16.489cm" table:align="left"/>
    </style:style>
    <style:style style:name="Tabla16.A" style:family="table-column">
      <style:table-column-properties style:column-width="3.803cm"/>
    </style:style>
    <style:style style:name="Tabla16.B" style:family="table-column">
      <style:table-column-properties style:column-width="8.248cm"/>
    </style:style>
    <style:style style:name="Tabla16.C" style:family="table-column">
      <style:table-column-properties style:column-width="4.438cm"/>
    </style:style>
    <style:style style:name="Tabla16.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16.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16.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17" style:family="table">
      <style:table-properties style:width="16.462cm" table:align="left"/>
    </style:style>
    <style:style style:name="Tabla17.A" style:family="table-column">
      <style:table-column-properties style:column-width="4.094cm"/>
    </style:style>
    <style:style style:name="Tabla17.B" style:family="table-column">
      <style:table-column-properties style:column-width="7.507cm"/>
    </style:style>
    <style:style style:name="Tabla17.C" style:family="table-column">
      <style:table-column-properties style:column-width="4.861cm"/>
    </style:style>
    <style:style style:name="Tabla17.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17.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17.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18" style:family="table">
      <style:table-properties style:width="16.462cm" table:align="left"/>
    </style:style>
    <style:style style:name="Tabla18.A" style:family="table-column">
      <style:table-column-properties style:column-width="4.544cm"/>
    </style:style>
    <style:style style:name="Tabla18.B" style:family="table-column">
      <style:table-column-properties style:column-width="4.464cm"/>
    </style:style>
    <style:style style:name="Tabla18.C" style:family="table-column">
      <style:table-column-properties style:column-width="7.454cm"/>
    </style:style>
    <style:style style:name="Tabla18.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18.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18.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19" style:family="table">
      <style:table-properties style:width="16.614cm" table:align="left"/>
    </style:style>
    <style:style style:name="Tabla19.A" style:family="table-column">
      <style:table-column-properties style:column-width="3.75cm"/>
    </style:style>
    <style:style style:name="Tabla19.B" style:family="table-column">
      <style:table-column-properties style:column-width="2.983cm"/>
    </style:style>
    <style:style style:name="Tabla19.C" style:family="table-column">
      <style:table-column-properties style:column-width="3.988cm"/>
    </style:style>
    <style:style style:name="Tabla19.D" style:family="table-column">
      <style:table-column-properties style:column-width="5.893cm"/>
    </style:style>
    <style:style style:name="Tabla19.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19.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19.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20" style:family="table">
      <style:table-properties style:width="16.614cm" table:align="left"/>
    </style:style>
    <style:style style:name="Tabla20.A" style:family="table-column">
      <style:table-column-properties style:column-width="3.406cm"/>
    </style:style>
    <style:style style:name="Tabla20.B" style:family="table-column">
      <style:table-column-properties style:column-width="3.618cm"/>
    </style:style>
    <style:style style:name="Tabla20.C" style:family="table-column">
      <style:table-column-properties style:column-width="3.565cm"/>
    </style:style>
    <style:style style:name="Tabla20.D" style:family="table-column">
      <style:table-column-properties style:column-width="6.025cm"/>
    </style:style>
    <style:style style:name="Tabla20.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20.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20.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21" style:family="table">
      <style:table-properties style:width="16.489cm" table:align="left"/>
    </style:style>
    <style:style style:name="Tabla21.A" style:family="table-column">
      <style:table-column-properties style:column-width="3.776cm"/>
    </style:style>
    <style:style style:name="Tabla21.B" style:family="table-column">
      <style:table-column-properties style:column-width="3.221cm"/>
    </style:style>
    <style:style style:name="Tabla21.C" style:family="table-column">
      <style:table-column-properties style:column-width="9.491cm"/>
    </style:style>
    <style:style style:name="Tabla21.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21.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21.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22" style:family="table">
      <style:table-properties style:width="16.489cm" table:align="left"/>
    </style:style>
    <style:style style:name="Tabla22.A" style:family="table-column">
      <style:table-column-properties style:column-width="3.776cm"/>
    </style:style>
    <style:style style:name="Tabla22.B" style:family="table-column">
      <style:table-column-properties style:column-width="3.221cm"/>
    </style:style>
    <style:style style:name="Tabla22.C" style:family="table-column">
      <style:table-column-properties style:column-width="9.491cm"/>
    </style:style>
    <style:style style:name="Tabla22.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22.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22.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23" style:family="table">
      <style:table-properties style:width="16.489cm" table:align="left"/>
    </style:style>
    <style:style style:name="Tabla23.A" style:family="table-column">
      <style:table-column-properties style:column-width="3.776cm"/>
    </style:style>
    <style:style style:name="Tabla23.B" style:family="table-column">
      <style:table-column-properties style:column-width="3.221cm"/>
    </style:style>
    <style:style style:name="Tabla23.C" style:family="table-column">
      <style:table-column-properties style:column-width="9.491cm"/>
    </style:style>
    <style:style style:name="Tabla23.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23.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23.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24" style:family="table">
      <style:table-properties style:width="16.185cm" table:align="left"/>
    </style:style>
    <style:style style:name="Tabla24.A" style:family="table-column">
      <style:table-column-properties style:column-width="16.185cm"/>
    </style:style>
    <style:style style:name="Tabla24.A1" style:family="table-cell">
      <style:table-cell-properties style:vertical-align="middle" fo:background-color="#ede0f5" fo:padding-left="0.282cm" fo:padding-right="0.282cm" fo:padding-top="0.176cm" fo:padding-bottom="0.106cm" fo:border="0.6pt solid #cccccc">
        <style:background-image/>
      </style:table-cell-properties>
    </style:style>
    <style:style style:name="Tabla24.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25" style:family="table">
      <style:table-properties style:width="16.641cm" table:align="left"/>
    </style:style>
    <style:style style:name="Tabla25.A" style:family="table-column">
      <style:table-column-properties style:column-width="5.02cm"/>
    </style:style>
    <style:style style:name="Tabla25.B" style:family="table-column">
      <style:table-column-properties style:column-width="3.724cm"/>
    </style:style>
    <style:style style:name="Tabla25.D" style:family="table-column">
      <style:table-column-properties style:column-width="4.173cm"/>
    </style:style>
    <style:style style:name="Tabla25.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25.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25.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26" style:family="table">
      <style:table-properties style:width="16.614cm" table:align="left"/>
    </style:style>
    <style:style style:name="Tabla26.A" style:family="table-column">
      <style:table-column-properties style:column-width="3.089cm"/>
    </style:style>
    <style:style style:name="Tabla26.B" style:family="table-column">
      <style:table-column-properties style:column-width="2.083cm"/>
    </style:style>
    <style:style style:name="Tabla26.C" style:family="table-column">
      <style:table-column-properties style:column-width="5.576cm"/>
    </style:style>
    <style:style style:name="Tabla26.D" style:family="table-column">
      <style:table-column-properties style:column-width="5.867cm"/>
    </style:style>
    <style:style style:name="Tabla26.A1" style:family="table-cell">
      <style:table-cell-properties style:vertical-align="middle" fo:background-color="#1f3864" fo:padding-left="0.176cm" fo:padding-right="0.176cm" fo:padding-top="0.141cm" fo:padding-bottom="0.141cm" fo:border="0.6pt solid #cccccc">
        <style:background-image/>
      </style:table-cell-properties>
    </style:style>
    <style:style style:name="Tabla26.A2" style:family="table-cell">
      <style:table-cell-properties style:vertical-align="middle" fo:background-color="#d5ede8" fo:padding-left="0.176cm" fo:padding-right="0.176cm" fo:padding-top="0.106cm" fo:padding-bottom="0.106cm" fo:border="0.6pt solid #cccccc">
        <style:background-image/>
      </style:table-cell-properties>
    </style:style>
    <style:style style:name="Tabla26.B2" style:family="table-cell">
      <style:table-cell-properties style:vertical-align="middle" fo:background-color="#ffffff" fo:padding-left="0.176cm" fo:padding-right="0.176cm" fo:padding-top="0.106cm" fo:padding-bottom="0.106cm" fo:border="0.6pt solid #cccccc">
        <style:background-image/>
      </style:table-cell-properties>
    </style:style>
    <style:style style:name="Tabla26.A3" style:family="table-cell">
      <style:table-cell-properties style:vertical-align="middle" fo:background-color="#fff3cd" fo:padding-left="0.176cm" fo:padding-right="0.176cm" fo:padding-top="0.106cm" fo:padding-bottom="0.106cm" fo:border="0.6pt solid #cccccc">
        <style:background-image/>
      </style:table-cell-properties>
    </style:style>
    <style:style style:name="Tabla26.A4" style:family="table-cell">
      <style:table-cell-properties style:vertical-align="middle" fo:background-color="#fdecea" fo:padding-left="0.176cm" fo:padding-right="0.176cm" fo:padding-top="0.106cm" fo:padding-bottom="0.106cm" fo:border="0.6pt solid #cccccc">
        <style:background-image/>
      </style:table-cell-properties>
    </style:style>
    <style:style style:name="Tabla26.A5" style:family="table-cell">
      <style:table-cell-properties style:vertical-align="middle" fo:background-color="#ede0f5" fo:padding-left="0.176cm" fo:padding-right="0.176cm" fo:padding-top="0.106cm" fo:padding-bottom="0.106cm" fo:border="0.6pt solid #cccccc">
        <style:background-image/>
      </style:table-cell-properties>
    </style:style>
    <style:style style:name="Tabla27" style:family="table">
      <style:table-properties style:width="16.489cm" table:align="left"/>
    </style:style>
    <style:style style:name="Tabla27.A" style:family="table-column">
      <style:table-column-properties style:column-width="4.094cm"/>
    </style:style>
    <style:style style:name="Tabla27.B" style:family="table-column">
      <style:table-column-properties style:column-width="3.803cm"/>
    </style:style>
    <style:style style:name="Tabla27.C" style:family="table-column">
      <style:table-column-properties style:column-width="8.592cm"/>
    </style:style>
    <style:style style:name="Tabla27.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27.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27.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28" style:family="table">
      <style:table-properties style:width="16.185cm" table:align="left"/>
    </style:style>
    <style:style style:name="Tabla28.A" style:family="table-column">
      <style:table-column-properties style:column-width="16.185cm"/>
    </style:style>
    <style:style style:name="Tabla28.A1" style:family="table-cell">
      <style:table-cell-properties style:vertical-align="middle" fo:background-color="#fdecea" fo:padding-left="0.282cm" fo:padding-right="0.282cm" fo:padding-top="0.176cm" fo:padding-bottom="0.106cm" fo:border="0.6pt solid #cccccc">
        <style:background-image/>
      </style:table-cell-properties>
    </style:style>
    <style:style style:name="Tabla28.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29" style:family="table">
      <style:table-properties style:width="16.185cm" table:align="left"/>
    </style:style>
    <style:style style:name="Tabla29.A" style:family="table-column">
      <style:table-column-properties style:column-width="16.185cm"/>
    </style:style>
    <style:style style:name="Tabla29.A1" style:family="table-cell">
      <style:table-cell-properties style:vertical-align="middle" fo:background-color="#d5ede8" fo:padding-left="0.282cm" fo:padding-right="0.282cm" fo:padding-top="0.176cm" fo:padding-bottom="0.106cm" fo:border="0.6pt solid #cccccc">
        <style:background-image/>
      </style:table-cell-properties>
    </style:style>
    <style:style style:name="Tabla29.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30" style:family="table">
      <style:table-properties style:width="16.614cm" table:align="left"/>
    </style:style>
    <style:style style:name="Tabla30.A" style:family="table-column">
      <style:table-column-properties style:column-width="4.306cm"/>
    </style:style>
    <style:style style:name="Tabla30.B" style:family="table-column">
      <style:table-column-properties style:column-width="3.988cm"/>
    </style:style>
    <style:style style:name="Tabla30.C" style:family="table-column">
      <style:table-column-properties style:column-width="4.332cm"/>
    </style:style>
    <style:style style:name="Tabla30.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30.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30.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31" style:family="table">
      <style:table-properties style:width="16.185cm" table:align="left"/>
    </style:style>
    <style:style style:name="Tabla31.A" style:family="table-column">
      <style:table-column-properties style:column-width="16.185cm"/>
    </style:style>
    <style:style style:name="Tabla31.A1" style:family="table-cell">
      <style:table-cell-properties style:vertical-align="middle" fo:background-color="#fff3cd" fo:padding-left="0.282cm" fo:padding-right="0.282cm" fo:padding-top="0.176cm" fo:padding-bottom="0.106cm" fo:border="0.6pt solid #cccccc">
        <style:background-image/>
      </style:table-cell-properties>
    </style:style>
    <style:style style:name="Tabla31.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32" style:family="table">
      <style:table-properties style:width="16.489cm" table:align="left"/>
    </style:style>
    <style:style style:name="Tabla32.A" style:family="table-column">
      <style:table-column-properties style:column-width="4.173cm"/>
    </style:style>
    <style:style style:name="Tabla32.B" style:family="table-column">
      <style:table-column-properties style:column-width="6.449cm"/>
    </style:style>
    <style:style style:name="Tabla32.C" style:family="table-column">
      <style:table-column-properties style:column-width="5.867cm"/>
    </style:style>
    <style:style style:name="Tabla32.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32.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32.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33" style:family="table">
      <style:table-properties style:width="16.185cm" table:align="left"/>
    </style:style>
    <style:style style:name="Tabla33.A" style:family="table-column">
      <style:table-column-properties style:column-width="16.185cm"/>
    </style:style>
    <style:style style:name="Tabla33.A1" style:family="table-cell">
      <style:table-cell-properties style:vertical-align="middle" fo:background-color="#d5e8f0" fo:padding-left="0.282cm" fo:padding-right="0.282cm" fo:padding-top="0.176cm" fo:padding-bottom="0.106cm" fo:border="0.6pt solid #cccccc">
        <style:background-image/>
      </style:table-cell-properties>
    </style:style>
    <style:style style:name="Tabla33.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34" style:family="table">
      <style:table-properties style:width="16.185cm" table:align="left"/>
    </style:style>
    <style:style style:name="Tabla34.A" style:family="table-column">
      <style:table-column-properties style:column-width="16.185cm"/>
    </style:style>
    <style:style style:name="Tabla34.A1" style:family="table-cell">
      <style:table-cell-properties style:vertical-align="middle" fo:background-color="#fff3cd" fo:padding-left="0.282cm" fo:padding-right="0.282cm" fo:padding-top="0.176cm" fo:padding-bottom="0.106cm" fo:border="0.6pt solid #cccccc">
        <style:background-image/>
      </style:table-cell-properties>
    </style:style>
    <style:style style:name="Tabla34.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35" style:family="table">
      <style:table-properties style:width="16.792cm" table:align="left"/>
    </style:style>
    <style:style style:name="Tabla35.A" style:family="table-column">
      <style:table-column-properties style:column-width="3.089cm"/>
    </style:style>
    <style:style style:name="Tabla35.B" style:family="table-column">
      <style:table-column-properties style:column-width="1.924cm"/>
    </style:style>
    <style:style style:name="Tabla35.C" style:family="table-column">
      <style:table-column-properties style:column-width="3.009cm"/>
    </style:style>
    <style:style style:name="Tabla35.D" style:family="table-column">
      <style:table-column-properties style:column-width="5.681cm"/>
    </style:style>
    <style:style style:name="Tabla35.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35.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35.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36" style:family="table">
      <style:table-properties style:width="16.185cm" table:align="left"/>
    </style:style>
    <style:style style:name="Tabla36.A" style:family="table-column">
      <style:table-column-properties style:column-width="16.185cm"/>
    </style:style>
    <style:style style:name="Tabla36.A1" style:family="table-cell">
      <style:table-cell-properties style:vertical-align="middle" fo:background-color="#d5ede8" fo:padding-left="0.282cm" fo:padding-right="0.282cm" fo:padding-top="0.176cm" fo:padding-bottom="0.106cm" fo:border="0.6pt solid #cccccc">
        <style:background-image/>
      </style:table-cell-properties>
    </style:style>
    <style:style style:name="Tabla36.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37" style:family="table">
      <style:table-properties style:width="16.185cm" table:align="left"/>
    </style:style>
    <style:style style:name="Tabla37.A" style:family="table-column">
      <style:table-column-properties style:column-width="16.185cm"/>
    </style:style>
    <style:style style:name="Tabla37.A1" style:family="table-cell">
      <style:table-cell-properties style:vertical-align="middle" fo:background-color="#fff3cd" fo:padding-left="0.282cm" fo:padding-right="0.282cm" fo:padding-top="0.176cm" fo:padding-bottom="0.106cm" fo:border="0.6pt solid #cccccc">
        <style:background-image/>
      </style:table-cell-properties>
    </style:style>
    <style:style style:name="Tabla37.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38" style:family="table">
      <style:table-properties style:width="16.185cm" table:align="left"/>
    </style:style>
    <style:style style:name="Tabla38.A" style:family="table-column">
      <style:table-column-properties style:column-width="16.185cm"/>
    </style:style>
    <style:style style:name="Tabla38.A1" style:family="table-cell">
      <style:table-cell-properties style:vertical-align="middle" fo:background-color="#fdecea" fo:padding-left="0.282cm" fo:padding-right="0.282cm" fo:padding-top="0.176cm" fo:padding-bottom="0.106cm" fo:border="0.6pt solid #cccccc">
        <style:background-image/>
      </style:table-cell-properties>
    </style:style>
    <style:style style:name="Tabla38.A2" style:family="table-cell">
      <style:table-cell-properties style:vertical-align="middle" fo:background-color="#ffffff" fo:padding-left="0.282cm" fo:padding-right="0.282cm" fo:padding-top="0.106cm" fo:padding-bottom="0.106cm" fo:border="0.6pt solid #cccccc">
        <style:background-image/>
      </style:table-cell-properties>
    </style:style>
    <style:style style:name="Tabla39" style:family="table">
      <style:table-properties style:width="16.614cm" table:align="left"/>
    </style:style>
    <style:style style:name="Tabla39.A" style:family="table-column">
      <style:table-column-properties style:column-width="3.459cm"/>
    </style:style>
    <style:style style:name="Tabla39.B" style:family="table-column">
      <style:table-column-properties style:column-width="5.046cm"/>
    </style:style>
    <style:style style:name="Tabla39.C" style:family="table-column">
      <style:table-column-properties style:column-width="3.565cm"/>
    </style:style>
    <style:style style:name="Tabla39.D" style:family="table-column">
      <style:table-column-properties style:column-width="4.544cm"/>
    </style:style>
    <style:style style:name="Tabla39.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39.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39.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40" style:family="table">
      <style:table-properties style:width="16.641cm" table:align="left"/>
    </style:style>
    <style:style style:name="Tabla40.A" style:family="table-column">
      <style:table-column-properties style:column-width="5.338cm"/>
    </style:style>
    <style:style style:name="Tabla40.B" style:family="table-column">
      <style:table-column-properties style:column-width="2.85cm"/>
    </style:style>
    <style:style style:name="Tabla40.C" style:family="table-column">
      <style:table-column-properties style:column-width="3.089cm"/>
    </style:style>
    <style:style style:name="Tabla40.D" style:family="table-column">
      <style:table-column-properties style:column-width="5.364cm"/>
    </style:style>
    <style:style style:name="Tabla40.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40.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40.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Tabla41" style:family="table">
      <style:table-properties style:width="16.641cm" table:align="left"/>
    </style:style>
    <style:style style:name="Tabla41.A" style:family="table-column">
      <style:table-column-properties style:column-width="5.073cm"/>
    </style:style>
    <style:style style:name="Tabla41.B" style:family="table-column">
      <style:table-column-properties style:column-width="3.274cm"/>
    </style:style>
    <style:style style:name="Tabla41.C" style:family="table-column">
      <style:table-column-properties style:column-width="3.962cm"/>
    </style:style>
    <style:style style:name="Tabla41.D" style:family="table-column">
      <style:table-column-properties style:column-width="4.332cm"/>
    </style:style>
    <style:style style:name="Tabla41.A1" style:family="table-cell">
      <style:table-cell-properties style:vertical-align="middle" fo:background-color="#d5e8f0" fo:padding-left="0.212cm" fo:padding-right="0.212cm" fo:padding-top="0.141cm" fo:padding-bottom="0.141cm" fo:border="0.6pt solid #cccccc">
        <style:background-image/>
      </style:table-cell-properties>
    </style:style>
    <style:style style:name="Tabla41.A2" style:family="table-cell">
      <style:table-cell-properties style:vertical-align="middle" fo:background-color="#ffffff" fo:padding-left="0.212cm" fo:padding-right="0.212cm" fo:padding-top="0.106cm" fo:padding-bottom="0.106cm" fo:border="0.6pt solid #cccccc">
        <style:background-image/>
      </style:table-cell-properties>
    </style:style>
    <style:style style:name="Tabla41.A3" style:family="table-cell">
      <style:table-cell-properties style:vertical-align="middle" fo:background-color="#f5f5f5" fo:padding-left="0.212cm" fo:padding-right="0.212cm" fo:padding-top="0.106cm" fo:padding-bottom="0.106cm" fo:border="0.6pt solid #cccccc">
        <style:background-image/>
      </style:table-cell-properties>
    </style:style>
    <style:style style:name="P1" style:family="paragraph" style:parent-style-name="Text_20_body">
      <style:paragraph-properties fo:margin-left="0cm" fo:margin-right="0cm" fo:margin-top="2.54cm" fo:margin-bottom="0.212cm" style:contextual-spacing="false" fo:line-height="138%" fo:text-align="center" style:justify-single-word="false" fo:text-indent="0cm" style:auto-text-indent="false" style:writing-mode="lr-tb"/>
      <style:text-properties fo:font-variant="normal" fo:text-transform="none" fo:color="#1f3864" loext:opacity="100%" style:text-line-through-style="none" style:text-line-through-type="none" style:font-name="Arial2" fo:font-size="28pt" fo:font-style="normal" style:text-underline-style="none" fo:font-weight="bold" style:text-blinking="false" fo:background-color="transparent"/>
    </style:style>
    <style:style style:name="P2" style:family="paragraph" style:parent-style-name="Text_20_body">
      <style:paragraph-properties fo:margin-left="0cm" fo:margin-right="0cm" fo:margin-top="0cm" fo:margin-bottom="0.141cm" style:contextual-spacing="false" fo:line-height="138%" fo:text-align="center" style:justify-single-word="false" fo:text-indent="0cm" style:auto-text-indent="false" style:writing-mode="lr-tb"/>
      <style:text-properties fo:font-variant="normal" fo:text-transform="none" fo:color="#2e5f8a" loext:opacity="100%" style:text-line-through-style="none" style:text-line-through-type="none" style:font-name="Arial2" fo:font-size="15pt" fo:font-style="italic" style:text-underline-style="none" fo:font-weight="normal" style:text-blinking="false" fo:background-color="transparent"/>
    </style:style>
    <style:style style:name="P3" style:family="paragraph" style:parent-style-name="Text_20_body">
      <style:paragraph-properties fo:margin-left="0cm" fo:margin-right="0cm" fo:margin-top="0cm" fo:margin-bottom="0.106cm" style:contextual-spacing="false" fo:line-height="138%" fo:text-align="center" style:justify-single-word="false" fo:text-indent="0cm" style:auto-text-indent="false" style:writing-mode="lr-tb"/>
      <style:text-properties fo:font-variant="normal" fo:text-transform="none" fo:color="#444444" loext:opacity="100%" style:text-line-through-style="none" style:text-line-through-type="none" style:font-name="Arial2" fo:font-size="11pt" fo:font-style="normal" style:text-underline-style="none" fo:font-weight="normal" style:text-blinking="false" fo:background-color="transparent"/>
    </style:style>
    <style:style style:name="P4" style:family="paragraph" style:parent-style-name="Text_20_body">
      <style:paragraph-properties fo:margin-left="0cm" fo:margin-right="0cm" fo:margin-top="0.106cm" fo:margin-bottom="2.54cm" style:contextual-spacing="false" fo:line-height="138%" fo:text-align="center" style:justify-single-word="false" fo:text-indent="0cm" style:auto-text-indent="false" style:writing-mode="lr-tb"/>
      <style:text-properties fo:font-variant="normal" fo:text-transform="none" fo:color="#cccccc" loext:opacity="100%" style:text-line-through-style="none" style:text-line-through-type="none" style:font-name="Arial2" fo:font-size="9pt" fo:font-style="normal" style:text-underline-style="none" fo:font-weight="normal" style:text-blinking="false" fo:background-color="transparent"/>
    </style:style>
    <style:style style:name="P5" style:family="paragraph" style:parent-style-name="Text_20_body">
      <style:paragraph-properties fo:margin-left="0cm" fo:margin-right="0cm" fo:margin-top="0.212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6"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1f3864" loext:opacity="100%" style:text-line-through-style="none" style:text-line-through-type="none" style:font-name="Arial2" fo:font-size="11pt" fo:font-style="normal" style:text-underline-style="none" fo:font-weight="bold" style:text-blinking="false" fo:background-color="transparent"/>
    </style:style>
    <style:style style:name="P7"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444444" loext:opacity="100%" style:text-line-through-style="none" style:text-line-through-type="none" style:font-name="Arial2" fo:font-size="10pt" fo:font-style="normal" style:text-underline-style="none" fo:font-weight="normal" style:text-blinking="false" fo:background-color="transparent"/>
    </style:style>
    <style:style style:name="P8" style:family="paragraph" style:parent-style-name="Text_20_body">
      <style:paragraph-properties fo:margin-left="0cm" fo:margin-right="0cm" fo:margin-top="0.353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9" style:family="paragraph" style:parent-style-name="Heading_20_1">
      <style:paragraph-properties fo:margin-left="0cm" fo:margin-right="0cm" fo:margin-top="0.847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23pt" fo:font-style="normal" style:text-underline-style="none" fo:font-weight="bold" style:text-blinking="false" fo:background-color="transparent"/>
    </style:style>
    <style:style style:name="P10" style:family="paragraph" style:parent-style-name="Text_20_body">
      <style:paragraph-properties fo:margin-left="0cm" fo:margin-right="0cm" fo:margin-top="0.106cm" fo:margin-bottom="0.106cm" style:contextual-spacing="false" fo:line-height="138%" fo:text-indent="0cm" style:auto-text-indent="false" style:writing-mode="lr-tb"/>
      <style:text-properties fo:font-variant="normal" fo:text-transform="none" fo:color="#444444" loext:opacity="100%" style:text-line-through-style="none" style:text-line-through-type="none" style:font-name="Arial2" fo:font-size="11pt" fo:font-style="normal" style:text-underline-style="none" fo:font-weight="normal" style:text-blinking="false" fo:background-color="transparent"/>
    </style:style>
    <style:style style:name="P11" style:family="paragraph" style:parent-style-name="Text_20_body">
      <style:paragraph-properties fo:margin-left="0cm" fo:margin-right="0cm" fo:margin-top="0.106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2"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7pt" fo:font-style="normal" style:text-underline-style="none" fo:font-weight="bold" style:text-blinking="false" fo:background-color="transparent"/>
    </style:style>
    <style:style style:name="P13" style:family="paragraph" style:parent-style-name="Text_20_body">
      <style:paragraph-properties fo:margin-left="0cm" fo:margin-right="0cm" fo:margin-top="0.071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4" style:family="paragraph" style:parent-style-name="Text_20_body">
      <style:paragraph-properties fo:margin-left="0cm" fo:margin-right="0cm" fo:margin-top="0.106cm" fo:margin-bottom="0.106cm" style:contextual-spacing="false" fo:line-height="138%" fo:text-indent="0cm" style:auto-text-indent="false" style:writing-mode="lr-tb"/>
      <style:text-properties fo:font-weight="normal"/>
    </style:style>
    <style:style style:name="P15" style:family="paragraph" style:parent-style-name="Text_20_body">
      <style:paragraph-properties fo:margin-left="0cm" fo:margin-right="0cm" fo:margin-top="0.141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6" style:family="paragraph" style:parent-style-name="Text_20_body">
      <style:paragraph-properties fo:margin-left="0.635cm" fo:margin-right="0cm" fo:margin-top="0.141cm" fo:margin-bottom="0.141cm" style:contextual-spacing="false" fo:line-height="138%" fo:text-indent="0cm" style:auto-text-indent="false" style:writing-mode="lr-tb"/>
      <style:text-properties fo:font-variant="normal" fo:text-transform="none" fo:color="#2e5f8a" loext:opacity="100%" style:text-line-through-style="none" style:text-line-through-type="none" style:font-name="Arial2" fo:font-size="10pt" fo:font-style="italic" style:text-underline-style="none" fo:font-weight="normal" style:text-blinking="false" fo:background-color="transparent"/>
    </style:style>
    <style:style style:name="P17"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ffffff" loext:opacity="100%" style:text-line-through-style="none" style:text-line-through-type="none" style:font-name="Arial2" fo:font-size="10pt" fo:font-style="normal" style:text-underline-style="none" fo:font-weight="bold" style:text-blinking="false" fo:background-color="transparent"/>
    </style:style>
    <style:style style:name="P18"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444444" loext:opacity="100%" style:text-line-through-style="none" style:text-line-through-type="none" style:font-name="Arial2" fo:font-size="10pt" fo:font-style="normal" style:text-underline-style="none" fo:font-weight="normal" style:text-blinking="false" fo:background-color="transparent"/>
    </style:style>
    <style:style style:name="P1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0"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f6e56" loext:opacity="100%" style:text-line-through-style="none" style:text-line-through-type="none" style:font-name="Arial2" fo:font-size="11pt" fo:font-style="normal" style:text-underline-style="none" fo:font-weight="bold" style:text-blinking="false" fo:background-color="transparent"/>
    </style:style>
    <style:style style:name="P21" style:family="paragraph" style:parent-style-name="Text_20_body">
      <style:paragraph-properties fo:margin-left="0.988cm" fo:margin-right="0cm" fo:margin-top="0.071cm" fo:margin-bottom="0.071cm" style:contextual-spacing="false" fo:line-height="138%" fo:text-indent="-0.494cm" style:auto-text-indent="false" fo:padding="0cm" fo:border="none" style:writing-mode="lr-tb"/>
    </style:style>
    <style:style style:name="P22"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3pt" fo:font-style="normal" style:text-underline-style="none" fo:font-weight="bold" style:text-blinking="false" fo:background-color="transparent"/>
    </style:style>
    <style:style style:name="P23"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1f3864" loext:opacity="100%" style:text-line-through-style="none" style:text-line-through-type="none" style:font-name="Arial2" fo:font-size="10pt" fo:font-style="normal" style:text-underline-style="none" fo:font-weight="bold" style:text-blinking="false" fo:background-color="transparent"/>
    </style:style>
    <style:style style:name="P24" style:family="paragraph" style:parent-style-name="Text_20_body">
      <style:paragraph-properties fo:margin-left="0cm" fo:margin-right="0cm" fo:margin-top="0.035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5"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1a5c2a" loext:opacity="100%" style:text-line-through-style="none" style:text-line-through-type="none" style:font-name="Arial2" fo:font-size="11pt" fo:font-style="normal" style:text-underline-style="none" fo:font-weight="bold" style:text-blinking="false" fo:background-color="transparent"/>
    </style:style>
    <style:style style:name="P26" style:family="paragraph" style:parent-style-name="Table_20_Contents">
      <style:paragraph-properties fo:margin-left="0cm" fo:margin-right="0cm" fo:margin-top="0cm" fo:margin-bottom="0cm" style:contextual-spacing="false" fo:line-height="138%" fo:text-indent="0cm" style:auto-text-indent="false" style:writing-mode="lr-tb"/>
    </style:style>
    <style:style style:name="P27"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7a4a00" loext:opacity="100%" style:text-line-through-style="none" style:text-line-through-type="none" style:font-name="Arial2" fo:font-size="11pt" fo:font-style="normal" style:text-underline-style="none" fo:font-weight="bold" style:text-blinking="false" fo:background-color="transparent"/>
    </style:style>
    <style:style style:name="P28"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7a1a1a" loext:opacity="100%" style:text-line-through-style="none" style:text-line-through-type="none" style:font-name="Arial2" fo:font-size="11pt" fo:font-style="normal" style:text-underline-style="none" fo:font-weight="bold" style:text-blinking="false" fo:background-color="transparent"/>
    </style:style>
    <style:style style:name="P29"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444444" loext:opacity="100%" style:text-line-through-style="none" style:text-line-through-type="none" style:text-underline-style="none" style:text-blinking="false" fo:background-color="transparent"/>
    </style:style>
    <style:style style:name="P30"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4a2070" loext:opacity="100%" style:text-line-through-style="none" style:text-line-through-type="none" style:font-name="Arial2" fo:font-size="11pt" fo:font-style="normal" style:text-underline-style="none" fo:font-weight="bold" style:text-blinking="false" fo:background-color="transparent"/>
    </style:style>
    <style:style style:name="P31"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2" fo:font-size="9.5pt" fo:font-style="normal" style:text-underline-style="none" fo:font-weight="bold" style:text-blinking="false" fo:background-color="transparent"/>
    </style:style>
    <style:style style:name="P32"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f6e56" loext:opacity="100%" style:text-line-through-style="none" style:text-line-through-type="none" style:font-name="Arial2" fo:font-size="9.5pt" fo:font-style="normal" style:text-underline-style="none" fo:font-weight="bold" style:text-blinking="false" fo:background-color="transparent"/>
    </style:style>
    <style:style style:name="P33"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444444" loext:opacity="100%" style:text-line-through-style="none" style:text-line-through-type="none" style:font-name="Arial2" fo:font-size="9.5pt" fo:font-style="normal" style:text-underline-style="none" fo:font-weight="normal" style:text-blinking="false" fo:background-color="transparent"/>
    </style:style>
    <style:style style:name="P34"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7a4a00" loext:opacity="100%" style:text-line-through-style="none" style:text-line-through-type="none" style:font-name="Arial2" fo:font-size="9.5pt" fo:font-style="normal" style:text-underline-style="none" fo:font-weight="bold" style:text-blinking="false" fo:background-color="transparent"/>
    </style:style>
    <style:style style:name="P35"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7a1a1a" loext:opacity="100%" style:text-line-through-style="none" style:text-line-through-type="none" style:font-name="Arial2" fo:font-size="9.5pt" fo:font-style="normal" style:text-underline-style="none" fo:font-weight="bold" style:text-blinking="false" fo:background-color="transparent"/>
    </style:style>
    <style:style style:name="P36"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4a2070" loext:opacity="100%" style:text-line-through-style="none" style:text-line-through-type="none" style:font-name="Arial2" fo:font-size="9.5pt" fo:font-style="normal" style:text-underline-style="none" fo:font-weight="bold" style:text-blinking="false" fo:background-color="transparent"/>
    </style:style>
    <style:style style:name="P37" style:family="paragraph" style:parent-style-name="Text_20_body">
      <style:paragraph-properties fo:margin-left="0cm" fo:margin-right="0cm" fo:margin-top="0.212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8" style:family="paragraph" style:parent-style-name="Text_20_body">
      <style:paragraph-properties fo:margin-left="0cm" fo:margin-right="0cm" fo:margin-top="0.212cm" fo:margin-bottom="0.106cm" style:contextual-spacing="false" fo:line-height="138%" fo:text-align="center" style:justify-single-word="false" fo:text-indent="0cm" style:auto-text-indent="false" style:writing-mode="lr-tb"/>
      <style:text-properties fo:font-variant="normal" fo:text-transform="none" fo:color="#cccccc" loext:opacity="100%" style:text-line-through-style="none" style:text-line-through-type="none" style:font-name="Arial2" fo:font-size="9pt" fo:font-style="italic" style:text-underline-style="none" fo:font-weight="normal" style:text-blinking="false" fo:background-color="transparent"/>
    </style:style>
    <style:style style:name="T1" style:family="text">
      <style:text-properties fo:font-variant="normal" fo:text-transform="none" fo:color="#444444" loext:opacity="100%" style:text-line-through-style="none" style:text-line-through-type="none" style:font-name="Arial2" fo:font-size="11pt" fo:font-style="normal" style:text-underline-style="none" fo:font-weight="bold" style:text-blinking="false" fo:background-color="transparent" loext:char-shading-value="0"/>
    </style:style>
    <style:style style:name="T2" style:family="text">
      <style:text-properties fo:font-variant="normal" fo:text-transform="none" fo:color="#444444" loext:opacity="100%" style:text-line-through-style="none" style:text-line-through-type="none" style:font-name="Arial2" fo:font-size="11pt"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444444"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5" style:family="text">
      <style:text-properties fo:font-variant="normal" fo:text-transform="none" fo:color="#444444" loext:opacity="100%" style:text-line-through-style="none" style:text-line-through-type="none" style:font-name="Arial2" fo:font-size="10pt" fo:font-style="normal" style:text-underline-style="none" fo:font-weight="normal" style:text-blinking="false" fo:background-color="transparent" loext:char-shading-value="0"/>
    </style:style>
    <style:style style:name="T6" style:family="text">
      <style:text-properties fo:font-variant="normal" fo:text-transform="none" fo:color="#444444" loext:opacity="100%" style:text-line-through-style="none" style:text-line-through-type="none" style:text-underline-style="none" style:text-blinking="false" fo:background-color="transparent" loext:char-shading-value="0"/>
    </style:style>
    <style:style style:name="T7"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5ac1f09-7fff-8013-7e04-d3b9b929bc0a"/>PROYECTO GENOS</text:p>
      <text:p text:style-name="P2">Documento Maestro de Especificaciones Economicas</text:p>
      <text:p text:style-name="P3">Motor PvE  ·  Reactor de Fusion  ·  Ciclo del Jugador F2P  ·  Ecosistema Web3</text:p>
      <text:p text:style-name="P4">Version 1.4  |  Documento consolidado y definitivo  |  Confidencial</text:p>
      <text:p text:style-name="P5"> </text:p>
      <table:table table:name="Tabla1" table:style-name="Tabla1">
        <table:table-column table:style-name="Tabla1.A"/>
        <table:table-row>
          <table:table-cell table:style-name="Tabla1.A1" office:value-type="string">
            <text:p text:style-name="P6">Alcance de este documento</text:p>
          </table:table-cell>
        </table:table-row>
        <table:table-row>
          <table:table-cell table:style-name="Tabla1.A2" office:value-type="string">
            <text:p text:style-name="P7">Este documento unifica y consolida todos los documentos economicos anteriores de Proyecto Genos.</text:p>
          </table:table-cell>
        </table:table-row>
        <table:table-row>
          <table:table-cell table:style-name="Tabla1.A2" office:value-type="string">
            <text:p text:style-name="P7">Cubre: arquitectura y escala de la moneda EV, principios psicologicos del sistema de recompensas,</text:p>
          </table:table-cell>
        </table:table-row>
        <table:table-row>
          <table:table-cell table:style-name="Tabla1.A2" office:value-type="string">
            <text:p text:style-name="P7">todas las fuentes de ingreso PvE, logistica de crianza y almacen, el Reactor de Fusion con sus</text:p>
          </table:table-cell>
        </table:table-row>
        <table:table-row>
          <table:table-cell table:style-name="Tabla1.A2" office:value-type="string">
            <text:p text:style-name="P7">probabilidades completas, los sistemas de retencion, el Pase de Batalla, el ecosistema Web3 de</text:p>
          </table:table-cell>
        </table:table-row>
        <table:table-row>
          <table:table-cell table:style-name="Tabla1.A2" office:value-type="string">
            <text:p text:style-name="P7">encapsulacion de EV, y la auditoria matematica del ciclo de vida del jugador F2P.</text:p>
          </table:table-cell>
        </table:table-row>
        <table:table-row>
          <table:table-cell table:style-name="Tabla1.A2" office:value-type="string">
            <text:p text:style-name="P7">Sirve como manual tecnico de referencia para el equipo de desarrollo (Supabase, backend, smart contracts).</text:p>
          </table:table-cell>
        </table:table-row>
      </table:table>
      <text:p text:style-name="P8"> </text:p>
      <text:h text:style-name="P9" text:outline-level="1">Seccion 1 — Filosofia de escala matematica y arquitectura de la moneda EV</text:h>
      <text:p text:style-name="P5"> </text:p>
      <text:p text:style-name="P10">La Esencia Vital (EV) es la moneda interna y universal de Proyecto Genos. Toda la economia del juego utiliza una escala uniforme de multiplicacion por 100 sobre los valores base originales. Esta decision no es estetica: tiene un fundamento psicologico, matematico y de negocio preciso.</text:p>
      <text:p text:style-name="P11"> </text:p>
      <text:h text:style-name="P12" text:outline-level="2"><text:soft-page-break/>1.1  Los tres principios psicoeconomicos de la escala x100</text:h>
      <text:p text:style-name="P13"> </text:p>
      <text:p text:style-name="P14"><text:span text:style-name="T1">Principio 1 — Eliminacion de decimales: </text:span><text:span text:style-name="T2">El cerebro humano procesa los numeros enteros grandes como botines de guerra reales. Ganar 250 EV activa el mismo circuito de recompensa que ganar una cantidad sustancial. Acumular 2.5 EV genera percepcion de miseria y lentitud, lo que reduce la retencion.</text:span></text:p>
      <text:p text:style-name="P13"> </text:p>
      <text:p text:style-name="P14"><text:span text:style-name="T1">Principio 2 — Percepcion de inversion fuerte: </text:span><text:span text:style-name="T2">Un coste de 10,000 EV para aprender un ataque Definitivo en el Dojo comunica inmediatamente que el jugador esta adquiriendo un activo de alto valor estrategico que requiere dedicacion real. El mismo coste en 100 EV parece trivial y erosiona la sensacion de logro.</text:span></text:p>
      <text:p text:style-name="P13"> </text:p>
      <text:p text:style-name="P14"><text:span text:style-name="T1">Principio 3 — Granularidad de recompensa: </text:span><text:span text:style-name="T2">Trabajar con cientos y miles permite aplicar micro-bonificaciones por rendimiento excelente (combos perfectos, rachas, ventajas elementales, velocidad en misiones) sin romper la macroeconomia ni forzar al backend a manejar decimales.</text:span></text:p>
      <text:p text:style-name="P15"> </text:p>
      <text:h text:style-name="P12" text:outline-level="2">1.2  Ratio de Retorno de Sumideros (RORS)</text:h>
      <text:p text:style-name="P10">El equilibrio macroeconomico del juego esta blindado en un RORS de 0.81. Esto significa que por cada unidad de EV que el sistema genera y pone en circulacion, el conjunto de sumideros (sinks) diseados absorbe el 81% de vuelta. El 19% restante se acumula de forma natural en las cuentas de los jugadores, generando una inflacion controlada y gradual que no compromete el valor percibido de la moneda.</text:p>
      <text:p text:style-name="P16">El RORS no cambia al aplicar la escala x100 porque multiplica tanto los ingresos como los sumideros por el mismo factor. El equilibrio matematico subyacente es identico; solo cambia la percepcion psicologica del jugador.</text:p>
      <text:p text:style-name="P15"> </text:p>
      <text:h text:style-name="P12" text:outline-level="2">1.3  Tabla comparativa de escala: ingresos</text:h>
      <text:p text:style-name="P10">La siguiente tabla muestra todos los valores de ingreso en EV antes y despues de aplicar la escala x100, con su fuente exacta dentro del juego:</text:p>
      <text:p text:style-name="P13"> </text:p>
      <table:table table:name="Tabla2" table:style-name="Tabla2">
        <table:table-column table:style-name="Tabla2.A"/>
        <table:table-column table:style-name="Tabla2.B"/>
        <table:table-column table:style-name="Tabla2.C"/>
        <table:table-row>
          <table:table-cell table:style-name="Tabla2.A1" office:value-type="string">
            <text:p text:style-name="P17">Accion de juego (fuente de ingreso)</text:p>
          </table:table-cell>
          <table:table-cell table:style-name="Tabla2.A1" office:value-type="string">
            <text:p text:style-name="P17">EV original (base)</text:p>
          </table:table-cell>
          <table:table-cell table:style-name="Tabla2.A1" office:value-type="string">
            <text:p text:style-name="P17">EV nuevo (x100)</text:p>
          </table:table-cell>
        </table:table-row>
        <table:table-row>
          <table:table-cell table:style-name="Tabla2.A2" office:value-type="string">
            <text:p text:style-name="P18">Victoria en Liga Bronce (PvP)</text:p>
          </table:table-cell>
          <table:table-cell table:style-name="Tabla2.A2" office:value-type="string">
            <text:p text:style-name="P18">2 EV</text:p>
          </table:table-cell>
          <table:table-cell table:style-name="Tabla2.A2" office:value-type="string">
            <text:p text:style-name="P18">200 EV</text:p>
          </table:table-cell>
        </table:table-row>
        <table:table-row>
          <table:table-cell table:style-name="Tabla2.A3" office:value-type="string">
            <text:p text:style-name="P18">Victoria en Liga Diamante (PvP)</text:p>
          </table:table-cell>
          <table:table-cell table:style-name="Tabla2.A3" office:value-type="string">
            <text:p text:style-name="P18">5 EV</text:p>
          </table:table-cell>
          <table:table-cell table:style-name="Tabla2.A3" office:value-type="string">
            <text:p text:style-name="P18">500 EV</text:p>
          </table:table-cell>
        </table:table-row>
        <text:soft-page-break/>
        <table:table-row>
          <table:table-cell table:style-name="Tabla2.A2" office:value-type="string">
            <text:p text:style-name="P18">Derrota en Liga (PvP)</text:p>
          </table:table-cell>
          <table:table-cell table:style-name="Tabla2.A2" office:value-type="string">
            <text:p text:style-name="P18">0.5 EV</text:p>
          </table:table-cell>
          <table:table-cell table:style-name="Tabla2.A2" office:value-type="string">
            <text:p text:style-name="P18">50 EV</text:p>
          </table:table-cell>
        </table:table-row>
        <table:table-row>
          <table:table-cell table:style-name="Tabla2.A3" office:value-type="string">
            <text:p text:style-name="P18">Cuidado diario por Geno (cap 3 activos)</text:p>
          </table:table-cell>
          <table:table-cell table:style-name="Tabla2.A3" office:value-type="string">
            <text:p text:style-name="P18">0.5 EV</text:p>
          </table:table-cell>
          <table:table-cell table:style-name="Tabla2.A3" office:value-type="string">
            <text:p text:style-name="P18">50 EV</text:p>
          </table:table-cell>
        </table:table-row>
        <table:table-row>
          <table:table-cell table:style-name="Tabla2.A2" office:value-type="string">
            <text:p text:style-name="P18">Victoria estandar en Arcade (media)</text:p>
          </table:table-cell>
          <table:table-cell table:style-name="Tabla2.A2" office:value-type="string">
            <text:p text:style-name="P18">1.5 EV</text:p>
          </table:table-cell>
          <table:table-cell table:style-name="Tabla2.A2" office:value-type="string">
            <text:p text:style-name="P18">150 EV</text:p>
          </table:table-cell>
        </table:table-row>
        <table:table-row>
          <table:table-cell table:style-name="Tabla2.A3" office:value-type="string">
            <text:p text:style-name="P18">Combate en Torre PvE (pisos iniciales)</text:p>
          </table:table-cell>
          <table:table-cell table:style-name="Tabla2.A3" office:value-type="string">
            <text:p text:style-name="P18">1-2 EV</text:p>
          </table:table-cell>
          <table:table-cell table:style-name="Tabla2.A3" office:value-type="string">
            <text:p text:style-name="P18">100-200 EV</text:p>
          </table:table-cell>
        </table:table-row>
        <table:table-row>
          <table:table-cell table:style-name="Tabla2.A2" office:value-type="string">
            <text:p text:style-name="P18">Santuario Comun</text:p>
          </table:table-cell>
          <table:table-cell table:style-name="Tabla2.A2" office:value-type="string">
            <text:p text:style-name="P18">3 EV</text:p>
          </table:table-cell>
          <table:table-cell table:style-name="Tabla2.A2" office:value-type="string">
            <text:p text:style-name="P18">300 EV</text:p>
          </table:table-cell>
        </table:table-row>
        <table:table-row>
          <table:table-cell table:style-name="Tabla2.A3" office:value-type="string">
            <text:p text:style-name="P18">Santuario Legendario</text:p>
          </table:table-cell>
          <table:table-cell table:style-name="Tabla2.A3" office:value-type="string">
            <text:p text:style-name="P18">50 EV</text:p>
          </table:table-cell>
          <table:table-cell table:style-name="Tabla2.A3" office:value-type="string">
            <text:p text:style-name="P18">5,000 EV</text:p>
          </table:table-cell>
        </table:table-row>
        <table:table-row>
          <table:table-cell table:style-name="Tabla2.A2" office:value-type="string">
            <text:p text:style-name="P18">Torneo Tematico (1er lugar)</text:p>
          </table:table-cell>
          <table:table-cell table:style-name="Tabla2.A2" office:value-type="string">
            <text:p text:style-name="P18">40-500 EV</text:p>
          </table:table-cell>
          <table:table-cell table:style-name="Tabla2.A2" office:value-type="string">
            <text:p text:style-name="P18">4,000-50,000 EV</text:p>
          </table:table-cell>
        </table:table-row>
      </table:table>
      <text:p text:style-name="P15"> </text:p>
      <text:h text:style-name="P12" text:outline-level="2">1.4  Tabla comparativa de escala: sumideros (sinks)</text:h>
      <text:p text:style-name="P10">Los sumideros son los mecanismos que retiran EV de circulacion, controlando la inflacion de forma organica:</text:p>
      <text:p text:style-name="P13"> </text:p>
      <table:table table:name="Tabla3" table:style-name="Tabla3">
        <table:table-column table:style-name="Tabla3.A"/>
        <table:table-column table:style-name="Tabla3.B"/>
        <table:table-column table:style-name="Tabla3.C"/>
        <table:table-row>
          <table:table-cell table:style-name="Tabla3.A1" office:value-type="string">
            <text:p text:style-name="P17">Mecanica de consumo (sink)</text:p>
          </table:table-cell>
          <table:table-cell table:style-name="Tabla3.A1" office:value-type="string">
            <text:p text:style-name="P17">EV original (base)</text:p>
          </table:table-cell>
          <table:table-cell table:style-name="Tabla3.A1" office:value-type="string">
            <text:p text:style-name="P17">EV nuevo (x100)</text:p>
          </table:table-cell>
        </table:table-row>
        <table:table-row>
          <table:table-cell table:style-name="Tabla3.A2" office:value-type="string">
            <text:p text:style-name="P18">Activacion Reactor Nivel 1 (Comun a Raro)</text:p>
          </table:table-cell>
          <table:table-cell table:style-name="Tabla3.A2" office:value-type="string">
            <text:p text:style-name="P18">50 EV</text:p>
          </table:table-cell>
          <table:table-cell table:style-name="Tabla3.A2" office:value-type="string">
            <text:p text:style-name="P18">5,000 EV</text:p>
          </table:table-cell>
        </table:table-row>
        <table:table-row>
          <table:table-cell table:style-name="Tabla3.A3" office:value-type="string">
            <text:p text:style-name="P18">Activacion Reactor Nivel 2 (Raro a Epico)</text:p>
          </table:table-cell>
          <table:table-cell table:style-name="Tabla3.A3" office:value-type="string">
            <text:p text:style-name="P18">150 EV</text:p>
          </table:table-cell>
          <table:table-cell table:style-name="Tabla3.A3" office:value-type="string">
            <text:p text:style-name="P18">15,000 EV</text:p>
          </table:table-cell>
        </table:table-row>
        <table:table-row>
          <table:table-cell table:style-name="Tabla3.A2" office:value-type="string">
            <text:p text:style-name="P18">Activacion Reactor Nivel 3 (Epico a Legendario)</text:p>
          </table:table-cell>
          <table:table-cell table:style-name="Tabla3.A2" office:value-type="string">
            <text:p text:style-name="P18">300 EV</text:p>
          </table:table-cell>
          <table:table-cell table:style-name="Tabla3.A2" office:value-type="string">
            <text:p text:style-name="P18">30,000 EV</text:p>
          </table:table-cell>
        </table:table-row>
        <table:table-row>
          <table:table-cell table:style-name="Tabla3.A3" office:value-type="string">
            <text:p text:style-name="P18">Dojo: aprender Ataque Basico</text:p>
          </table:table-cell>
          <table:table-cell table:style-name="Tabla3.A3" office:value-type="string">
            <text:p text:style-name="P18">10 EV</text:p>
          </table:table-cell>
          <table:table-cell table:style-name="Tabla3.A3" office:value-type="string">
            <text:p text:style-name="P18">1,000 EV</text:p>
          </table:table-cell>
        </table:table-row>
        <table:table-row>
          <table:table-cell table:style-name="Tabla3.A2" office:value-type="string">
            <text:p text:style-name="P18">Dojo: aprender Ataque Especial (Slot 2)</text:p>
          </table:table-cell>
          <table:table-cell table:style-name="Tabla3.A2" office:value-type="string">
            <text:p text:style-name="P18">40 EV</text:p>
          </table:table-cell>
          <table:table-cell table:style-name="Tabla3.A2" office:value-type="string">
            <text:p text:style-name="P18">4,000 EV</text:p>
          </table:table-cell>
        </table:table-row>
        <table:table-row>
          <table:table-cell table:style-name="Tabla3.A3" office:value-type="string">
            <text:p text:style-name="P18">Dojo: aprender Ataque Definitivo (Slot 3)</text:p>
          </table:table-cell>
          <table:table-cell table:style-name="Tabla3.A3" office:value-type="string">
            <text:p text:style-name="P18">100 EV</text:p>
          </table:table-cell>
          <table:table-cell table:style-name="Tabla3.A3" office:value-type="string">
            <text:p text:style-name="P18">10,000 EV</text:p>
          </table:table-cell>
        </table:table-row>
        <table:table-row>
          <table:table-cell table:style-name="Tabla3.A2" office:value-type="string">
            <text:p text:style-name="P18">Escaner de ADN Basico</text:p>
          </table:table-cell>
          <table:table-cell table:style-name="Tabla3.A2" office:value-type="string">
            <text:p text:style-name="P18">15 EV</text:p>
          </table:table-cell>
          <table:table-cell table:style-name="Tabla3.A2" office:value-type="string">
            <text:p text:style-name="P18">1,500 EV</text:p>
          </table:table-cell>
        </table:table-row>
        <table:table-row>
          <table:table-cell table:style-name="Tabla3.A3" office:value-type="string">
            <text:p text:style-name="P18">Escaner de ADN Completo</text:p>
          </table:table-cell>
          <table:table-cell table:style-name="Tabla3.A3" office:value-type="string">
            <text:p text:style-name="P18">50 EV</text:p>
          </table:table-cell>
          <table:table-cell table:style-name="Tabla3.A3" office:value-type="string">
            <text:p text:style-name="P18">5,000 EV</text:p>
          </table:table-cell>
        </table:table-row>
        <table:table-row>
          <table:table-cell table:style-name="Tabla3.A2" office:value-type="string">
            <text:p text:style-name="P18">Recarga de Energia de un Geno</text:p>
          </table:table-cell>
          <table:table-cell table:style-name="Tabla3.A2" office:value-type="string">
            <text:p text:style-name="P18">20 EV</text:p>
          </table:table-cell>
          <table:table-cell table:style-name="Tabla3.A2" office:value-type="string">
            <text:p text:style-name="P18">2,000 EV</text:p>
          </table:table-cell>
        </table:table-row>
        <table:table-row>
          <table:table-cell table:style-name="Tabla3.A3" office:value-type="string">
            <text:p text:style-name="P18">Licencia de Comercio Web3 (Bazar Nv.5)</text:p>
          </table:table-cell>
          <table:table-cell table:style-name="Tabla3.A3" office:value-type="string">
            <text:p text:style-name="P18">30 EV</text:p>
          </table:table-cell>
          <table:table-cell table:style-name="Tabla3.A3" office:value-type="string">
            <text:p text:style-name="P18">3,000 EV</text:p>
          </table:table-cell>
        </table:table-row>
        <table:table-row>
          <table:table-cell table:style-name="Tabla3.A2" office:value-type="string">
            <text:p text:style-name="P18">Entrada a Torneo Tematico</text:p>
          </table:table-cell>
          <table:table-cell table:style-name="Tabla3.A2" office:value-type="string">
            <text:p text:style-name="P18">5-200 EV</text:p>
          </table:table-cell>
          <table:table-cell table:style-name="Tabla3.A2" office:value-type="string">
            <text:p text:style-name="P18">500-20,000 EV</text:p>
          </table:table-cell>
        </table:table-row>
        <table:table-row>
          <table:table-cell table:style-name="Tabla3.A3" office:value-type="string">
            <text:p text:style-name="P18">Incubadora Basica (eclosion 4 horas)</text:p>
          </table:table-cell>
          <table:table-cell table:style-name="Tabla3.A3" office:value-type="string">
            <text:p text:style-name="P18">10 EV</text:p>
          </table:table-cell>
          <table:table-cell table:style-name="Tabla3.A3" office:value-type="string">
            <text:p text:style-name="P18">1,000 EV</text:p>
          </table:table-cell>
        </table:table-row>
        <table:table-row>
          <table:table-cell table:style-name="Tabla3.A2" office:value-type="string">
            <text:p text:style-name="P18">Ranura de almacen N.7</text:p>
          </table:table-cell>
          <table:table-cell table:style-name="Tabla3.A2" office:value-type="string">
            <text:p text:style-name="P18">15 EV</text:p>
          </table:table-cell>
          <table:table-cell table:style-name="Tabla3.A2" office:value-type="string">
            <text:p text:style-name="P18">1,500 EV</text:p>
          </table:table-cell>
        </table:table-row>
        <table:table-row>
          <table:table-cell table:style-name="Tabla3.A3" office:value-type="string">
            <text:p text:style-name="P18">Ranura de almacen N.8</text:p>
          </table:table-cell>
          <table:table-cell table:style-name="Tabla3.A3" office:value-type="string">
            <text:p text:style-name="P18">30 EV</text:p>
          </table:table-cell>
          <table:table-cell table:style-name="Tabla3.A3" office:value-type="string">
            <text:p text:style-name="P18">3,000 EV</text:p>
          </table:table-cell>
        </table:table-row>
      </table:table>
      <text:p text:style-name="P8"> </text:p>
      <text:p text:style-name="Text_20_body"/>
      <text:p text:style-name="P19"> </text:p>
      <text:h text:style-name="P9" text:outline-level="1"><text:soft-page-break/>Seccion 2 — Limites del sistema: Energia Nexo y cap diario</text:h>
      <text:p text:style-name="P5"> </text:p>
      <text:p text:style-name="P10">La contencion de la inflacion de la moneda EV se gestiona de forma automatizada mediante dos variables estructurales en el backend. Este disenyo evita bloquear pantallas de forma antipática para el jugador: el propio ritmo de juego actua como regulador natural.</text:p>
      <text:p text:style-name="P15"> </text:p>
      <text:h text:style-name="P12" text:outline-level="2">2.1  El embudo de la Energia Nexo</text:h>
      <table:table table:name="Tabla4" table:style-name="Tabla4">
        <table:table-column table:style-name="Tabla4.A"/>
        <table:table-row>
          <table:table-cell table:style-name="Tabla4.A1" office:value-type="string">
            <text:p text:style-name="P20">Parametros tecnicos de la Energia Nexo</text:p>
          </table:table-cell>
        </table:table-row>
        <table:table-row>
          <table:table-cell table:style-name="Tabla4.A2" office:value-type="string">
            <text:p text:style-name="P7">Capacidad maxima de la cuenta: 100 puntos de Energia Nexo (inmutable).</text:p>
          </table:table-cell>
        </table:table-row>
        <table:table-row>
          <table:table-cell table:style-name="Tabla4.A2" office:value-type="string">
            <text:p text:style-name="P7">Tasa de regeneracion pasiva: 1 punto cada 12 minutos = 5 puntos por hora.</text:p>
          </table:table-cell>
        </table:table-row>
        <table:table-row>
          <table:table-cell table:style-name="Tabla4.A2" office:value-type="string">
            <text:p text:style-name="P7">Recarga completa de 0 a 100: requiere exactamente 20 horas de tiempo real.</text:p>
          </table:table-cell>
        </table:table-row>
        <table:table-row>
          <table:table-cell table:style-name="Tabla4.A2" office:value-type="string">
            <text:p text:style-name="P7">Coste por Arcade: 5 Energia Nexo por partida.</text:p>
          </table:table-cell>
        </table:table-row>
        <table:table-row>
          <table:table-cell table:style-name="Tabla4.A2" office:value-type="string">
            <text:p text:style-name="P7">Coste por Coliseo estandar o Torre: 10 Energia Nexo por combate o ticket.</text:p>
          </table:table-cell>
        </table:table-row>
      </table:table>
      <text:p text:style-name="P11"> </text:p>
      <text:p text:style-name="P10">Al estar todas las actividades generadoras de EV ligadas a un coste de Energia Nexo, el tiempo actua como el regulador automatico de la base de datos. Un jugador hardcore que optimice sus sesiones en un ciclo completo de 24 horas jamas podra generar mas de 5,000 a 6,000 EV al dia mediante juego activo. Este es el Soft Cap natural del sistema.</text:p>
      <text:p text:style-name="P15"> </text:p>
      <text:h text:style-name="P12" text:outline-level="2">2.2  Blindaje del Cuidado Diario (colecciones grandes)</text:h>
      <text:p text:style-name="P10">El juego fomenta que los jugadores expandan su inventario y almacenen grandes cantidades de Genos esperando ser sacrificados en el Reactor. Sin una limitacion especifica, un jugador con 20 o 30 Genos podria usar su coleccion como una granja pasiva de clics automaticos, rompiendo la economia.</text:p>
      <text:p text:style-name="P11"> </text:p>
      <text:p text:style-name="P14"><text:span text:style-name="T1">Regla del Cap Diario de Cuidado (Account-wide EV Cap): </text:span><text:span text:style-name="T2">Una cuenta solo puede extraer un maximo de 150 EV al dia mediante las interacciones del Centro de Cuidado (Alimentacion, Higiene, Caricias). Esto equivale exactamente al pago de cuidar a 3 Genos Activos (50 EV por criatura).</text:span></text:p>
      <text:p text:style-name="P13"><text:soft-page-break/> </text:p>
      <text:p text:style-name="P14"><text:span text:style-name="T1">Logica del Baul de Reserva: </text:span><text:span text:style-name="T2">Los Genos almacenados en las ranuras de reserva reducen sus necesidades fisicas 5 veces mas despacio. El jugador puede interactuar con ellos para cuidar su higiene y alimentarlos (requisito para que esten sanos al fusionarse en el Reactor), pero una vez que el contador global de la cuenta llega a 150 EV diarios, el sistema actualiza sus estadisticas de salud pero devuelve 0 EV, mostrando el aviso en pantalla: +0 EV (Limite diario alcanzado).</text:span></text:p>
      <text:p text:style-name="P8"> </text:p>
      <text:p text:style-name="Text_20_body"/>
      <text:p text:style-name="P19"> </text:p>
      <text:h text:style-name="P9" text:outline-level="1">Seccion 3 — Catalogo tecnico de minijuegos (Arcade)</text:h>
      <text:p text:style-name="P5"> </text:p>
      <text:p text:style-name="P10">El Arcade es el entorno libre de riesgo competitivo donde el jugador convierte su Energia Nexo y su habilidad manual en EV. Es la fuente de ingreso mas accesible del juego y la principal puerta de entrada para jugadores F2P. Todas las modalidades estan calibradas para que una partida exitosa rinda una media estandar de aproximadamente 150 EV a cambio de 5 puntos de Energia Nexo.</text:p>
      <text:p text:style-name="P15"> </text:p>
      <table:table table:name="Tabla5" table:style-name="Tabla5">
        <table:table-column table:style-name="Tabla5.A"/>
        <table:table-row>
          <table:table-cell table:style-name="Tabla5.A1" office:value-type="string">
            <text:p text:style-name="P6">Parametros globales del Arcade</text:p>
          </table:table-cell>
        </table:table-row>
        <table:table-row>
          <table:table-cell table:style-name="Tabla5.A2" office:value-type="string">
            <text:p text:style-name="P7">Coste de entrada: 5 Energia Nexo por partida (cualquier modalidad).</text:p>
          </table:table-cell>
        </table:table-row>
        <table:table-row>
          <table:table-cell table:style-name="Tabla5.A2" office:value-type="string">
            <text:p text:style-name="P7">Duracion media por partida: 30 a 45 segundos de juego activo.</text:p>
          </table:table-cell>
        </table:table-row>
        <table:table-row>
          <table:table-cell table:style-name="Tabla5.A2" office:value-type="string">
            <text:p text:style-name="P7">Recompensa media calibrada: ~150 EV por partida exitosa.</text:p>
          </table:table-cell>
        </table:table-row>
        <table:table-row>
          <table:table-cell table:style-name="Tabla5.A2" office:value-type="string">
            <text:p text:style-name="P7">Paridad energetica: 2 partidas de Arcade = 1 combate en el Coliseo (en energia y recompensa).</text:p>
          </table:table-cell>
        </table:table-row>
      </table:table>
      <text:p text:style-name="P15"> </text:p>
      <text:h text:style-name="P12" text:outline-level="2">3.1  Lluvia de Manzanas</text:h>
      <text:p text:style-name="P21"><text:span text:style-name="T3">•      </text:span><text:span text:style-name="T4">Mecanica: Manzanas y amenazas caen verticalmente desde la parte superior de la pantalla. El jugador desplaza a su Geno lateralmente para atraparlas y esquivar las bombas.</text:span></text:p>
      <text:p text:style-name="P21"><text:span text:style-name="T3">•      </text:span><text:span text:style-name="T4">Sistema de 3 vidas: el jugador comienza con 3 puntos de vida. Pierde una vida si una manzana toca el suelo sin ser atrapada, o si recoge una Bomba de forma accidental. La partida termina al llegar a 0 vidas.</text:span></text:p>
      <text:p text:style-name="P13"><text:soft-page-break/> </text:p>
      <text:h text:style-name="P22" text:outline-level="3">Curva de velocidad exponencial</text:h>
      <text:p text:style-name="P21"><text:span text:style-name="T3">•      </text:span><text:span text:style-name="T4">Segundos 0 a 30: ritmo asequible y constante. El jugador aprende el patron.</text:span></text:p>
      <text:p text:style-name="P21"><text:span text:style-name="T3">•      </text:span><text:span text:style-name="T4">Segundo 30: la velocidad de caida de todos los objetos aumenta un 50% de forma brusca.</text:span></text:p>
      <text:p text:style-name="P21"><text:span text:style-name="T3">•      </text:span><text:span text:style-name="T4">Segundo 45: la velocidad aumenta otro 100% adicional, haciendo fisicamente imposible prolongar la partida de forma indefinida.</text:span></text:p>
      <text:p text:style-name="P21"><text:span text:style-name="T3">•      </text:span><text:span text:style-name="T4">Este sistema garantiza que incluso el jugador experto no pueda farmear EV infinitamente en una sola partida.</text:span></text:p>
      <text:p text:style-name="P13"> </text:p>
      <text:h text:style-name="P22" text:outline-level="3">Sistema de recompensas</text:h>
      <text:p text:style-name="P21"><text:span text:style-name="T3">•      </text:span><text:span text:style-name="T4">Monedas de EV flotantes: caen aleatoriamente durante la partida. Valor: +5 EV (moneda pequena) y +10 EV (moneda grande).</text:span></text:p>
      <text:p text:style-name="P21"><text:span text:style-name="T3">•      </text:span><text:span text:style-name="T4">Conversion de Alimento (sumidero circular): el juego cuenta las manzanas biologicas atrapadas. Por cada 5 manzanas normales recolectadas, se inyecta automaticamente 1 Manzana de Alimento en el inventario global de la mochila del jugador (ratio 5:1).</text:span></text:p>
      <text:p text:style-name="P13"> </text:p>
      <text:h text:style-name="P22" text:outline-level="3">Rendimiento esperado</text:h>
      <text:p text:style-name="P21"><text:span text:style-name="T3">•      </text:span><text:span text:style-name="T4">Jugador promedio: dura hasta el segundo 30-35 y extrae entre 120 y 150 EV por partida.</text:span></text:p>
      <text:p text:style-name="P21"><text:span text:style-name="T3">•      </text:span><text:span text:style-name="T4">Jugador experto: estira sus reflejos hasta el segundo 50 y puede extraer hasta 250 EV por partida.</text:span></text:p>
      <text:p text:style-name="P15"> </text:p>
      <text:h text:style-name="P12" text:outline-level="2">3.2  Flappy Geno</text:h>
      <text:p text:style-name="P21"><text:span text:style-name="T3">•      </text:span><text:span text:style-name="T4">Mecanica: control de salto de un boton para hacer levitar al Geno a traves de los huecos vacios de tuberias en movimiento horizontal constante.</text:span></text:p>
      <text:p text:style-name="P21"><text:span text:style-name="T3">•      </text:span><text:span text:style-name="T4">La EV esta fisicamente suspendida en el centro de los huecos de los tubos, obligando al jugador a arriesgar su posicion para recogerla.</text:span></text:p>
      <text:p text:style-name="P13"> </text:p>
      <text:h text:style-name="P22" text:outline-level="3">Algoritmo de recompensas en cascada</text:h>
      <text:p text:style-name="P10">El valor del EV se incrementa con la distancia recorrida para premiar la supervivencia extrema:</text:p>
      <text:p text:style-name="P13"> </text:p>
      <table:table table:name="Tabla6" table:style-name="Tabla6">
        <table:table-column table:style-name="Tabla6.A"/>
        <table:table-column table:style-name="Tabla6.B"/>
        <table:table-column table:style-name="Tabla6.C"/>
        <table:table-column table:style-name="Tabla6.D"/>
        <text:soft-page-break/>
        <table:table-row>
          <table:table-cell table:style-name="Tabla6.A1" office:value-type="string">
            <text:p text:style-name="P23">Rango de tuberias</text:p>
          </table:table-cell>
          <table:table-cell table:style-name="Tabla6.A1" office:value-type="string">
            <text:p text:style-name="P23">Dificultad</text:p>
          </table:table-cell>
          <table:table-cell table:style-name="Tabla6.A1" office:value-type="string">
            <text:p text:style-name="P23">Descripcion</text:p>
          </table:table-cell>
          <table:table-cell table:style-name="Tabla6.A1" office:value-type="string">
            <text:p text:style-name="P23">EV por tubo superado</text:p>
          </table:table-cell>
        </table:table-row>
        <table:table-row>
          <table:table-cell table:style-name="Tabla6.A2" office:value-type="string">
            <text:p text:style-name="P18">Tubos 1 a 10</text:p>
          </table:table-cell>
          <table:table-cell table:style-name="Tabla6.A2" office:value-type="string">
            <text:p text:style-name="P18">Baja</text:p>
          </table:table-cell>
          <table:table-cell table:style-name="Tabla6.A2" office:value-type="string">
            <text:p text:style-name="P18">Ritmo introductorio, huecos amplios, velocidad constante.</text:p>
          </table:table-cell>
          <table:table-cell table:style-name="Tabla6.A2" office:value-type="string">
            <text:p text:style-name="P18">10 EV / tubo</text:p>
          </table:table-cell>
        </table:table-row>
        <table:table-row>
          <table:table-cell table:style-name="Tabla6.A3" office:value-type="string">
            <text:p text:style-name="P18">Tubos 11 a 20</text:p>
          </table:table-cell>
          <table:table-cell table:style-name="Tabla6.A3" office:value-type="string">
            <text:p text:style-name="P18">Media</text:p>
          </table:table-cell>
          <table:table-cell table:style-name="Tabla6.A3" office:value-type="string">
            <text:p text:style-name="P18">Los huecos se estrechan. La velocidad horizontal aumenta.</text:p>
          </table:table-cell>
          <table:table-cell table:style-name="Tabla6.A3" office:value-type="string">
            <text:p text:style-name="P18">20 EV / tubo</text:p>
          </table:table-cell>
        </table:table-row>
        <table:table-row>
          <table:table-cell table:style-name="Tabla6.A2" office:value-type="string">
            <text:p text:style-name="P18">Tubos 21 en adelante</text:p>
          </table:table-cell>
          <table:table-cell table:style-name="Tabla6.A2" office:value-type="string">
            <text:p text:style-name="P18">Hardcore</text:p>
          </table:table-cell>
          <table:table-cell table:style-name="Tabla6.A2" office:value-type="string">
            <text:p text:style-name="P18">Los tubos ejecutan movimientos verticales oscilatorios aleatorios.</text:p>
          </table:table-cell>
          <table:table-cell table:style-name="Tabla6.A2" office:value-type="string">
            <text:p text:style-name="P18">50 EV / tubo</text:p>
          </table:table-cell>
        </table:table-row>
      </table:table>
      <text:p text:style-name="P13"> </text:p>
      <text:p text:style-name="P16">El punto de muerte estadistica de la comunidad se situa entre el tubo 10 y el 13, garantizando que el coste de 5 de Energia Nexo entregue aproximadamente las 150 EV presupuestadas. Un jugador experto que llegue al tubo 20 obtiene hasta 300 EV, recompensando la habilidad sin romper el equilibrio.</text:p>
      <text:p text:style-name="P15"> </text:p>
      <text:h text:style-name="P12" text:outline-level="2">3.3  Juego de Memoria</text:h>
      <text:p text:style-name="P21"><text:span text:style-name="T3">•      </text:span><text:span text:style-name="T4">Mecanica: tablero cerrado de 16 cartas (matriz de 4x4) con 8 pares de elementos geneticos tematizados. Las cartas se muestran boca abajo y el jugador las voltea de dos en dos buscando las coincidencias exactas.</text:span></text:p>
      <text:p text:style-name="P21"><text:span text:style-name="T3">•      </text:span><text:span text:style-name="T4">El minijuego incluye un cronometro de 45 segundos en retroceso visible para el jugador.</text:span></text:p>
      <text:p text:style-name="P13"> </text:p>
      <text:h text:style-name="P22" text:outline-level="3">Algoritmo de recompensas por eficiencia mental</text:h>
      <text:p text:style-name="P21"><text:span text:style-name="T3">•      </text:span><text:span text:style-name="T4">Premio base por victoria: si el jugador descubre los 8 pares antes de que el reloj llegue a cero, recibe 100 EV fijos como pago base.</text:span></text:p>
      <text:p text:style-name="P21"><text:span text:style-name="T3">•      </text:span><text:span text:style-name="T1">Bono de velocidad excedente: </text:span><text:span text:style-name="T4">cada segundo restante en el cronometro en el momento exacto de completar el tablero se liquida a +5 EV por segundo.</text:span></text:p>
      <text:p text:style-name="P13"> </text:p>
      <text:p text:style-name="P10">Ejemplo de calculo: jugador completa la matriz con 10 segundos restantes:</text:p>
      <text:p text:style-name="P24"> </text:p>
      <table:table table:name="Tabla7" table:style-name="Tabla7">
        <table:table-column table:style-name="Tabla7.A"/>
        <table:table-row>
          <table:table-cell table:style-name="Tabla7.A1" office:value-type="string">
            <text:p text:style-name="P25">Calculo del bono de velocidad</text:p>
          </table:table-cell>
        </table:table-row>
        <table:table-row>
          <table:table-cell table:style-name="Tabla7.A2" office:value-type="string">
            <text:p text:style-name="P26"><text:span text:style-name="T5">Premio base:          100 EV</text:span></text:p>
          </table:table-cell>
        </table:table-row>
        <table:table-row>
          <table:table-cell table:style-name="Tabla7.A2" office:value-type="string">
            <text:p text:style-name="P26"><text:span text:style-name="T5">Bono de velocidad:    10 segundos x 5 EV = 50 EV</text:span></text:p>
          </table:table-cell>
        </table:table-row>
        <table:table-row>
          <table:table-cell table:style-name="Tabla7.A2" office:value-type="string">
            <text:p text:style-name="P26"><text:span text:style-name="T5">Total de la partida:  150 EV  (media esperada con rendimiento estandar)</text:span></text:p>
          </table:table-cell>
        </table:table-row>
      </table:table>
      <text:p text:style-name="P13"> </text:p>
      <text:p text:style-name="P21"><text:soft-page-break/><text:span text:style-name="T3">•      </text:span><text:span text:style-name="T4">Consolacion por derrota (anti-frustracion): si el tiempo expira antes de completar el tablero, el backend otorga 10 EV por cada par correcto que haya alcanzado a descubrirse. El jugador nunca se queda con las manos vacias.</text:span></text:p>
      <text:p text:style-name="P8"> </text:p>
      <text:p text:style-name="Text_20_body"/>
      <text:p text:style-name="P19"> </text:p>
      <text:h text:style-name="P9" text:outline-level="1">Seccion 4 — Combate estandar del Coliseo (vs. IA)</text:h>
      <text:p text:style-name="P5"> </text:p>
      <text:p text:style-name="P10">El Coliseo es el entorno de simulacion tactica donde el jugador pone a prueba las configuraciones IFTTT de sus criaturas en duelos directos contra la inteligencia artificial del servidor. Para mantener la paridad exacta con el Arcade, este modo duplica el coste de entrada en Energia Nexo y, por ende, duplica el retorno financiero base.</text:p>
      <text:p text:style-name="P15"> </text:p>
      <table:table table:name="Tabla8" table:style-name="Tabla8">
        <table:table-column table:style-name="Tabla8.A"/>
        <table:table-row>
          <table:table-cell table:style-name="Tabla8.A1" office:value-type="string">
            <text:p text:style-name="P27">Costes de entrada al Coliseo</text:p>
          </table:table-cell>
        </table:table-row>
        <table:table-row>
          <table:table-cell table:style-name="Tabla8.A2" office:value-type="string">
            <text:p text:style-name="P7">Energia Nexo de la cuenta: 10 puntos por combate (el doble que el Arcade).</text:p>
          </table:table-cell>
        </table:table-row>
        <table:table-row>
          <table:table-cell table:style-name="Tabla8.A2" office:value-type="string">
            <text:p text:style-name="P7">Resistencia biologica del Geno participante: 20 puntos por combate.</text:p>
          </table:table-cell>
        </table:table-row>
        <table:table-row>
          <table:table-cell table:style-name="Tabla8.A2" office:value-type="string">
            <text:p text:style-name="P7">La resistencia del Geno es independiente de la Energia Nexo de la cuenta.</text:p>
          </table:table-cell>
        </table:table-row>
      </table:table>
      <text:p text:style-name="P15"> </text:p>
      <text:h text:style-name="P12" text:outline-level="2">4.1  Modalidad 1 vs 1 (Duelo singular)</text:h>
      <text:p text:style-name="P21"><text:span text:style-name="T3">•      </text:span><text:span text:style-name="T1">Victoria: 300 EV. </text:span><text:span text:style-name="T4">Paridad milimetrica con el Arcade: equivale a jugar dos partidas perfectas de Arcade pero en un formato de combate mas agil y directo.</text:span></text:p>
      <text:p text:style-name="P21"><text:span text:style-name="T3">•      </text:span><text:span text:style-name="T1">Derrota: 50 EV. </text:span><text:span text:style-name="T4">Consolacion minima que cubre el esfuerzo del tiempo invertido. Este subsidio bloquea el abuso de bots que busquen rendirse en bucle para farmear EV de forma pasiva, ya que el retorno es demasiado bajo para justificar el gasto de energia.</text:span></text:p>
      <text:p text:style-name="P15"> </text:p>
      <text:h text:style-name="P12" text:outline-level="2"><text:soft-page-break/>4.2  Modalidad 3 vs 3 (Combate por equipos)</text:h>
      <text:p text:style-name="P10">La complejidad de gestionar tres scripts de condiciones IFTTT y la mayor duracion del combate no multiplica el premio por tres para evitar la hiperinflacion del sistema. Se aplica un multiplicador de complejidad moderada de x1.5 sobre el pozo base del 1v1:</text:p>
      <text:p text:style-name="P13"> </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23">Modalidad</text:p>
          </table:table-cell>
          <table:table-cell table:style-name="Tabla9.A1" office:value-type="string">
            <text:p text:style-name="P23">Formula</text:p>
          </table:table-cell>
          <table:table-cell table:style-name="Tabla9.A1" office:value-type="string">
            <text:p text:style-name="P23">Victoria</text:p>
          </table:table-cell>
          <table:table-cell table:style-name="Tabla9.A1" office:value-type="string">
            <text:p text:style-name="P23">Derrota</text:p>
          </table:table-cell>
        </table:table-row>
        <table:table-row>
          <table:table-cell table:style-name="Tabla9.A2" office:value-type="string">
            <text:p text:style-name="P18">1 vs 1 (Duelo singular)</text:p>
          </table:table-cell>
          <table:table-cell table:style-name="Tabla9.A2" office:value-type="string">
            <text:p text:style-name="P18">Base</text:p>
          </table:table-cell>
          <table:table-cell table:style-name="Tabla9.A2" office:value-type="string">
            <text:p text:style-name="P18">300 EV</text:p>
          </table:table-cell>
          <table:table-cell table:style-name="Tabla9.A2" office:value-type="string">
            <text:p text:style-name="P18">50 EV</text:p>
          </table:table-cell>
        </table:table-row>
        <table:table-row>
          <table:table-cell table:style-name="Tabla9.A3" office:value-type="string">
            <text:p text:style-name="P18">3 vs 3 (Combate por equipos)</text:p>
          </table:table-cell>
          <table:table-cell table:style-name="Tabla9.A3" office:value-type="string">
            <text:p text:style-name="P18">Base x 1.5</text:p>
          </table:table-cell>
          <table:table-cell table:style-name="Tabla9.A3" office:value-type="string">
            <text:p text:style-name="P18">450 EV</text:p>
          </table:table-cell>
          <table:table-cell table:style-name="Tabla9.A3" office:value-type="string">
            <text:p text:style-name="P18">75 EV</text:p>
          </table:table-cell>
        </table:table-row>
      </table:table>
      <text:p text:style-name="P8"> </text:p>
      <text:p text:style-name="Text_20_body"/>
      <text:p text:style-name="P19"> </text:p>
      <text:h text:style-name="P9" text:outline-level="1">Seccion 5 — Torre de Mutacion (Supervivencia lineal unica)</text:h>
      <text:p text:style-name="P5"> </text:p>
      <text:p text:style-name="P10">La Torre de Mutacion funciona bajo una estructura roguelike de escalada infinita por pisos donde la salud residual y el dano acumulado de los Genos se arrastran de forma persistente entre rondas. Es el modo de juego mas exigente del PvE y el que ofrece las mayores recompensas individuales por piso.</text:p>
      <text:p text:style-name="P15"> </text:p>
      <text:h text:style-name="P12" text:outline-level="2">5.1  El ticket de entrada y la logica de sesion</text:h>
      <text:p text:style-name="P21"><text:span text:style-name="T3">•      </text:span><text:span text:style-name="T4">El jugador paga 10 de Energia Nexo una unica vez para adquirir un Ticket de Tanda.</text:span></text:p>
      <text:p text:style-name="P21"><text:span text:style-name="T3">•      </text:span><text:span text:style-name="T4">Mientras su Geno gane el combate y conserve puntos de vida, el jugador permanece dentro de la Torre de forma gratuita, avanzando pisos de forma consecutiva sin coste adicional.</text:span></text:p>
      <text:p text:style-name="P21"><text:span text:style-name="T3">•      </text:span><text:span text:style-name="T4">En el momento en que el jugador decide salir voluntariamente o su criatura es derrotada, la tanda se cierra por completo. Para reingresar en el futuro, se debe pagar un nuevo ticket de 10 de Energia Nexo.</text:span></text:p>
      <text:p text:style-name="P15"> </text:p>
      <text:h text:style-name="P12" text:outline-level="2"><text:soft-page-break/>5.2  La regla de oro economica: bloqueo de pisos superados</text:h>
      <text:p text:style-name="P10">Para evitar que jugadores avanzados usen Genos de rarezas altas para farmear EV masiva y facilmente en los pisos iniciales, se implementa un bloqueo permanente:</text:p>
      <text:p text:style-name="P13"> </text:p>
      <table:table table:name="Tabla10" table:style-name="Tabla10">
        <table:table-column table:style-name="Tabla10.A"/>
        <table:table-row>
          <table:table-cell table:style-name="Tabla10.A1" office:value-type="string">
            <text:p text:style-name="P28">Bloqueo de pisos en Supabase</text:p>
          </table:table-cell>
        </table:table-row>
        <table:table-row>
          <table:table-cell table:style-name="Tabla10.A2" office:value-type="string">
            <text:p text:style-name="P7">Cada piso completado con exito se registra en la variable max_floor de la tabla de perfiles.</text:p>
          </table:table-cell>
        </table:table-row>
        <table:table-row>
          <table:table-cell table:style-name="Tabla10.A2" office:value-type="string">
            <text:p text:style-name="P7">El EV de un piso especifico solo puede reclamarse una unica vez en toda la vida de la cuenta.</text:p>
          </table:table-cell>
        </table:table-row>
        <table:table-row>
          <table:table-cell table:style-name="Tabla10.A2" office:value-type="string">
            <text:p text:style-name="P7">Este bloqueo es irreversible e inmutable. No existe mecanismo de reset para un piso ya superado.</text:p>
          </table:table-cell>
        </table:table-row>
      </table:table>
      <text:p text:style-name="P15"> </text:p>
      <text:h text:style-name="P12" text:outline-level="2">5.3  Retirada voluntaria vs. muerte en combate</text:h>
      <text:p text:style-name="P10">Al terminar cada piso, el sistema muestra la salud actual del Geno y el peligro del siguiente nivel, forzando al jugador a tomar una decision financiera consciente:</text:p>
      <text:p text:style-name="P13"> </text:p>
      <text:p text:style-name="P21"><text:span text:style-name="T3">•      </text:span><text:span text:style-name="T1">Retirada voluntaria (asegurar botin): </text:span><text:span text:style-name="T4">el jugador pulsa el boton de salida. El backend entrega el 100% de toda la EV acumulada durante los pisos de esa tanda.</text:span></text:p>
      <text:p text:style-name="P21"><text:span text:style-name="T3">•      </text:span><text:span text:style-name="T1">Muerte en combate (pena por codicia): </text:span><text:span text:style-name="T4">si el jugador arriesga al Geno y este es derrotado, la tanda colapsa. El sistema aplica una penalizacion: solo se rescata el 50% del EV acumulado en esa carrera. El otro 50% se destruye.</text:span></text:p>
      <text:p text:style-name="P21"><text:span text:style-name="T3">•      </text:span><text:span text:style-name="T1">Accesorios cosmeticos: </text:span><text:span text:style-name="T4">los accesorios fisicos obtenidos de los jefes (Bosses) quedan asegurados siempre. No pueden perderse ni por muerte ni por retirada.</text:span></text:p>
      <text:p text:style-name="P15"> </text:p>
      <text:h text:style-name="P12" text:outline-level="2">5.4  Sistema de Checkpoints y sectores de control</text:h>
      <text:p text:style-name="P10">Para evitar la frustracion de repetir contenido trivial y eliminar el riesgo de soft-lock (bloqueo absoluto sin salida), la Torre implementa Checkpoints cada 10 pisos vinculados al rango genetico de los enemigos:</text:p>
      <text:p text:style-name="P13"> </text:p>
      <table:table table:name="Tabla11" table:style-name="Tabla11">
        <table:table-column table:style-name="Tabla11.A"/>
        <table:table-row>
          <table:table-cell table:style-name="Tabla11.A1" office:value-type="string">
            <text:p text:style-name="P27">Ejemplo de funcionamiento del Checkpoint</text:p>
          </table:table-cell>
        </table:table-row>
        <table:table-row>
          <table:table-cell table:style-name="Tabla11.A2" office:value-type="string">
            <text:p text:style-name="P7">Situacion: el jugador tiene su record en el Piso 17 y muere en un intento posterior.</text:p>
          </table:table-cell>
        </table:table-row>
        <table:table-row>
          <table:table-cell table:style-name="Tabla11.A2" office:value-type="string">
            <text:p text:style-name="P7">Sin Checkpoint: el jugador tendria que empezar desde el Piso 1 (pisos ya bloqueados = 0 EV disponible).</text:p>
          </table:table-cell>
        </table:table-row>
        <text:soft-page-break/>
        <table:table-row>
          <table:table-cell table:style-name="Tabla11.A2" office:value-type="string">
            <text:p text:style-name="P7">Con Checkpoint: al comprar su siguiente ticket, el sistema lee que el ultimo Checkpoint desbloqueado</text:p>
          </table:table-cell>
        </table:table-row>
        <table:table-row>
          <table:table-cell table:style-name="Tabla11.A2" office:value-type="string">
            <text:p text:style-name="P7">fue el Piso 10, y le permite reanudar directamente desde el Piso 11. Esto le da pisos seguros</text:p>
          </table:table-cell>
        </table:table-row>
        <table:table-row>
          <table:table-cell table:style-name="Tabla11.A2" office:value-type="string">
            <text:p text:style-name="P7">(11, 12, 13) para farmear algo de EV limpio antes de volver a enfrentarse a su muro personal.</text:p>
          </table:table-cell>
        </table:table-row>
      </table:table>
      <text:p text:style-name="P15"> </text:p>
      <text:h text:style-name="P12" text:outline-level="2">5.5  Tabla completa de premios por piso</text:h>
      <text:p text:style-name="P10">Cada fila representa un bloque de pisos con sus enemigos correspondientes, el EV reclamable una unica vez, y los eventos especiales:</text:p>
      <text:p text:style-name="P13"> </text:p>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office:value-type="string">
            <text:p text:style-name="P23">Sector</text:p>
          </table:table-cell>
          <table:table-cell table:style-name="Tabla12.A1" office:value-type="string">
            <text:p text:style-name="P23">Pisos</text:p>
          </table:table-cell>
          <table:table-cell table:style-name="Tabla12.A1" office:value-type="string">
            <text:p text:style-name="P23">Enemigo IA (calidad)</text:p>
          </table:table-cell>
          <table:table-cell table:style-name="Tabla12.A1" office:value-type="string">
            <text:p text:style-name="P23">EV neto unico</text:p>
          </table:table-cell>
          <table:table-cell table:style-name="Tabla12.A1" office:value-type="string">
            <text:p text:style-name="P23">Evento especial</text:p>
          </table:table-cell>
        </table:table-row>
        <table:table-row>
          <table:table-cell table:style-name="Tabla12.A2" office:value-type="string">
            <text:p text:style-name="P18">Fase Comun Inicial</text:p>
          </table:table-cell>
          <table:table-cell table:style-name="Tabla12.A2" office:value-type="string">
            <text:p text:style-name="P18">1-9</text:p>
          </table:table-cell>
          <table:table-cell table:style-name="Tabla12.A2" office:value-type="string">
            <text:p text:style-name="P18">Comun (Rango D a A con taras)</text:p>
          </table:table-cell>
          <table:table-cell table:style-name="Tabla12.A2" office:value-type="string">
            <text:p text:style-name="P18">100 EV / piso</text:p>
          </table:table-cell>
          <table:table-cell table:style-name="Tabla12.A2" office:value-type="string">
            <text:p text:style-name="P29">—</text:p>
          </table:table-cell>
        </table:table-row>
        <table:table-row>
          <table:table-cell table:style-name="Tabla12.A3" office:value-type="string">
            <text:p text:style-name="P18">Jefe del Nexo</text:p>
          </table:table-cell>
          <table:table-cell table:style-name="Tabla12.A3" office:value-type="string">
            <text:p text:style-name="P18">10</text:p>
          </table:table-cell>
          <table:table-cell table:style-name="Tabla12.A3" office:value-type="string">
            <text:p text:style-name="P18">Comun (Rango A+ / Miniboss)</text:p>
          </table:table-cell>
          <table:table-cell table:style-name="Tabla12.A3" office:value-type="string">
            <text:p text:style-name="P18">400 EV</text:p>
          </table:table-cell>
          <table:table-cell table:style-name="Tabla12.A3" office:value-type="string">
            <text:p text:style-name="P18">Drop accesorio procedural</text:p>
          </table:table-cell>
        </table:table-row>
        <table:table-row>
          <table:table-cell table:style-name="Tabla12.A2" office:value-type="string">
            <text:p text:style-name="P18">Fase Comun Avanzada</text:p>
          </table:table-cell>
          <table:table-cell table:style-name="Tabla12.A2" office:value-type="string">
            <text:p text:style-name="P18">11-19</text:p>
          </table:table-cell>
          <table:table-cell table:style-name="Tabla12.A2" office:value-type="string">
            <text:p text:style-name="P18">Comun (Rango B a S Perfecto)</text:p>
          </table:table-cell>
          <table:table-cell table:style-name="Tabla12.A2" office:value-type="string">
            <text:p text:style-name="P18">200 EV / piso</text:p>
          </table:table-cell>
          <table:table-cell table:style-name="Tabla12.A2" office:value-type="string">
            <text:p text:style-name="P29">—</text:p>
          </table:table-cell>
        </table:table-row>
        <table:table-row>
          <table:table-cell table:style-name="Tabla12.A3" office:value-type="string">
            <text:p text:style-name="P18">Gran Guardian</text:p>
          </table:table-cell>
          <table:table-cell table:style-name="Tabla12.A3" office:value-type="string">
            <text:p text:style-name="P18">20</text:p>
          </table:table-cell>
          <table:table-cell table:style-name="Tabla12.A3" office:value-type="string">
            <text:p text:style-name="P18">Comun (Rango S / Boss de Bloque)</text:p>
          </table:table-cell>
          <table:table-cell table:style-name="Tabla12.A3" office:value-type="string">
            <text:p text:style-name="P18">800 EV</text:p>
          </table:table-cell>
          <table:table-cell table:style-name="Tabla12.A3" office:value-type="string">
            <text:p text:style-name="P18">Drop accesorio procedural</text:p>
          </table:table-cell>
        </table:table-row>
        <table:table-row>
          <table:table-cell table:style-name="Tabla12.A2" office:value-type="string">
            <text:p text:style-name="P18">Fase Comun Critica</text:p>
          </table:table-cell>
          <table:table-cell table:style-name="Tabla12.A2" office:value-type="string">
            <text:p text:style-name="P18">21-25</text:p>
          </table:table-cell>
          <table:table-cell table:style-name="Tabla12.A2" office:value-type="string">
            <text:p text:style-name="P18">Comun (Rango S Combinados)</text:p>
          </table:table-cell>
          <table:table-cell table:style-name="Tabla12.A2" office:value-type="string">
            <text:p text:style-name="P18">300 EV / piso</text:p>
          </table:table-cell>
          <table:table-cell table:style-name="Tabla12.A2" office:value-type="string">
            <text:p text:style-name="P29">—</text:p>
          </table:table-cell>
        </table:table-row>
        <table:table-row>
          <table:table-cell table:style-name="Tabla12.A3" office:value-type="string">
            <text:p text:style-name="P18">Fase Rara de Ascension</text:p>
          </table:table-cell>
          <table:table-cell table:style-name="Tabla12.A3" office:value-type="string">
            <text:p text:style-name="P18">26-29</text:p>
          </table:table-cell>
          <table:table-cell table:style-name="Tabla12.A3" office:value-type="string">
            <text:p text:style-name="P18">Raro (Rango D a C / Salto de Stats)</text:p>
          </table:table-cell>
          <table:table-cell table:style-name="Tabla12.A3" office:value-type="string">
            <text:p text:style-name="P18">500 EV / piso</text:p>
          </table:table-cell>
          <table:table-cell table:style-name="Tabla12.A3" office:value-type="string">
            <text:p text:style-name="P29">—</text:p>
          </table:table-cell>
        </table:table-row>
        <table:table-row>
          <table:table-cell table:style-name="Tabla12.A2" office:value-type="string">
            <text:p text:style-name="P18">Jefe Raro</text:p>
          </table:table-cell>
          <table:table-cell table:style-name="Tabla12.A2" office:value-type="string">
            <text:p text:style-name="P18">30</text:p>
          </table:table-cell>
          <table:table-cell table:style-name="Tabla12.A2" office:value-type="string">
            <text:p text:style-name="P18">Raro (Rango B / Miniboss de Bloque)</text:p>
          </table:table-cell>
          <table:table-cell table:style-name="Tabla12.A2" office:value-type="string">
            <text:p text:style-name="P18">900 EV</text:p>
          </table:table-cell>
          <table:table-cell table:style-name="Tabla12.A2" office:value-type="string">
            <text:p text:style-name="P18">Drop accesorio procedural + Checkpoint 3</text:p>
          </table:table-cell>
        </table:table-row>
      </table:table>
      <text:p text:style-name="P16">Los pisos 26-29 presentan un salto de dificultad notable (enemigos Raros) que justifica el aumento de 300 a 500 EV por piso. El jugador que llegue al Piso 30 habra demostrado tener un Geno de calidad competitiva y recibe 900 EV + el Checkpoint 3 como recompensa al nivel del esfuerzo.</text:p>
      <text:p text:style-name="P8"> </text:p>
      <text:p text:style-name="Text_20_body"/>
      <text:p text:style-name="P19"> </text:p>
      <text:h text:style-name="P9" text:outline-level="1"><text:soft-page-break/>Seccion 6 — Sistemas de retencion y progresion pasiva</text:h>
      <text:p text:style-name="P5"> </text:p>
      <text:p text:style-name="P10">Para afianzar la retencion a corto, mediano y largo plazo, se implementan cinco capas de incentivos economicos fijos que recompensan la constancia y dan utilidad a la totalidad de la coleccion de Genos del jugador.</text:p>
      <text:p text:style-name="P15"> </text:p>
      <text:h text:style-name="P12" text:outline-level="2">6.1  Ciclo de Racha de Login (7 dias)</text:h>
      <text:p text:style-name="P10">Recompensa la conexion diaria consecutiva. Si el jugador no inicia sesion en un intervalo de 24 horas, el backend resetea el progreso de forma obligatoria al Dia 1. El reinicio crea urgencia de retorno sin castigar con perdida de activos al jugador que vuelve.</text:p>
      <text:p text:style-name="P13"> </text:p>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23">Dia del ciclo</text:p>
          </table:table-cell>
          <table:table-cell table:style-name="Tabla13.A1" office:value-type="string">
            <text:p text:style-name="P23">Recompensa en EV</text:p>
          </table:table-cell>
          <table:table-cell table:style-name="Tabla13.A1" office:value-type="string">
            <text:p text:style-name="P23">Bonus adicional</text:p>
          </table:table-cell>
          <table:table-cell table:style-name="Tabla13.A1" office:value-type="string">
            <text:p text:style-name="P23">Razon de diseno</text:p>
          </table:table-cell>
        </table:table-row>
        <table:table-row>
          <table:table-cell table:style-name="Tabla13.A2" office:value-type="string">
            <text:p text:style-name="P18">Dia 1</text:p>
          </table:table-cell>
          <table:table-cell table:style-name="Tabla13.A2" office:value-type="string">
            <text:p text:style-name="P18">100 EV</text:p>
          </table:table-cell>
          <table:table-cell table:style-name="Tabla13.A2" office:value-type="string">
            <text:p text:style-name="P29">—</text:p>
          </table:table-cell>
          <table:table-cell table:style-name="Tabla13.A2" office:value-type="string">
            <text:p text:style-name="P18">Barrera de entrada baja. Facil de completar.</text:p>
          </table:table-cell>
        </table:table-row>
        <table:table-row>
          <table:table-cell table:style-name="Tabla13.A3" office:value-type="string">
            <text:p text:style-name="P18">Dia 2</text:p>
          </table:table-cell>
          <table:table-cell table:style-name="Tabla13.A3" office:value-type="string">
            <text:p text:style-name="P18">150 EV</text:p>
          </table:table-cell>
          <table:table-cell table:style-name="Tabla13.A3" office:value-type="string">
            <text:p text:style-name="P29">—</text:p>
          </table:table-cell>
          <table:table-cell table:style-name="Tabla13.A3" office:value-type="string">
            <text:p text:style-name="P18">Escalado gradual que recompensa la vuelta al dia siguiente.</text:p>
          </table:table-cell>
        </table:table-row>
        <table:table-row>
          <table:table-cell table:style-name="Tabla13.A2" office:value-type="string">
            <text:p text:style-name="P18">Dia 3</text:p>
          </table:table-cell>
          <table:table-cell table:style-name="Tabla13.A2" office:value-type="string">
            <text:p text:style-name="P18">200 EV</text:p>
          </table:table-cell>
          <table:table-cell table:style-name="Tabla13.A2" office:value-type="string">
            <text:p text:style-name="P18">1 Racion de Comida Basica</text:p>
          </table:table-cell>
          <table:table-cell table:style-name="Tabla13.A2" office:value-type="string">
            <text:p text:style-name="P18">Primer bonus fisico que refuerza el loop de cuidado.</text:p>
          </table:table-cell>
        </table:table-row>
        <table:table-row>
          <table:table-cell table:style-name="Tabla13.A3" office:value-type="string">
            <text:p text:style-name="P18">Dia 4</text:p>
          </table:table-cell>
          <table:table-cell table:style-name="Tabla13.A3" office:value-type="string">
            <text:p text:style-name="P18">250 EV</text:p>
          </table:table-cell>
          <table:table-cell table:style-name="Tabla13.A3" office:value-type="string">
            <text:p text:style-name="P29">—</text:p>
          </table:table-cell>
          <table:table-cell table:style-name="Tabla13.A3" office:value-type="string">
            <text:p text:style-name="P18">Mitad del ciclo: el jugador ya esta comprometido.</text:p>
          </table:table-cell>
        </table:table-row>
        <table:table-row>
          <table:table-cell table:style-name="Tabla13.A2" office:value-type="string">
            <text:p text:style-name="P18">Dia 5</text:p>
          </table:table-cell>
          <table:table-cell table:style-name="Tabla13.A2" office:value-type="string">
            <text:p text:style-name="P18">300 EV</text:p>
          </table:table-cell>
          <table:table-cell table:style-name="Tabla13.A2" office:value-type="string">
            <text:p text:style-name="P29">—</text:p>
          </table:table-cell>
          <table:table-cell table:style-name="Tabla13.A2" office:value-type="string">
            <text:p text:style-name="P18">La recompensa crece de forma apreciable. Tension positiva.</text:p>
          </table:table-cell>
        </table:table-row>
        <table:table-row>
          <table:table-cell table:style-name="Tabla13.A3" office:value-type="string">
            <text:p text:style-name="P18">Dia 6</text:p>
          </table:table-cell>
          <table:table-cell table:style-name="Tabla13.A3" office:value-type="string">
            <text:p text:style-name="P18">400 EV</text:p>
          </table:table-cell>
          <table:table-cell table:style-name="Tabla13.A3" office:value-type="string">
            <text:p text:style-name="P18">1 Ducha de Plasma</text:p>
          </table:table-cell>
          <table:table-cell table:style-name="Tabla13.A3" office:value-type="string">
            <text:p text:style-name="P18">Segundo bonus fisico. Un dia mas y llega el gran premio.</text:p>
          </table:table-cell>
        </table:table-row>
        <table:table-row>
          <table:table-cell table:style-name="Tabla13.A2" office:value-type="string">
            <text:p text:style-name="P18">Dia 7 (Hito semanal)</text:p>
          </table:table-cell>
          <table:table-cell table:style-name="Tabla13.A2" office:value-type="string">
            <text:p text:style-name="P18">1,000 EV</text:p>
          </table:table-cell>
          <table:table-cell table:style-name="Tabla13.A2" office:value-type="string">
            <text:p text:style-name="P18">1 Caja de Escaner de ADN Basico</text:p>
          </table:table-cell>
          <table:table-cell table:style-name="Tabla13.A2" office:value-type="string">
            <text:p text:style-name="P18">Pago maximo. Recompensa el compromiso semanal completo.</text:p>
          </table:table-cell>
        </table:table-row>
      </table:table>
      <text:p text:style-name="P15"> </text:p>
      <text:h text:style-name="P12" text:outline-level="2"><text:soft-page-break/>6.2  Pase de Batalla mensual (Puntos de Mutacion)</text:h>
      <text:p text:style-name="P10">El Pase de Batalla es un contrato de recompensas mensual de 50 niveles basado en la acumulacion de Puntos de Pase (PP). Los PP se obtienen exclusivamente a traves del panel de misiones diarias y semanales, garantizando que el avance en el Pase sea siempre un reflejo del juego activo y no de una billetera.</text:p>
      <text:p text:style-name="P11"> </text:p>
      <text:h text:style-name="P22" text:outline-level="3">Ruta gratuita (disponible para todos los jugadores)</text:h>
      <text:p text:style-name="P21"><text:span text:style-name="T3">•      </text:span><text:span text:style-name="T4">Ofrece recompensas intercaladas cada 2 niveles, enfocadas en el mantenimiento diario y la progresion organica.</text:span></text:p>
      <text:p text:style-name="P21"><text:span text:style-name="T3">•      </text:span><text:span text:style-name="T4">Tipos de recompensa: paquetes de 200 EV, consumibles de higiene (duchas, banos de plasma), raciones de alimento basico.</text:span></text:p>
      <text:p text:style-name="P21"><text:span text:style-name="T3">•      </text:span><text:span text:style-name="T1">Nivel 25 (hito estrategico): </text:span><text:span text:style-name="T4">el jugador recibe gratuitamente 1 unidad del Estabilizador Atomico. Esto es un regalo deliberado para que pruebe su efecto antes de una fusion de alto riesgo, rompiendo la barrera psicologica de compra.</text:span></text:p>
      <text:p text:style-name="P13"> </text:p>
      <text:h text:style-name="P22" text:outline-level="3">Ruta premium (desbloqueable con $POL)</text:h>
      <text:p text:style-name="P21"><text:span text:style-name="T3">•      </text:span><text:span text:style-name="T4">Desbloquea la fila inferior del contrato de recompensas del Pase.</text:span></text:p>
      <text:p text:style-name="P21"><text:span text:style-name="T3">•      </text:span><text:span text:style-name="T4">Introduce inyecciones masivas de 1,000 EV por nivel de Pase completado.</text:span></text:p>
      <text:p text:style-name="P21"><text:span text:style-name="T3">•      </text:span><text:span text:style-name="T4">Acceso a planos de accesorios esteticos de edicion limitada (exclusivos del mes en curso).</text:span></text:p>
      <text:p text:style-name="P21"><text:span text:style-name="T3">•      </text:span><text:span text:style-name="T4">Skins exclusivas para personalizar el entorno visual del Laboratorio del jugador.</text:span></text:p>
      <text:p text:style-name="P13"> </text:p>
      <text:h text:style-name="P22" text:outline-level="3">Obtencion de Puntos de Pase (PP)</text:h>
      <table:table table:name="Tabla14" table:style-name="Tabla14">
        <table:table-column table:style-name="Tabla14.A"/>
        <table:table-column table:style-name="Tabla14.B"/>
        <table:table-column table:style-name="Tabla14.C"/>
        <table:table-row>
          <table:table-cell table:style-name="Tabla14.A1" office:value-type="string">
            <text:p text:style-name="P23">Fuente de PP</text:p>
          </table:table-cell>
          <table:table-cell table:style-name="Tabla14.A1" office:value-type="string">
            <text:p text:style-name="P23">PP obtenidos</text:p>
          </table:table-cell>
          <table:table-cell table:style-name="Tabla14.A1" office:value-type="string">
            <text:p text:style-name="P23">Frecuencia</text:p>
          </table:table-cell>
        </table:table-row>
        <table:table-row>
          <table:table-cell table:style-name="Tabla14.A2" office:value-type="string">
            <text:p text:style-name="P18">Cada mision diaria completada</text:p>
          </table:table-cell>
          <table:table-cell table:style-name="Tabla14.A2" office:value-type="string">
            <text:p text:style-name="P18">10 PP</text:p>
          </table:table-cell>
          <table:table-cell table:style-name="Tabla14.A2" office:value-type="string">
            <text:p text:style-name="P18">3 misiones disponibles al dia</text:p>
          </table:table-cell>
        </table:table-row>
        <table:table-row>
          <table:table-cell table:style-name="Tabla14.A3" office:value-type="string">
            <text:p text:style-name="P18">Cofre de bonificacion diario (3/3 misiones)</text:p>
          </table:table-cell>
          <table:table-cell table:style-name="Tabla14.A3" office:value-type="string">
            <text:p text:style-name="P18">PP incluidos en cofre</text:p>
          </table:table-cell>
          <table:table-cell table:style-name="Tabla14.A3" office:value-type="string">
            <text:p text:style-name="P18">1 vez al dia</text:p>
          </table:table-cell>
        </table:table-row>
        <table:table-row>
          <table:table-cell table:style-name="Tabla14.A2" office:value-type="string">
            <text:p text:style-name="P18">Cada mision semanal completada</text:p>
          </table:table-cell>
          <table:table-cell table:style-name="Tabla14.A2" office:value-type="string">
            <text:p text:style-name="P18">50 PP</text:p>
          </table:table-cell>
          <table:table-cell table:style-name="Tabla14.A2" office:value-type="string">
            <text:p text:style-name="P18">3 misiones disponibles a la semana</text:p>
          </table:table-cell>
        </table:table-row>
      </table:table>
      <text:p text:style-name="P15"> </text:p>
      <text:h text:style-name="P12" text:outline-level="2"><text:soft-page-break/>6.3  Panel de misiones diarias y semanales</text:h>
      <text:p text:style-name="P10">El panel de misiones obliga al jugador a diversificar su actividad paseandose por todas las mecanicas del cliente, evitando que se especialice en una sola fuente de EV y abandone el resto del contenido.</text:p>
      <text:p text:style-name="P11"> </text:p>
      <text:h text:style-name="P22" text:outline-level="3">Misiones diarias (reseteo automatico cada 24 horas)</text:h>
      <text:p text:style-name="P10">Cada mision individual completada otorga 100 EV + 10 Puntos de Pase (PP). Al completar las 3 actividades del dia, el sistema libera automaticamente un Cofre de Bonificacion Diario con 300 EV adicionales.</text:p>
      <text:p text:style-name="P13"> </text:p>
      <table:table table:name="Tabla15" table:style-name="Tabla15">
        <table:table-column table:style-name="Tabla15.A"/>
        <table:table-column table:style-name="Tabla15.B"/>
        <table:table-column table:style-name="Tabla15.C"/>
        <table:table-row>
          <table:table-cell table:style-name="Tabla15.A1" office:value-type="string">
            <text:p text:style-name="P23">Mision diaria</text:p>
          </table:table-cell>
          <table:table-cell table:style-name="Tabla15.A1" office:value-type="string">
            <text:p text:style-name="P23">Descripcion</text:p>
          </table:table-cell>
          <table:table-cell table:style-name="Tabla15.A1" office:value-type="string">
            <text:p text:style-name="P23">Recompensa individual</text:p>
          </table:table-cell>
        </table:table-row>
        <table:table-row>
          <table:table-cell table:style-name="Tabla15.A2" office:value-type="string">
            <text:p text:style-name="P18">El Buen Criador</text:p>
          </table:table-cell>
          <table:table-cell table:style-name="Tabla15.A2" office:value-type="string">
            <text:p text:style-name="P18">Satisfacer las necesidades de higiene o alimentacion de 3 Genos en el menu de Cuidado.</text:p>
          </table:table-cell>
          <table:table-cell table:style-name="Tabla15.A2" office:value-type="string">
            <text:p text:style-name="P18">100 EV + 10 PP</text:p>
          </table:table-cell>
        </table:table-row>
        <table:table-row>
          <table:table-cell table:style-name="Tabla15.A3" office:value-type="string">
            <text:p text:style-name="P18">Rey del Arcade</text:p>
          </table:table-cell>
          <table:table-cell table:style-name="Tabla15.A3" office:value-type="string">
            <text:p text:style-name="P18">Completar con exito 3 partidas en cualquiera de los minijuegos activos del Arcade.</text:p>
          </table:table-cell>
          <table:table-cell table:style-name="Tabla15.A3" office:value-type="string">
            <text:p text:style-name="P18">100 EV + 10 PP</text:p>
          </table:table-cell>
        </table:table-row>
        <table:table-row>
          <table:table-cell table:style-name="Tabla15.A2" office:value-type="string">
            <text:p text:style-name="P18">Sangre en la Arena</text:p>
          </table:table-cell>
          <table:table-cell table:style-name="Tabla15.A2" office:value-type="string">
            <text:p text:style-name="P18">Cerrar con victoria 2 combates contra la IA en el Coliseo Estandar.</text:p>
          </table:table-cell>
          <table:table-cell table:style-name="Tabla15.A2" office:value-type="string">
            <text:p text:style-name="P18">100 EV + 10 PP</text:p>
          </table:table-cell>
        </table:table-row>
      </table:table>
      <text:p text:style-name="P13"> </text:p>
      <text:p text:style-name="P16">Completar las 3 misiones diarias suma 300 EV + 300 EV del cofre = 600 EV fijos garantizados al dia para cualquier jugador activo, independientemente de su habilidad o progresion.</text:p>
      <text:p text:style-name="P15"> </text:p>
      <text:h text:style-name="P22" text:outline-level="3">Misiones semanales (reseteo automatizado cada lunes)</text:h>
      <text:p text:style-name="P10">Retos de mayor complejidad y exigencia tactica. Cada mision semanal completa entrega 500 EV + 50 PP.</text:p>
      <text:p text:style-name="P13"> </text:p>
      <table:table table:name="Tabla16" table:style-name="Tabla16">
        <table:table-column table:style-name="Tabla16.A"/>
        <table:table-column table:style-name="Tabla16.B"/>
        <table:table-column table:style-name="Tabla16.C"/>
        <table:table-row>
          <table:table-cell table:style-name="Tabla16.A1" office:value-type="string">
            <text:p text:style-name="P23">Mision semanal</text:p>
          </table:table-cell>
          <table:table-cell table:style-name="Tabla16.A1" office:value-type="string">
            <text:p text:style-name="P23">Descripcion</text:p>
          </table:table-cell>
          <table:table-cell table:style-name="Tabla16.A1" office:value-type="string">
            <text:p text:style-name="P23">Recompensa</text:p>
          </table:table-cell>
        </table:table-row>
        <table:table-row>
          <table:table-cell table:style-name="Tabla16.A2" office:value-type="string">
            <text:p text:style-name="P18">Escalador Tactico</text:p>
          </table:table-cell>
          <table:table-cell table:style-name="Tabla16.A2" office:value-type="string">
            <text:p text:style-name="P18">Superar 5 pisos nuevos no bloqueados en la Torre de Mutacion.</text:p>
          </table:table-cell>
          <table:table-cell table:style-name="Tabla16.A2" office:value-type="string">
            <text:p text:style-name="P18">500 EV + 50 PP</text:p>
          </table:table-cell>
        </table:table-row>
        <table:table-row>
          <table:table-cell table:style-name="Tabla16.A3" office:value-type="string">
            <text:p text:style-name="P18">Maestro Genetico</text:p>
          </table:table-cell>
          <table:table-cell table:style-name="Tabla16.A3" office:value-type="string">
            <text:p text:style-name="P18">Ejecutar de forma valida 1 proceso de fusion en el Reactor (quemar 5 criaturas).</text:p>
          </table:table-cell>
          <table:table-cell table:style-name="Tabla16.A3" office:value-type="string">
            <text:p text:style-name="P18">500 EV + 50 PP</text:p>
          </table:table-cell>
        </table:table-row>
        <table:table-row>
          <table:table-cell table:style-name="Tabla16.A2" office:value-type="string">
            <text:p text:style-name="P18">Inversionista del Dojo</text:p>
          </table:table-cell>
          <table:table-cell table:style-name="Tabla16.A2" office:value-type="string">
            <text:p text:style-name="P18">Intercambiar un minimo de 2,000 EV dentro del Dojo de Ataques o en el Bazar.</text:p>
          </table:table-cell>
          <table:table-cell table:style-name="Tabla16.A2" office:value-type="string">
            <text:p text:style-name="P18">500 EV + 50 PP</text:p>
          </table:table-cell>
        </table:table-row>
      </table:table>
      <text:p text:style-name="P15"> </text:p>
      <text:h text:style-name="P12" text:outline-level="2"><text:soft-page-break/>6.4  Expediciones pasivas (Utilidad del Baul)</text:h>
      <text:p text:style-name="P10">Disenadas especificamente para dar una salida de juego valiosa a las criaturas debiles que estan almacenadas en el baul esperando ser acumuladas para fusiones. Permiten al jugador sentir que toda su coleccion, incluyendo los Genos mas debiles, esta trabajando para el.</text:p>
      <text:p text:style-name="P13"> </text:p>
      <text:p text:style-name="P21"><text:span text:style-name="T3">•      </text:span><text:span text:style-name="T4">El jugador envia Genos de su reserva a misiones de exploracion en el mapa exterior. Hay tres ventanas de tiempo real seleccionables: 4 horas, 8 horas o 12 horas.</text:span></text:p>
      <text:p text:style-name="P21"><text:span text:style-name="T3">•      </text:span><text:span text:style-name="T4">Mientras el Geno esta en expedicion, queda totalmente congelado en la base de datos. No puede seleccionarse para combatir, cuidarse, ni usarse como sacrificio en el Reactor.</text:span></text:p>
      <text:p text:style-name="P21"><text:span text:style-name="T3">•      </text:span><text:span text:style-name="T1">Retorno al regresar: </text:span><text:span text:style-name="T4">el Geno consume automaticamente el 50% de su barra de Resistencia, pero entrega al usuario un botin fijo de 300 EV + probabilidad procedural de rescatar items consumibles raros para la mochila.</text:span></text:p>
      <text:p text:style-name="P15"> </text:p>
      <text:h text:style-name="P12" text:outline-level="2">6.5  Sistema de logros unicos de cuenta (Achievements)</text:h>
      <text:p text:style-name="P10">Hitos inmutables ligados al progreso historico del perfil que se completan una sola vez en la vida util del jugador. Actuan como el combustible financiero definitivo para apoyar al usuario en las transiciones criticas de su experiencia (del Early Game al Mid Game y al Late Game):</text:p>
      <text:p text:style-name="P13"> </text:p>
      <table:table table:name="Tabla17" table:style-name="Tabla17">
        <table:table-column table:style-name="Tabla17.A"/>
        <table:table-column table:style-name="Tabla17.B"/>
        <table:table-column table:style-name="Tabla17.C"/>
        <table:table-row>
          <table:table-cell table:style-name="Tabla17.A1" office:value-type="string">
            <text:p text:style-name="P23">Nombre del logro</text:p>
          </table:table-cell>
          <table:table-cell table:style-name="Tabla17.A1" office:value-type="string">
            <text:p text:style-name="P23">Condicion de desbloqueo</text:p>
          </table:table-cell>
          <table:table-cell table:style-name="Tabla17.A1" office:value-type="string">
            <text:p text:style-name="P23">Recompensa</text:p>
          </table:table-cell>
        </table:table-row>
        <table:table-row>
          <table:table-cell table:style-name="Tabla17.A2" office:value-type="string">
            <text:p text:style-name="P18">Despertar Biologico</text:p>
          </table:table-cell>
          <table:table-cell table:style-name="Tabla17.A2" office:value-type="string">
            <text:p text:style-name="P18">Conseguir dar a luz al primer Geno de rareza Rara en el Reactor.</text:p>
          </table:table-cell>
          <table:table-cell table:style-name="Tabla17.A2" office:value-type="string">
            <text:p text:style-name="P18">5,000 EV</text:p>
          </table:table-cell>
        </table:table-row>
        <table:table-row>
          <table:table-cell table:style-name="Tabla17.A3" office:value-type="string">
            <text:p text:style-name="P18">Combustion Masiva</text:p>
          </table:table-cell>
          <table:table-cell table:style-name="Tabla17.A3" office:value-type="string">
            <text:p text:style-name="P18">Quemar un acumulado historico de 50 Genos en sacrificios de fusion.</text:p>
          </table:table-cell>
          <table:table-cell table:style-name="Tabla17.A3" office:value-type="string">
            <text:p text:style-name="P18">5,000 EV</text:p>
          </table:table-cell>
        </table:table-row>
        <table:table-row>
          <table:table-cell table:style-name="Tabla17.A2" office:value-type="string">
            <text:p text:style-name="P18">Veterano del Nexo</text:p>
          </table:table-cell>
          <table:table-cell table:style-name="Tabla17.A2" office:value-type="string">
            <text:p text:style-name="P18">Registrar el codigo del Piso 25 de la Torre en el perfil de la cuenta.</text:p>
          </table:table-cell>
          <table:table-cell table:style-name="Tabla17.A2" office:value-type="string">
            <text:p text:style-name="P18">5,000 EV + Titulo Honorífico para el Avatar</text:p>
          </table:table-cell>
        </table:table-row>
      </table:table>
      <text:p text:style-name="P16">Los logros se activan una sola vez. Ademas de su valor en EV, sirven como marcadores de progresion que el jugador puede mostrar en su perfil y que actuan como indicadores sociales de experiencia dentro de la comunidad.</text:p>
      <text:p text:style-name="P8"> </text:p>
      <text:p text:style-name="Text_20_body"/>
      <text:p text:style-name="P19"> </text:p>
      <text:h text:style-name="P9" text:outline-level="1"><text:soft-page-break/>Seccion 7 — Logistica del almacen, crianza y componentes</text:h>
      <text:p text:style-name="P5"> </text:p>
      <text:p text:style-name="P10">Antes de poder fusionar Genos en el Reactor, el jugador debe producirlos y almacenarlos. Esta seccion describe los costes en EV y $POL que regulan la velocidad de reproduccion del servidor, crean tension estrategica de progresion y garantizan que la crianza requiera inversion activa en lugar de ser un proceso pasivo.</text:p>
      <text:p text:style-name="P15"> </text:p>
      <text:h text:style-name="P12" text:outline-level="2">7.1  Adquisicion de especimenes base</text:h>
      <text:p text:style-name="P13"> </text:p>
      <text:h text:style-name="P22" text:outline-level="3">Compra directa en la tienda</text:h>
      <text:p text:style-name="P21"><text:span text:style-name="T3">•      </text:span><text:span text:style-name="T4">Un Bio-Nucleo Comun (Nivel 1) cuesta 3,000 EV en la tienda del juego.</text:span></text:p>
      <text:p text:style-name="P21"><text:span text:style-name="T3">•      </text:span><text:span text:style-name="T4">Conseguir los 5 especimenes necesarios para una primera fusion comprando todos en tienda cuesta 15,000 EV en total.</text:span></text:p>
      <text:p text:style-name="P13"> </text:p>
      <text:h text:style-name="P22" text:outline-level="3">Crianza (Breeding)</text:h>
      <text:p text:style-name="P21"><text:span text:style-name="T3">•      </text:span><text:span text:style-name="T4">Requisito minimo: dos Genos padres con al menos Nivel 10.</text:span></text:p>
      <text:p text:style-name="P21"><text:span text:style-name="T3">•      </text:span><text:span text:style-name="T4">Limite de vida por Geno: 7 crias en total durante toda su existencia (contador permanente).</text:span></text:p>
      <text:p text:style-name="P21"><text:span text:style-name="T3">•      </text:span><text:span text:style-name="T4">El coste de cada cria se calcula sumando el contador de hijos de ambos padres de forma exponencial, encareciendo el uso repetido de la misma pareja.</text:span></text:p>
      <text:p text:style-name="P13"> </text:p>
      <text:p text:style-name="P10">Tabla de costes de crianza para una pareja con contador 0/7 (ambos padres virgenes):</text:p>
      <text:p text:style-name="P24"> </text:p>
      <table:table table:name="Tabla18" table:style-name="Tabla18">
        <table:table-column table:style-name="Tabla18.A"/>
        <table:table-column table:style-name="Tabla18.B"/>
        <table:table-column table:style-name="Tabla18.C"/>
        <table:table-row>
          <table:table-cell table:style-name="Tabla18.A1" office:value-type="string">
            <text:p text:style-name="P23">Numero de cria</text:p>
          </table:table-cell>
          <table:table-cell table:style-name="Tabla18.A1" office:value-type="string">
            <text:p text:style-name="P23">Coste en EV</text:p>
          </table:table-cell>
          <table:table-cell table:style-name="Tabla18.A1" office:value-type="string">
            <text:p text:style-name="P23">Coste acumulado con la pareja</text:p>
          </table:table-cell>
        </table:table-row>
        <table:table-row>
          <table:table-cell table:style-name="Tabla18.A2" office:value-type="string">
            <text:p text:style-name="P18">1a cria</text:p>
          </table:table-cell>
          <table:table-cell table:style-name="Tabla18.A2" office:value-type="string">
            <text:p text:style-name="P18">1,000 EV</text:p>
          </table:table-cell>
          <table:table-cell table:style-name="Tabla18.A2" office:value-type="string">
            <text:p text:style-name="P18">1,000 EV</text:p>
          </table:table-cell>
        </table:table-row>
        <table:table-row>
          <table:table-cell table:style-name="Tabla18.A3" office:value-type="string">
            <text:p text:style-name="P18">2a cria</text:p>
          </table:table-cell>
          <table:table-cell table:style-name="Tabla18.A3" office:value-type="string">
            <text:p text:style-name="P18">1,500 EV</text:p>
          </table:table-cell>
          <table:table-cell table:style-name="Tabla18.A3" office:value-type="string">
            <text:p text:style-name="P18">2,500 EV</text:p>
          </table:table-cell>
        </table:table-row>
        <table:table-row>
          <table:table-cell table:style-name="Tabla18.A2" office:value-type="string">
            <text:p text:style-name="P18">3a cria</text:p>
          </table:table-cell>
          <table:table-cell table:style-name="Tabla18.A2" office:value-type="string">
            <text:p text:style-name="P18">2,500 EV</text:p>
          </table:table-cell>
          <table:table-cell table:style-name="Tabla18.A2" office:value-type="string">
            <text:p text:style-name="P18">5,000 EV</text:p>
          </table:table-cell>
        </table:table-row>
        <table:table-row>
          <table:table-cell table:style-name="Tabla18.A3" office:value-type="string">
            <text:p text:style-name="P18">4a cria</text:p>
          </table:table-cell>
          <table:table-cell table:style-name="Tabla18.A3" office:value-type="string">
            <text:p text:style-name="P18">4,500 EV</text:p>
          </table:table-cell>
          <table:table-cell table:style-name="Tabla18.A3" office:value-type="string">
            <text:p text:style-name="P18">9,500 EV</text:p>
          </table:table-cell>
        </table:table-row>
        <table:table-row>
          <table:table-cell table:style-name="Tabla18.A2" office:value-type="string">
            <text:p text:style-name="P18">5a cria</text:p>
          </table:table-cell>
          <table:table-cell table:style-name="Tabla18.A2" office:value-type="string">
            <text:p text:style-name="P18">7,000 EV</text:p>
          </table:table-cell>
          <table:table-cell table:style-name="Tabla18.A2" office:value-type="string">
            <text:p text:style-name="P18">16,500 EV</text:p>
          </table:table-cell>
        </table:table-row>
      </table:table>
      <text:p text:style-name="P16"><text:soft-page-break/>Criar 5 hijos con la misma pareja cuesta 16,500 EV, ligeramente mas caro que comprar 5 Bio-Nucleos en tienda (15,000 EV). Esto incentiva al jugador a mantener multiples parejas activas y usar solo los slots baratos de cada una (crias 1 y 2), manteniendo el engagement con el PvE de forma continua.</text:p>
      <text:p text:style-name="P15"> </text:p>
      <text:h text:style-name="P12" text:outline-level="2">7.2  Las incubadoras (freno temporal de produccion)</text:h>
      <text:p text:style-name="P10">Todo Bio-Nucleo comprado en tienda o huevo producido por crianza requiere una incubadora para eclosionar. Las incubadoras se adquieren en el Bazar y existen dos variantes que cubren perfiles de jugador distintos:</text:p>
      <text:p text:style-name="P13"> </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23">Tipo de incubadora</text:p>
          </table:table-cell>
          <table:table-cell table:style-name="Tabla19.A1" office:value-type="string">
            <text:p text:style-name="P23">Coste</text:p>
          </table:table-cell>
          <table:table-cell table:style-name="Tabla19.A1" office:value-type="string">
            <text:p text:style-name="P23">Tiempo de eclosion</text:p>
          </table:table-cell>
          <table:table-cell table:style-name="Tabla19.A1" office:value-type="string">
            <text:p text:style-name="P23">Perfil de jugador objetivo</text:p>
          </table:table-cell>
        </table:table-row>
        <table:table-row>
          <table:table-cell table:style-name="Tabla19.A2" office:value-type="string">
            <text:p text:style-name="P18">Incubadora Basica</text:p>
          </table:table-cell>
          <table:table-cell table:style-name="Tabla19.A2" office:value-type="string">
            <text:p text:style-name="P18">1,000 EV</text:p>
          </table:table-cell>
          <table:table-cell table:style-name="Tabla19.A2" office:value-type="string">
            <text:p text:style-name="P18">4 horas (tiempo real)</text:p>
          </table:table-cell>
          <table:table-cell table:style-name="Tabla19.A2" office:value-type="string">
            <text:p text:style-name="P18">F2P / Web2 (espera natural del loop)</text:p>
          </table:table-cell>
        </table:table-row>
        <table:table-row>
          <table:table-cell table:style-name="Tabla19.A3" office:value-type="string">
            <text:p text:style-name="P18">Incubadora de Plasma</text:p>
          </table:table-cell>
          <table:table-cell table:style-name="Tabla19.A3" office:value-type="string">
            <text:p text:style-name="P18">0.20 $POL</text:p>
          </table:table-cell>
          <table:table-cell table:style-name="Tabla19.A3" office:value-type="string">
            <text:p text:style-name="P18">15 minutos o instantanea</text:p>
          </table:table-cell>
          <table:table-cell table:style-name="Tabla19.A3" office:value-type="string">
            <text:p text:style-name="P18">Web3 / Pay-to-Fast (acelera sin ventaja)</text:p>
          </table:table-cell>
        </table:table-row>
      </table:table>
      <text:p text:style-name="P16">La Incubadora de Plasma aplica el modelo Pay-to-Fast: no otorga ventajas de estadisticas sobre el Geno resultante. Solo acelera el tiempo de espera. Es un micropago accesible (0.20 $POL) que respeta la salud competitiva del juego y la regla de los $10 maximos de barrera economica.</text:p>
      <text:p text:style-name="P15"> </text:p>
      <text:h text:style-name="P12" text:outline-level="2">7.3  Ranuras del almacen (sistema de expansion progresiva)</text:h>
      <text:p text:style-name="P10">El jugador inicia con 6 ranuras de almacen gratuitas. Estas 6 ranuras son suficientes para ejecutar la primera fusion sin necesidad de comprar ninguna ranura adicional: 5 Genos de sacrificio + 1 Geno activo del equipo.</text:p>
      <text:p text:style-name="P13"> </text:p>
      <text:p text:style-name="P16">El desbloqueo de ranuras adicionales es una decision libre y progresiva que el jugador tomara de forma natural cuando decida conservar mas Genos en paralelo, despues de su primera fusion y una vez que entienda su propia estrategia. No hay ninguna obligacion de comprar ranuras el primer dia.</text:p>
      <text:p text:style-name="P13"> </text:p>
      <text:p text:style-name="P10">Escala de costes de expansion del almacen:</text:p>
      <text:p text:style-name="P24"> </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23">Ranura</text:p>
          </table:table-cell>
          <table:table-cell table:style-name="Tabla20.A1" office:value-type="string">
            <text:p text:style-name="P23">Coste en EV</text:p>
          </table:table-cell>
          <table:table-cell table:style-name="Tabla20.A1" office:value-type="string">
            <text:p text:style-name="P23">Coste en $POL</text:p>
          </table:table-cell>
          <table:table-cell table:style-name="Tabla20.A1" office:value-type="string">
            <text:p text:style-name="P23">Nota</text:p>
          </table:table-cell>
        </table:table-row>
        <table:table-row>
          <table:table-cell table:style-name="Tabla20.A2" office:value-type="string">
            <text:p text:style-name="P18">Ranura 7</text:p>
          </table:table-cell>
          <table:table-cell table:style-name="Tabla20.A2" office:value-type="string">
            <text:p text:style-name="P18">1,500 EV</text:p>
          </table:table-cell>
          <table:table-cell table:style-name="Tabla20.A2" office:value-type="string">
            <text:p text:style-name="P29">—</text:p>
          </table:table-cell>
          <table:table-cell table:style-name="Tabla20.A2" office:value-type="string">
            <text:p text:style-name="P18">Primera expansion. Muy accesible.</text:p>
          </table:table-cell>
        </table:table-row>
        <text:soft-page-break/>
        <table:table-row>
          <table:table-cell table:style-name="Tabla20.A3" office:value-type="string">
            <text:p text:style-name="P18">Ranura 8</text:p>
          </table:table-cell>
          <table:table-cell table:style-name="Tabla20.A3" office:value-type="string">
            <text:p text:style-name="P18">3,000 EV</text:p>
          </table:table-cell>
          <table:table-cell table:style-name="Tabla20.A3" office:value-type="string">
            <text:p text:style-name="P29">—</text:p>
          </table:table-cell>
          <table:table-cell table:style-name="Tabla20.A3" office:value-type="string">
            <text:p text:style-name="P18">Equivale a un Bio-Nucleo extra.</text:p>
          </table:table-cell>
        </table:table-row>
        <table:table-row>
          <table:table-cell table:style-name="Tabla20.A2" office:value-type="string">
            <text:p text:style-name="P18">Ranura 9</text:p>
          </table:table-cell>
          <table:table-cell table:style-name="Tabla20.A2" office:value-type="string">
            <text:p text:style-name="P18">6,000 EV</text:p>
          </table:table-cell>
          <table:table-cell table:style-name="Tabla20.A2" office:value-type="string">
            <text:p text:style-name="P18">0.50 $POL</text:p>
          </table:table-cell>
          <table:table-cell table:style-name="Tabla20.A2" office:value-type="string">
            <text:p text:style-name="P18">Opcion hibrida: EV o micropago.</text:p>
          </table:table-cell>
        </table:table-row>
        <table:table-row>
          <table:table-cell table:style-name="Tabla20.A3" office:value-type="string">
            <text:p text:style-name="P18">Ranura 10</text:p>
          </table:table-cell>
          <table:table-cell table:style-name="Tabla20.A3" office:value-type="string">
            <text:p text:style-name="P18">12,000 EV</text:p>
          </table:table-cell>
          <table:table-cell table:style-name="Tabla20.A3" office:value-type="string">
            <text:p text:style-name="P18">1.00 $POL</text:p>
          </table:table-cell>
          <table:table-cell table:style-name="Tabla20.A3" office:value-type="string">
            <text:p text:style-name="P18">El gasto en EV ya es significativo.</text:p>
          </table:table-cell>
        </table:table-row>
        <table:table-row>
          <table:table-cell table:style-name="Tabla20.A2" office:value-type="string">
            <text:p text:style-name="P18">Ranura 11 en adelante</text:p>
          </table:table-cell>
          <table:table-cell table:style-name="Tabla20.A2" office:value-type="string">
            <text:p text:style-name="P18">15,000 EV (escala)</text:p>
          </table:table-cell>
          <table:table-cell table:style-name="Tabla20.A2" office:value-type="string">
            <text:p text:style-name="P18">2.00 $POL (fijo)</text:p>
          </table:table-cell>
          <table:table-cell table:style-name="Tabla20.A2" office:value-type="string">
            <text:p text:style-name="P18">A partir de aqui $POL es mas eficiente.</text:p>
          </table:table-cell>
        </table:table-row>
      </table:table>
      <text:p text:style-name="P8"> </text:p>
      <text:p text:style-name="Text_20_body"/>
      <text:p text:style-name="P19"> </text:p>
      <text:h text:style-name="P9" text:outline-level="1">Seccion 8 — El Reactor Genetico y el item de estabilizacion</text:h>
      <text:p text:style-name="P5"> </text:p>
      <text:p text:style-name="P10">El Reactor es el gran destructor de cartas del juego y el destino final del ciclo PvE. Procesa fusiones consumiendo 5 Genos de la misma rareza mas una tasa de activacion fija en EV. Sus cuatro posibles resultados estan disenados para que ninguno sea una perdida total: incluso el peor escenario (Colapso) incluye un seguro que permite al jugador relanzar el ciclo rapidamente.</text:p>
      <text:p text:style-name="P15"> </text:p>
      <text:h text:style-name="P12" text:outline-level="2">8.1  Matriz de probabilidades base por nivel de fusion</text:h>
      <text:p text:style-name="P13"> </text:p>
      <text:h text:style-name="P22" text:outline-level="3">Fusion Nivel 1: Comun a Raro (Tasa de activacion: 5,000 EV)</text:h>
      <table:table table:name="Tabla21" table:style-name="Tabla21">
        <table:table-column table:style-name="Tabla21.A"/>
        <table:table-column table:style-name="Tabla21.B"/>
        <table:table-column table:style-name="Tabla21.C"/>
        <table:table-row>
          <table:table-cell table:style-name="Tabla21.A1" office:value-type="string">
            <text:p text:style-name="P23">Resultado</text:p>
          </table:table-cell>
          <table:table-cell table:style-name="Tabla21.A1" office:value-type="string">
            <text:p text:style-name="P23">Probabilidad</text:p>
          </table:table-cell>
          <table:table-cell table:style-name="Tabla21.A1" office:value-type="string">
            <text:p text:style-name="P23">Descripcion breve</text:p>
          </table:table-cell>
        </table:table-row>
        <table:table-row>
          <table:table-cell table:style-name="Tabla21.A2" office:value-type="string">
            <text:p text:style-name="P18">Exito Normal</text:p>
          </table:table-cell>
          <table:table-cell table:style-name="Tabla21.A2" office:value-type="string">
            <text:p text:style-name="P18">35%</text:p>
          </table:table-cell>
          <table:table-cell table:style-name="Tabla21.A2" office:value-type="string">
            <text:p text:style-name="P18">El jugador obtiene un Geno Raro a Nivel 1 limpio.</text:p>
          </table:table-cell>
        </table:table-row>
        <table:table-row>
          <table:table-cell table:style-name="Tabla21.A3" office:value-type="string">
            <text:p text:style-name="P18">Mutacion Estancada</text:p>
          </table:table-cell>
          <table:table-cell table:style-name="Tabla21.A3" office:value-type="string">
            <text:p text:style-name="P18">35%</text:p>
          </table:table-cell>
          <table:table-cell table:style-name="Tabla21.A3" office:value-type="string">
            <text:p text:style-name="P18">Geno Comun+ con is_plus=true. +15% stats base y gen dominante.</text:p>
          </table:table-cell>
        </table:table-row>
        <table:table-row>
          <table:table-cell table:style-name="Tabla21.A2" office:value-type="string">
            <text:p text:style-name="P18">Colapso</text:p>
          </table:table-cell>
          <table:table-cell table:style-name="Tabla21.A2" office:value-type="string">
            <text:p text:style-name="P18">27%</text:p>
          </table:table-cell>
          <table:table-cell table:style-name="Tabla21.A2" office:value-type="string">
            <text:p text:style-name="P18">Fallo. Reembolso automatico de 8,000 EV como seguro.</text:p>
          </table:table-cell>
        </table:table-row>
        <table:table-row>
          <table:table-cell table:style-name="Tabla21.A3" office:value-type="string">
            <text:p text:style-name="P18">Exito Critico</text:p>
          </table:table-cell>
          <table:table-cell table:style-name="Tabla21.A3" office:value-type="string">
            <text:p text:style-name="P18">3%</text:p>
          </table:table-cell>
          <table:table-cell table:style-name="Tabla21.A3" office:value-type="string">
            <text:p text:style-name="P18">Salto directo a Epico (rareza +2). El mejor resultado posible.</text:p>
          </table:table-cell>
        </table:table-row>
      </table:table>
      <text:p text:style-name="P11"> </text:p>
      <text:h text:style-name="P22" text:outline-level="3"><text:soft-page-break/>Fusion Nivel 2: Raro a Epico (Tasa de activacion: 15,000 EV)</text:h>
      <table:table table:name="Tabla22" table:style-name="Tabla22">
        <table:table-column table:style-name="Tabla22.A"/>
        <table:table-column table:style-name="Tabla22.B"/>
        <table:table-column table:style-name="Tabla22.C"/>
        <table:table-row>
          <table:table-cell table:style-name="Tabla22.A1" office:value-type="string">
            <text:p text:style-name="P23">Resultado</text:p>
          </table:table-cell>
          <table:table-cell table:style-name="Tabla22.A1" office:value-type="string">
            <text:p text:style-name="P23">Probabilidad</text:p>
          </table:table-cell>
          <table:table-cell table:style-name="Tabla22.A1" office:value-type="string">
            <text:p text:style-name="P23">Descripcion breve</text:p>
          </table:table-cell>
        </table:table-row>
        <table:table-row>
          <table:table-cell table:style-name="Tabla22.A2" office:value-type="string">
            <text:p text:style-name="P18">Exito Normal</text:p>
          </table:table-cell>
          <table:table-cell table:style-name="Tabla22.A2" office:value-type="string">
            <text:p text:style-name="P18">25%</text:p>
          </table:table-cell>
          <table:table-cell table:style-name="Tabla22.A2" office:value-type="string">
            <text:p text:style-name="P18">El jugador obtiene un Geno Epico a Nivel 1 limpio.</text:p>
          </table:table-cell>
        </table:table-row>
        <table:table-row>
          <table:table-cell table:style-name="Tabla22.A3" office:value-type="string">
            <text:p text:style-name="P18">Mutacion Estancada</text:p>
          </table:table-cell>
          <table:table-cell table:style-name="Tabla22.A3" office:value-type="string">
            <text:p text:style-name="P18">35%</text:p>
          </table:table-cell>
          <table:table-cell table:style-name="Tabla22.A3" office:value-type="string">
            <text:p text:style-name="P18">Geno Raro+ con is_plus=true. Campeon de torneos de su categoria.</text:p>
          </table:table-cell>
        </table:table-row>
        <table:table-row>
          <table:table-cell table:style-name="Tabla22.A2" office:value-type="string">
            <text:p text:style-name="P18">Colapso</text:p>
          </table:table-cell>
          <table:table-cell table:style-name="Tabla22.A2" office:value-type="string">
            <text:p text:style-name="P18">39.5%</text:p>
          </table:table-cell>
          <table:table-cell table:style-name="Tabla22.A2" office:value-type="string">
            <text:p text:style-name="P18">Fallo. Reembolso automatico de 25,000 EV como seguro.</text:p>
          </table:table-cell>
        </table:table-row>
        <table:table-row>
          <table:table-cell table:style-name="Tabla22.A3" office:value-type="string">
            <text:p text:style-name="P18">Exito Critico</text:p>
          </table:table-cell>
          <table:table-cell table:style-name="Tabla22.A3" office:value-type="string">
            <text:p text:style-name="P18">0.5%</text:p>
          </table:table-cell>
          <table:table-cell table:style-name="Tabla22.A3" office:value-type="string">
            <text:p text:style-name="P18">Salto directo a Legendario. Rareza maxima del juego.</text:p>
          </table:table-cell>
        </table:table-row>
      </table:table>
      <text:p text:style-name="P11"> </text:p>
      <text:h text:style-name="P22" text:outline-level="3">Fusion Nivel 3: Epico a Legendario (Tasa de activacion: 30,000 EV)</text:h>
      <table:table table:name="Tabla23" table:style-name="Tabla23">
        <table:table-column table:style-name="Tabla23.A"/>
        <table:table-column table:style-name="Tabla23.B"/>
        <table:table-column table:style-name="Tabla23.C"/>
        <table:table-row>
          <table:table-cell table:style-name="Tabla23.A1" office:value-type="string">
            <text:p text:style-name="P23">Resultado</text:p>
          </table:table-cell>
          <table:table-cell table:style-name="Tabla23.A1" office:value-type="string">
            <text:p text:style-name="P23">Probabilidad</text:p>
          </table:table-cell>
          <table:table-cell table:style-name="Tabla23.A1" office:value-type="string">
            <text:p text:style-name="P23">Descripcion breve</text:p>
          </table:table-cell>
        </table:table-row>
        <table:table-row>
          <table:table-cell table:style-name="Tabla23.A2" office:value-type="string">
            <text:p text:style-name="P18">Exito Normal</text:p>
          </table:table-cell>
          <table:table-cell table:style-name="Tabla23.A2" office:value-type="string">
            <text:p text:style-name="P18">5%</text:p>
          </table:table-cell>
          <table:table-cell table:style-name="Tabla23.A2" office:value-type="string">
            <text:p text:style-name="P18">El jugador obtiene un Geno Legendario a Nivel 1 limpio.</text:p>
          </table:table-cell>
        </table:table-row>
        <table:table-row>
          <table:table-cell table:style-name="Tabla23.A3" office:value-type="string">
            <text:p text:style-name="P18">Mutacion Estancada</text:p>
          </table:table-cell>
          <table:table-cell table:style-name="Tabla23.A3" office:value-type="string">
            <text:p text:style-name="P18">40%</text:p>
          </table:table-cell>
          <table:table-cell table:style-name="Tabla23.A3" office:value-type="string">
            <text:p text:style-name="P18">Geno Epico+ con is_plus=true. Estadisticas cercanas al Legendario.</text:p>
          </table:table-cell>
        </table:table-row>
        <table:table-row>
          <table:table-cell table:style-name="Tabla23.A2" office:value-type="string">
            <text:p text:style-name="P18">Colapso</text:p>
          </table:table-cell>
          <table:table-cell table:style-name="Tabla23.A2" office:value-type="string">
            <text:p text:style-name="P18">54.9%</text:p>
          </table:table-cell>
          <table:table-cell table:style-name="Tabla23.A2" office:value-type="string">
            <text:p text:style-name="P18">Fallo. Reembolso automatico de 60,000 EV como seguro.</text:p>
          </table:table-cell>
        </table:table-row>
        <table:table-row>
          <table:table-cell table:style-name="Tabla23.A3" office:value-type="string">
            <text:p text:style-name="P18">Exito Critico</text:p>
          </table:table-cell>
          <table:table-cell table:style-name="Tabla23.A3" office:value-type="string">
            <text:p text:style-name="P18">0.1%</text:p>
          </table:table-cell>
          <table:table-cell table:style-name="Tabla23.A3" office:value-type="string">
            <text:p text:style-name="P18">Rareza desconocida / Geno unico. Evento extremadamente raro.</text:p>
          </table:table-cell>
        </table:table-row>
      </table:table>
      <text:p text:style-name="P16">La curva de dificultad entre niveles es intencional: las fusiones de Nivel 2 y 3 son retos de alto riesgo reservados para jugadores muy comprometidos o con respaldo economico en $POL. El Colapso supera el 50% en la Fusion de Nivel 3, convirtiendo el Estabilizador Atomico en un accesorio practicamente obligatorio para los jugadores serios.</text:p>
      <text:p text:style-name="P15"> </text:p>
      <text:h text:style-name="P12" text:outline-level="2">8.2  El Estabilizador Atomico (item premium)</text:h>
      <text:p text:style-name="P10">Consumible acoplable al Reactor que mitiga el riesgo de Colapso sin eliminar la tension intrinseca del sistema de probabilidades.</text:p>
      <text:p text:style-name="P11"> </text:p>
      <table:table table:name="Tabla24" table:style-name="Tabla24">
        <table:table-column table:style-name="Tabla24.A"/>
        <table:table-row>
          <table:table-cell table:style-name="Tabla24.A1" office:value-type="string">
            <text:p text:style-name="P30">Especificaciones del Estabilizador Atomico</text:p>
          </table:table-cell>
        </table:table-row>
        <table:table-row>
          <table:table-cell table:style-name="Tabla24.A2" office:value-type="string">
            <text:p text:style-name="P7">Efecto: anade +5% de probabilidad de exito directo a la fusion activa.</text:p>
          </table:table-cell>
        </table:table-row>
        <table:table-row>
          <table:table-cell table:style-name="Tabla24.A2" office:value-type="string">
            <text:p text:style-name="P7">Mecanismo exacto: el +5% se resta EXCLUSIVAMENTE de la tasa de Colapso (fallo destructivo).</text:p>
          </table:table-cell>
        </table:table-row>
        <table:table-row>
          <table:table-cell table:style-name="Tabla24.A2" office:value-type="string">
            <text:p text:style-name="P7">No modifica las probabilidades de Mutacion Estancada ni de Exito Critico.</text:p>
          </table:table-cell>
        </table:table-row>
        <table:table-row>
          <table:table-cell table:style-name="Tabla24.A2" office:value-type="string">
            <text:p text:style-name="P7">Precio en tienda premium: 1.00 $POL por unidad.</text:p>
          </table:table-cell>
        </table:table-row>
        <table:table-row>
          <table:table-cell table:style-name="Tabla24.A2" office:value-type="string">
            <text:p text:style-name="P7">Distribucion gratuita: 1 unidad en el Nivel 25 de la ruta gratuita del Pase de Batalla.</text:p>
          </table:table-cell>
        </table:table-row>
      </table:table>
      <text:p text:style-name="P11"> </text:p>
      <text:p text:style-name="P10"><text:soft-page-break/>Comparativa de probabilidades con y sin Estabilizador Atomico para Fusion Nivel 1:</text:p>
      <text:p text:style-name="P24"> </text:p>
      <table:table table:name="Tabla25" table:style-name="Tabla25">
        <table:table-column table:style-name="Tabla25.A"/>
        <table:table-column table:style-name="Tabla25.B" table:number-columns-repeated="2"/>
        <table:table-column table:style-name="Tabla25.D"/>
        <table:table-row>
          <table:table-cell table:style-name="Tabla25.A1" office:value-type="string">
            <text:p text:style-name="P23">Resultado</text:p>
          </table:table-cell>
          <table:table-cell table:style-name="Tabla25.A1" office:value-type="string">
            <text:p text:style-name="P23">Sin estabilizador</text:p>
          </table:table-cell>
          <table:table-cell table:style-name="Tabla25.A1" office:value-type="string">
            <text:p text:style-name="P23">Con estabilizador</text:p>
          </table:table-cell>
          <table:table-cell table:style-name="Tabla25.A1" office:value-type="string">
            <text:p text:style-name="P23">Variacion</text:p>
          </table:table-cell>
        </table:table-row>
        <table:table-row>
          <table:table-cell table:style-name="Tabla25.A2" office:value-type="string">
            <text:p text:style-name="P18">Exito Normal</text:p>
          </table:table-cell>
          <table:table-cell table:style-name="Tabla25.A2" office:value-type="string">
            <text:p text:style-name="P18">35%</text:p>
          </table:table-cell>
          <table:table-cell table:style-name="Tabla25.A2" office:value-type="string">
            <text:p text:style-name="P18">40%</text:p>
          </table:table-cell>
          <table:table-cell table:style-name="Tabla25.A2" office:value-type="string">
            <text:p text:style-name="P18">+5%</text:p>
          </table:table-cell>
        </table:table-row>
        <table:table-row>
          <table:table-cell table:style-name="Tabla25.A3" office:value-type="string">
            <text:p text:style-name="P18">Mutacion Estancada</text:p>
          </table:table-cell>
          <table:table-cell table:style-name="Tabla25.A3" office:value-type="string">
            <text:p text:style-name="P18">35%</text:p>
          </table:table-cell>
          <table:table-cell table:style-name="Tabla25.A3" office:value-type="string">
            <text:p text:style-name="P18">35%</text:p>
          </table:table-cell>
          <table:table-cell table:style-name="Tabla25.A3" office:value-type="string">
            <text:p text:style-name="P18">Sin cambio</text:p>
          </table:table-cell>
        </table:table-row>
        <table:table-row>
          <table:table-cell table:style-name="Tabla25.A2" office:value-type="string">
            <text:p text:style-name="P18">Colapso</text:p>
          </table:table-cell>
          <table:table-cell table:style-name="Tabla25.A2" office:value-type="string">
            <text:p text:style-name="P18">27%</text:p>
          </table:table-cell>
          <table:table-cell table:style-name="Tabla25.A2" office:value-type="string">
            <text:p text:style-name="P18">22%</text:p>
          </table:table-cell>
          <table:table-cell table:style-name="Tabla25.A2" office:value-type="string">
            <text:p text:style-name="P18">-5%</text:p>
          </table:table-cell>
        </table:table-row>
        <table:table-row>
          <table:table-cell table:style-name="Tabla25.A3" office:value-type="string">
            <text:p text:style-name="P18">Exito Critico</text:p>
          </table:table-cell>
          <table:table-cell table:style-name="Tabla25.A3" office:value-type="string">
            <text:p text:style-name="P18">3%</text:p>
          </table:table-cell>
          <table:table-cell table:style-name="Tabla25.A3" office:value-type="string">
            <text:p text:style-name="P18">3%</text:p>
          </table:table-cell>
          <table:table-cell table:style-name="Tabla25.A3" office:value-type="string">
            <text:p text:style-name="P18">Sin cambio</text:p>
          </table:table-cell>
        </table:table-row>
      </table:table>
      <text:p text:style-name="P15"> </text:p>
      <text:h text:style-name="P12" text:outline-level="2">8.3  Logica completa de los 4 resultados en backend (Supabase)</text:h>
      <text:p text:style-name="P10">Cuando el servidor ejecuta la fusion y el generador de numeros aleatorios del servidor determina el destino, Supabase procesa las siguientes acciones en cascada:</text:p>
      <text:p text:style-name="P13"> </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31">Resultado</text:p>
          </table:table-cell>
          <table:table-cell table:style-name="Tabla26.A1" office:value-type="string">
            <text:p text:style-name="P31">Prob.</text:p>
          </table:table-cell>
          <table:table-cell table:style-name="Tabla26.A1" office:value-type="string">
            <text:p text:style-name="P31">Qué recibe el jugador</text:p>
          </table:table-cell>
          <table:table-cell table:style-name="Tabla26.A1" office:value-type="string">
            <text:p text:style-name="P31">Acciones en backend (Supabase)</text:p>
          </table:table-cell>
        </table:table-row>
        <table:table-row>
          <table:table-cell table:style-name="Tabla26.A2" office:value-type="string">
            <text:p text:style-name="P32">Exito Normal</text:p>
          </table:table-cell>
          <table:table-cell table:style-name="Tabla26.B2" office:value-type="string">
            <text:p text:style-name="P33">35%</text:p>
          </table:table-cell>
          <table:table-cell table:style-name="Tabla26.B2" office:value-type="string">
            <text:p text:style-name="P33">Geno de rareza superior (Nivel 1 limpio)</text:p>
          </table:table-cell>
          <table:table-cell table:style-name="Tabla26.B2" office:value-type="string">
            <text:p text:style-name="P33">Elimina los 5 Genos sacrificados. Genera nuevo Geno de rareza+1.</text:p>
          </table:table-cell>
        </table:table-row>
        <table:table-row>
          <table:table-cell table:style-name="Tabla26.A3" office:value-type="string">
            <text:p text:style-name="P34">Mutacion Estancada</text:p>
          </table:table-cell>
          <table:table-cell table:style-name="Tabla26.B2" office:value-type="string">
            <text:p text:style-name="P33">35%</text:p>
          </table:table-cell>
          <table:table-cell table:style-name="Tabla26.B2" office:value-type="string">
            <text:p text:style-name="P33">Geno de la misma rareza de entrada con flag is_plus=true. +15% stats base ocultas y gen dominante activo.</text:p>
          </table:table-cell>
          <table:table-cell table:style-name="Tabla26.B2" office:value-type="string">
            <text:p text:style-name="P33">Elimina los 5 Genos. Entrega especimen de misma rareza con is_plus=true a Nivel 1.</text:p>
          </table:table-cell>
        </table:table-row>
        <table:table-row>
          <table:table-cell table:style-name="Tabla26.A4" office:value-type="string">
            <text:p text:style-name="P35">Colapso</text:p>
          </table:table-cell>
          <table:table-cell table:style-name="Tabla26.B2" office:value-type="string">
            <text:p text:style-name="P33">27%</text:p>
          </table:table-cell>
          <table:table-cell table:style-name="Tabla26.B2" office:value-type="string">
            <text:p text:style-name="P33">Reembolso inmediato en EV segun tabla de seguros. Los 5 Genos son destruidos.</text:p>
          </table:table-cell>
          <table:table-cell table:style-name="Tabla26.B2" office:value-type="string">
            <text:p text:style-name="P33">Elimina los 5 Genos. Inyecta EV de seguro directamente en el saldo de la cuenta.</text:p>
          </table:table-cell>
        </table:table-row>
        <table:table-row>
          <table:table-cell table:style-name="Tabla26.A5" office:value-type="string">
            <text:p text:style-name="P36">Exito Critico</text:p>
          </table:table-cell>
          <table:table-cell table:style-name="Tabla26.B2" office:value-type="string">
            <text:p text:style-name="P33">3%</text:p>
          </table:table-cell>
          <table:table-cell table:style-name="Tabla26.B2" office:value-type="string">
            <text:p text:style-name="P33">Salto de doble rareza (Comun directo a Epico). Material viral para redes sociales.</text:p>
          </table:table-cell>
          <table:table-cell table:style-name="Tabla26.B2" office:value-type="string">
            <text:p text:style-name="P33">Elimina los 5 Genos. Genera Geno con rareza +2 sobre la de entrada a Nivel 1.</text:p>
          </table:table-cell>
        </table:table-row>
      </table:table>
      <text:p text:style-name="P11"> </text:p>
      <text:p text:style-name="P10">Tabla de seguros de reembolso por Colapso:</text:p>
      <text:p text:style-name="P24"> </text:p>
      <table:table table:name="Tabla27" table:style-name="Tabla27">
        <table:table-column table:style-name="Tabla27.A"/>
        <table:table-column table:style-name="Tabla27.B"/>
        <table:table-column table:style-name="Tabla27.C"/>
        <table:table-row>
          <table:table-cell table:style-name="Tabla27.A1" office:value-type="string">
            <text:p text:style-name="P23">Nivel de fusion</text:p>
          </table:table-cell>
          <table:table-cell table:style-name="Tabla27.A1" office:value-type="string">
            <text:p text:style-name="P23">EV reembolsado al instante</text:p>
          </table:table-cell>
          <table:table-cell table:style-name="Tabla27.A1" office:value-type="string">
            <text:p text:style-name="P23">Justificacion del valor</text:p>
          </table:table-cell>
        </table:table-row>
        <table:table-row>
          <table:table-cell table:style-name="Tabla27.A2" office:value-type="string">
            <text:p text:style-name="P18">Nivel 1 (Comun a Raro)</text:p>
          </table:table-cell>
          <table:table-cell table:style-name="Tabla27.A2" office:value-type="string">
            <text:p text:style-name="P18">8,000 EV</text:p>
          </table:table-cell>
          <table:table-cell table:style-name="Tabla27.A2" office:value-type="string">
            <text:p text:style-name="P18">Cubre exactamente el coste de una nueva tanda de crianza + incubadoras. Permite reintentar en 48h.</text:p>
          </table:table-cell>
        </table:table-row>
        <table:table-row>
          <table:table-cell table:style-name="Tabla27.A3" office:value-type="string">
            <text:p text:style-name="P18">Nivel 2 (Raro a Epico)</text:p>
          </table:table-cell>
          <table:table-cell table:style-name="Tabla27.A3" office:value-type="string">
            <text:p text:style-name="P18">25,000 EV</text:p>
          </table:table-cell>
          <table:table-cell table:style-name="Tabla27.A3" office:value-type="string">
            <text:p text:style-name="P18">Cubre los materiales de una segunda tanda <text:soft-page-break/>completa de crianza avanzada.</text:p>
          </table:table-cell>
        </table:table-row>
        <table:table-row>
          <table:table-cell table:style-name="Tabla27.A2" office:value-type="string">
            <text:p text:style-name="P18">Nivel 3 (Epico a Legendario)</text:p>
          </table:table-cell>
          <table:table-cell table:style-name="Tabla27.A2" office:value-type="string">
            <text:p text:style-name="P18">60,000 EV</text:p>
          </table:table-cell>
          <table:table-cell table:style-name="Tabla27.A2" office:value-type="string">
            <text:p text:style-name="P18">Reduce el impacto de semanas de inversion perdida. Acorta el tiempo de recuperacion significativamente.</text:p>
          </table:table-cell>
        </table:table-row>
      </table:table>
      <text:p text:style-name="P16">El reembolso por Colapso no es una limosna: es el mecanismo que convierte el peor resultado del juego en un retraso de 48 horas en lugar de un abandono permanente del jugador. Su calibracion es critica para la retencion a largo plazo.</text:p>
      <text:p text:style-name="P8"> </text:p>
      <text:p text:style-name="Text_20_body"/>
      <text:p text:style-name="P19"> </text:p>
      <text:h text:style-name="P9" text:outline-level="1">Seccion 9 — Ecosistema Web3: Licencia de Comercio y Capsulas de EV</text:h>
      <text:p text:style-name="P5"> </text:p>
      <text:p text:style-name="P10">Esta seccion cubre la capa Web3 de la economia de Proyecto Genos: el puente controlado que permite a los jugadores F2P convertir su EV farmeable en $POL real a traves del Marketplace de la Plaza de Comercio, sin que la moneda interna pierda su naturaleza cerrada ni genere riesgos legales o economicos para el proyecto.</text:p>
      <text:p text:style-name="P15"> </text:p>
      <text:h text:style-name="P12" text:outline-level="2">9.1  Fundamento legal y economico del sistema</text:h>
      <table:table table:name="Tabla28" table:style-name="Tabla28">
        <table:table-column table:style-name="Tabla28.A"/>
        <table:table-row>
          <table:table-cell table:style-name="Tabla28.A1" office:value-type="string">
            <text:p text:style-name="P28">Por que este sistema es seguro y legal</text:p>
          </table:table-cell>
        </table:table-row>
        <table:table-row>
          <table:table-cell table:style-name="Tabla28.A2" office:value-type="string">
            <text:p text:style-name="P7">La EV no tiene pool de liquidez en ningun DEX externo (Uniswap, QuickSwap, etc.).</text:p>
          </table:table-cell>
        </table:table-row>
        <table:table-row>
          <table:table-cell table:style-name="Tabla28.A2" office:value-type="string">
            <text:p text:style-name="P7">La EV no puede transferirse fuera del ecosistema del juego ni convertirse directamente en dinero fiat.</text:p>
          </table:table-cell>
        </table:table-row>
        <table:table-row>
          <table:table-cell table:style-name="Tabla28.A2" office:value-type="string">
            <text:p text:style-name="P7">Su precio en $POL lo determina exclusivamente la ley de oferta y demanda dentro del Marketplace interno.</text:p>
          </table:table-cell>
        </table:table-row>
        <table:table-row>
          <table:table-cell table:style-name="Tabla28.A2" office:value-type="string">
            <text:p text:style-name="P7">Este modelo es identico al sistema WoW Token de Blizzard y al Grand Exchange de RuneScape, vigentes</text:p>
          </table:table-cell>
        </table:table-row>
        <table:table-row>
          <table:table-cell table:style-name="Tabla28.A2" office:value-type="string">
            <text:p text:style-name="P7">durante mas de 10 anos sin conflictos legales. La EV es una mecanica de juego P2P, no un activo financiero.</text:p>
          </table:table-cell>
        </table:table-row>
        <table:table-row>
          <table:table-cell table:style-name="Tabla28.A2" office:value-type="string">
            <text:p text:style-name="P7">IMPORTANTE: nunca describir publica ni internamente como 'inversion' ni prometer rendimientos.</text:p>
          </table:table-cell>
        </table:table-row>
      </table:table>
      <text:p text:style-name="P15"> </text:p>
      <text:h text:style-name="P12" text:outline-level="2"><text:soft-page-break/>9.2  La Licencia de Comercio Web3</text:h>
      <text:p text:style-name="P10">La Licencia de Comercio es el requisito obligatorio para poder interactuar con el Marketplace Web3 y activar la wallet de Privy del jugador. Su diseno cumple dos funciones simultaneas:</text:p>
      <text:p text:style-name="P13"> </text:p>
      <text:p text:style-name="P21"><text:span text:style-name="T3">•      </text:span><text:span text:style-name="T1">Funcion 1: filtro de intencion. </text:span><text:span text:style-name="T4">Solo los jugadores que realmente quieren comerciar en Web3 la adquieren. Los jugadores pasivos o casuales no la necesitan y no interactuan con el mercado.</text:span></text:p>
      <text:p text:style-name="P21"><text:span text:style-name="T3">•      </text:span><text:span text:style-name="T1">Funcion 2: proteccion de costes de infraestructura. </text:span><text:span text:style-name="T4">Cada activacion de wallet de Privy tiene un coste operativo para el servidor. La Licencia garantiza que ese coste solo se incurra para usuarios comprometidos que van a generar transacciones reales y, por lo tanto, comisiones del 3.5% para el proyecto.</text:span></text:p>
      <text:p text:style-name="P11"> </text:p>
      <table:table table:name="Tabla29" table:style-name="Tabla29">
        <table:table-column table:style-name="Tabla29.A"/>
        <table:table-row>
          <table:table-cell table:style-name="Tabla29.A1" office:value-type="string">
            <text:p text:style-name="P20">Especificaciones de la Licencia de Comercio</text:p>
          </table:table-cell>
        </table:table-row>
        <table:table-row>
          <table:table-cell table:style-name="Tabla29.A2" office:value-type="string">
            <text:p text:style-name="P7">Requisito de desbloqueo: alcanzar el Nivel 5 del Laboratorio (aproximadamente 7 a 10 dias de juego organico).</text:p>
          </table:table-cell>
        </table:table-row>
        <table:table-row>
          <table:table-cell table:style-name="Tabla29.A2" office:value-type="string">
            <text:p text:style-name="P7">Coste en EV: 3,000 EV (identico al precio de un Bio-Nucleo Comun en tienda).</text:p>
          </table:table-cell>
        </table:table-row>
        <table:table-row>
          <table:table-cell table:style-name="Tabla29.A2" office:value-type="string">
            <text:p text:style-name="P7">Razon del precio: el jugador que quiere comerciar debe demostrar el mismo nivel de compromiso</text:p>
          </table:table-cell>
        </table:table-row>
        <table:table-row>
          <table:table-cell table:style-name="Tabla29.A2" office:value-type="string">
            <text:p text:style-name="P7">que alguien que va a criar su primer Geno. No es un muro frustrante, es un filtro de intencion.</text:p>
          </table:table-cell>
        </table:table-row>
        <table:table-row>
          <table:table-cell table:style-name="Tabla29.A2" office:value-type="string">
            <text:p text:style-name="P7">Efecto al adquirirla: el juego activa la API de Privy y el jugador puede configurar su wallet.</text:p>
          </table:table-cell>
        </table:table-row>
        <table:table-row>
          <table:table-cell table:style-name="Tabla29.A2" office:value-type="string">
            <text:p text:style-name="P7">Es un pago unico y permanente. No hay cuotas de renovacion.</text:p>
          </table:table-cell>
        </table:table-row>
      </table:table>
      <text:p text:style-name="P15"> </text:p>
      <text:h text:style-name="P12" text:outline-level="2">9.3  La encapsulacion de EV: mecanica y flujo completo</text:h>
      <text:p text:style-name="P10">La encapsulacion es el proceso por el que un jugador convierte EV digital (saldo interno) en un item fisico transaccionable en el Marketplace Web3. Este proceso incluye un impuesto del 10% que actua como el principal sumidero deflacionario del sistema.</text:p>
      <text:p text:style-name="P11"> </text:p>
      <text:h text:style-name="P22" text:outline-level="3">Regla del impuesto de encapsulacion</text:h>
      <text:p text:style-name="P21"><text:span text:style-name="T3">•      </text:span><text:span text:style-name="T4">Para encapsular y vender 1,000 EV, el jugador debe pagar 1,100 EV de su saldo.</text:span></text:p>
      <text:p text:style-name="P21"><text:span text:style-name="T3">•      </text:span><text:span text:style-name="T4">Los 100 EV de diferencia son destruidos permanentemente en el backend (quemados), reduciendo la masa monetaria total del servidor.</text:span></text:p>
      <text:p text:style-name="P21"><text:span text:style-name="T3">•      </text:span><text:span text:style-name="T4">Este impuesto del 10% es automatico, irrevocable y no negociable.</text:span></text:p>
      <text:p text:style-name="P11"> </text:p>
      <text:h text:style-name="P22" text:outline-level="3"><text:soft-page-break/>Lotes fijos de capsulas en el Marketplace</text:h>
      <text:p text:style-name="P10">Para evitar la fragmentacion de la base de datos y facilitar la compra rapida por parte de los jugadores Web3, solo se permiten lotes fijos estandarizados:</text:p>
      <text:p text:style-name="P24"> </text:p>
      <table:table table:name="Tabla30" table:style-name="Tabla30">
        <table:table-column table:style-name="Tabla30.A"/>
        <table:table-column table:style-name="Tabla30.B"/>
        <table:table-column table:style-name="Tabla30.C"/>
        <table:table-column table:style-name="Tabla30.B"/>
        <table:table-row>
          <table:table-cell table:style-name="Tabla30.A1" office:value-type="string">
            <text:p text:style-name="P23">Tipo de capsula</text:p>
          </table:table-cell>
          <table:table-cell table:style-name="Tabla30.A1" office:value-type="string">
            <text:p text:style-name="P23">EV que recibe el comprador</text:p>
          </table:table-cell>
          <table:table-cell table:style-name="Tabla30.A1" office:value-type="string">
            <text:p text:style-name="P23">EV que paga el vendedor F2P</text:p>
          </table:table-cell>
          <table:table-cell table:style-name="Tabla30.A1" office:value-type="string">
            <text:p text:style-name="P23">EV quemados (10%)</text:p>
          </table:table-cell>
        </table:table-row>
        <table:table-row>
          <table:table-cell table:style-name="Tabla30.A2" office:value-type="string">
            <text:p text:style-name="P18">Capsula de Esencia Comun</text:p>
          </table:table-cell>
          <table:table-cell table:style-name="Tabla30.A2" office:value-type="string">
            <text:p text:style-name="P18">5,000 EV</text:p>
          </table:table-cell>
          <table:table-cell table:style-name="Tabla30.A2" office:value-type="string">
            <text:p text:style-name="P18">5,500 EV</text:p>
          </table:table-cell>
          <table:table-cell table:style-name="Tabla30.A2" office:value-type="string">
            <text:p text:style-name="P18">500 EV destruidos</text:p>
          </table:table-cell>
        </table:table-row>
        <table:table-row>
          <table:table-cell table:style-name="Tabla30.A3" office:value-type="string">
            <text:p text:style-name="P18">Capsula de Esencia Mayor</text:p>
          </table:table-cell>
          <table:table-cell table:style-name="Tabla30.A3" office:value-type="string">
            <text:p text:style-name="P18">10,000 EV</text:p>
          </table:table-cell>
          <table:table-cell table:style-name="Tabla30.A3" office:value-type="string">
            <text:p text:style-name="P18">11,000 EV</text:p>
          </table:table-cell>
          <table:table-cell table:style-name="Tabla30.A3" office:value-type="string">
            <text:p text:style-name="P18">1,000 EV destruidos</text:p>
          </table:table-cell>
        </table:table-row>
      </table:table>
      <text:p text:style-name="P11"> </text:p>
      <text:h text:style-name="P22" text:outline-level="3">El item fisico: Geno_Essence_Capsule</text:h>
      <text:p text:style-name="P21"><text:span text:style-name="T3">•      </text:span><text:span text:style-name="T4">Cuando el jugador paga los 5,500 EV (para la capsula comun), el backend descuenta ese saldo de su wallet interna y le entrega en su inventario un item semi-fungible: la Capsula de 5,000 EV.</text:span></text:p>
      <text:p text:style-name="P21"><text:span text:style-name="T3">•      </text:span><text:span text:style-name="T4">Este item fisico es el que se publica en el Marketplace por el precio en $POL que el vendedor elija.</text:span></text:p>
      <text:p text:style-name="P21"><text:span text:style-name="T3">•      </text:span><text:span text:style-name="T4">Cuando el comprador Web3 adquiere la capsula, el item es destruido y las 5,000 EV son inyectadas directamente en su saldo digital interno.</text:span></text:p>
      <text:p text:style-name="P15"> </text:p>
      <text:h text:style-name="P12" text:outline-level="2">9.4  El modelo de ingresos del Marketplace</text:h>
      <table:table table:name="Tabla31" table:style-name="Tabla31">
        <table:table-column table:style-name="Tabla31.A"/>
        <table:table-row>
          <table:table-cell table:style-name="Tabla31.A1" office:value-type="string">
            <text:p text:style-name="P27">Flujo de ingresos del 3.5% para el proyecto</text:p>
          </table:table-cell>
        </table:table-row>
        <table:table-row>
          <table:table-cell table:style-name="Tabla31.A2" office:value-type="string">
            <text:p text:style-name="P7">Sobre cada venta de capsula en el Marketplace, el smart contract de GenosPlazaComercio retiene</text:p>
          </table:table-cell>
        </table:table-row>
        <table:table-row>
          <table:table-cell table:style-name="Tabla31.A2" office:value-type="string">
            <text:p text:style-name="P7">automaticamente un 3.5% del $POL de la transaccion como comision para el proyecto.</text:p>
          </table:table-cell>
        </table:table-row>
        <table:table-row>
          <table:table-cell table:style-name="Tabla31.A2" office:value-type="string">
            <text:p text:style-name="P7">Este 3.5% se aplica sobre el valor total en $POL de la venta, no sobre el EV.</text:p>
          </table:table-cell>
        </table:table-row>
        <table:table-row>
          <table:table-cell table:style-name="Tabla31.A2" office:value-type="string">
            <text:p text:style-name="P7">El 3.5% es la principal fuente de ingresos operativos recurrentes del juego una vez en produccion.</text:p>
          </table:table-cell>
        </table:table-row>
        <table:table-row>
          <table:table-cell table:style-name="Tabla31.A2" office:value-type="string">
            <text:p text:style-name="P7">CRITICO: esta logica debe vivir en el smart contract on-chain, no solo en el backend Firebase/Supabase.</text:p>
          </table:table-cell>
        </table:table-row>
        <table:table-row>
          <table:table-cell table:style-name="Tabla31.A2" office:value-type="string">
            <text:p text:style-name="P7">Si la validacion de la Licencia y el cobro del 3.5% solo existen en el backend, pueden ser eludidos.</text:p>
          </table:table-cell>
        </table:table-row>
      </table:table>
      <text:p text:style-name="P11"> </text:p>
      <text:p text:style-name="P10">Controles anti-abuso integrados en el sistema:</text:p>
      <text:p text:style-name="P24"> </text:p>
      <table:table table:name="Tabla32" table:style-name="Tabla32">
        <table:table-column table:style-name="Tabla32.A"/>
        <table:table-column table:style-name="Tabla32.B"/>
        <table:table-column table:style-name="Tabla32.C"/>
        <text:soft-page-break/>
        <table:table-row>
          <table:table-cell table:style-name="Tabla32.A1" office:value-type="string">
            <text:p text:style-name="P23">Control</text:p>
          </table:table-cell>
          <table:table-cell table:style-name="Tabla32.A1" office:value-type="string">
            <text:p text:style-name="P23">Mecanismo</text:p>
          </table:table-cell>
          <table:table-cell table:style-name="Tabla32.A1" office:value-type="string">
            <text:p text:style-name="P23">Problema que previene</text:p>
          </table:table-cell>
        </table:table-row>
        <table:table-row>
          <table:table-cell table:style-name="Tabla32.A2" office:value-type="string">
            <text:p text:style-name="P18">Barrera del Lab Nivel 5</text:p>
          </table:table-cell>
          <table:table-cell table:style-name="Tabla32.A2" office:value-type="string">
            <text:p text:style-name="P18">Solo jugadores con Lab Nv.5 (7-10 dias de juego) pueden activar la Licencia.</text:p>
          </table:table-cell>
          <table:table-cell table:style-name="Tabla32.A2" office:value-type="string">
            <text:p text:style-name="P18">Impide que bots creen cuentas y vendan EV desde el primer dia.</text:p>
          </table:table-cell>
        </table:table-row>
        <table:table-row>
          <table:table-cell table:style-name="Tabla32.A3" office:value-type="string">
            <text:p text:style-name="P18">Impuesto del 10% por encapsulacion</text:p>
          </table:table-cell>
          <table:table-cell table:style-name="Tabla32.A3" office:value-type="string">
            <text:p text:style-name="P18">Por cada 5,000 EV vendidos se queman 500 EV del vendedor.</text:p>
          </table:table-cell>
          <table:table-cell table:style-name="Tabla32.A3" office:value-type="string">
            <text:p text:style-name="P18">Desincentiva la creacion masiva de capsulas y controla la inflacion.</text:p>
          </table:table-cell>
        </table:table-row>
        <table:table-row>
          <table:table-cell table:style-name="Tabla32.A2" office:value-type="string">
            <text:p text:style-name="P18">Lotes fijos estandarizados</text:p>
          </table:table-cell>
          <table:table-cell table:style-name="Tabla32.A2" office:value-type="string">
            <text:p text:style-name="P18">No se permiten cantidades arbitrarias. Solo 5,000 y 10,000 EV.</text:p>
          </table:table-cell>
          <table:table-cell table:style-name="Tabla32.A2" office:value-type="string">
            <text:p text:style-name="P18">Evita el spam de micro-ventas que saturan la base de datos.</text:p>
          </table:table-cell>
        </table:table-row>
        <table:table-row>
          <table:table-cell table:style-name="Tabla32.A3" office:value-type="string">
            <text:p text:style-name="P18">Licencia de Comercio: 3,000 EV</text:p>
          </table:table-cell>
          <table:table-cell table:style-name="Tabla32.A3" office:value-type="string">
            <text:p text:style-name="P18">Filtro economico accesible pero no trivial para un jugador nuevo.</text:p>
          </table:table-cell>
          <table:table-cell table:style-name="Tabla32.A3" office:value-type="string">
            <text:p text:style-name="P18">Separa a los comerciantes activos de los jugadores casuales.</text:p>
          </table:table-cell>
        </table:table-row>
      </table:table>
      <text:p text:style-name="P15"> </text:p>
      <text:h text:style-name="P12" text:outline-level="2">9.5  Ciclo economico completo del Marketplace</text:h>
      <text:p text:style-name="P10">El siguiente flujo describe el ciclo completo desde que el jugador F2P genera EV hasta que el jugador Web3 la consume:</text:p>
      <text:p text:style-name="P13"> </text:p>
      <table:table table:name="Tabla33" table:style-name="Tabla33">
        <table:table-column table:style-name="Tabla33.A"/>
        <table:table-row>
          <table:table-cell table:style-name="Tabla33.A1" office:value-type="string">
            <text:p text:style-name="P6">Flujo completo: F2P a Web3 a consumo</text:p>
          </table:table-cell>
        </table:table-row>
        <table:table-row>
          <table:table-cell table:style-name="Tabla33.A2" office:value-type="string">
            <text:p text:style-name="P7">PASO 1 — JUGADOR F2P: juega PvE durante 7-10 dias, llega a Lab Nv.5, acumula EV.</text:p>
          </table:table-cell>
        </table:table-row>
        <table:table-row>
          <table:table-cell table:style-name="Tabla33.A2" office:value-type="string">
            <text:p text:style-name="P7">PASO 2 — LICENCIA: paga 3,000 EV, activa su wallet Privy, accede al Marketplace.</text:p>
          </table:table-cell>
        </table:table-row>
        <table:table-row>
          <table:table-cell table:style-name="Tabla33.A2" office:value-type="string">
            <text:p text:style-name="P7">PASO 3 — ENCAPSULACION: paga 5,500 EV, recibe una Capsula de 5,000 EV en su inventario.</text:p>
          </table:table-cell>
        </table:table-row>
        <table:table-row>
          <table:table-cell table:style-name="Tabla33.A2" office:value-type="string">
            <text:p text:style-name="P26"><text:span text:style-name="T6">    </text:span><text:span text:style-name="T5">Los 500 EV de impuesto son destruidos permanentemente (deflacion).</text:span></text:p>
          </table:table-cell>
        </table:table-row>
        <table:table-row>
          <table:table-cell table:style-name="Tabla33.A2" office:value-type="string">
            <text:p text:style-name="P7">PASO 4 — VENTA: publica la Capsula en el Marketplace por el precio en $POL que elija.</text:p>
          </table:table-cell>
        </table:table-row>
        <table:table-row>
          <table:table-cell table:style-name="Tabla33.A2" office:value-type="string">
            <text:p text:style-name="P7">PASO 5 — COMISION: al venderse, el smart contract retiene 3.5% del $POL para el proyecto.</text:p>
          </table:table-cell>
        </table:table-row>
        <table:table-row>
          <table:table-cell table:style-name="Tabla33.A2" office:value-type="string">
            <text:p text:style-name="P7">PASO 6 — JUGADOR WEB3: recibe la Capsula, la abre, 5,000 EV se inyectan en su saldo.</text:p>
          </table:table-cell>
        </table:table-row>
        <table:table-row>
          <table:table-cell table:style-name="Tabla33.A2" office:value-type="string">
            <text:p text:style-name="P7">PASO 7 — CONSUMO: el jugador Web3 gasta las 5,000 EV en el Reactor Nv.2, el Dojo, o fusiones.</text:p>
          </table:table-cell>
        </table:table-row>
        <table:table-row>
          <table:table-cell table:style-name="Tabla33.A2" office:value-type="string">
            <text:p text:style-name="P26"><text:span text:style-name="T6">    </text:span><text:span text:style-name="T5">El EV vuelve a circular y eventualmente es destruido por nuevos sumideros.</text:span></text:p>
          </table:table-cell>
        </table:table-row>
      </table:table>
      <text:p text:style-name="P8"> </text:p>
      <text:p text:style-name="Text_20_body"/>
      <text:p text:style-name="P19"> </text:p>
      <text:h text:style-name="P9" text:outline-level="1"><text:soft-page-break/>Seccion 10 — Auditoria del ciclo de vida del jugador F2P</text:h>
      <text:p text:style-name="P5"> </text:p>
      <text:p text:style-name="P10">Esta seccion demuestra con matematica concreta que el bucle economico es justo, fluido y no frustrante para un jugador completamente gratuito. Analiza los primeros 12 dias de juego sin gastar ningun $POL.</text:p>
      <text:p text:style-name="P11"> </text:p>
      <table:table table:name="Tabla34" table:style-name="Tabla34">
        <table:table-column table:style-name="Tabla34.A"/>
        <table:table-row>
          <table:table-cell table:style-name="Tabla34.A1" office:value-type="string">
            <text:p text:style-name="P27">Supuestos base de la auditoria</text:p>
          </table:table-cell>
        </table:table-row>
        <table:table-row>
          <table:table-cell table:style-name="Tabla34.A2" office:value-type="string">
            <text:p text:style-name="P7">Generacion diaria: 4,000 EV por sesion completa (media documentada en la Seccion 11).</text:p>
          </table:table-cell>
        </table:table-row>
        <table:table-row>
          <table:table-cell table:style-name="Tabla34.A2" office:value-type="string">
            <text:p text:style-name="P7">El jugador inicia con 6 ranuras de almacen gratuitas y 1 Geno de partida.</text:p>
          </table:table-cell>
        </table:table-row>
        <table:table-row>
          <table:table-cell table:style-name="Tabla34.A2" office:value-type="string">
            <text:p text:style-name="P7">Cero gastos en $POL. Todo se paga en EV.</text:p>
          </table:table-cell>
        </table:table-row>
        <table:table-row>
          <table:table-cell table:style-name="Tabla34.A2" office:value-type="string">
            <text:p text:style-name="P7">Los caminos de gasto son libres: no existe orden obligatorio. Cada jugador adapta su estrategia.</text:p>
          </table:table-cell>
        </table:table-row>
        <table:table-row>
          <table:table-cell table:style-name="Tabla34.A2" office:value-type="string">
            <text:p text:style-name="P7">La auditoria asume el camino de fusion mas rapido posible para demostrar el caso favorable.</text:p>
          </table:table-cell>
        </table:table-row>
      </table:table>
      <text:p text:style-name="P15"> </text:p>
      <text:h text:style-name="P12" text:outline-level="2">10.1  Resumen del ciclo en tabla</text:h>
      <table:table table:name="Tabla35" table:style-name="Tabla35">
        <table:table-column table:style-name="Tabla35.A"/>
        <table:table-column table:style-name="Tabla35.B"/>
        <table:table-column table:style-name="Tabla35.C"/>
        <table:table-column table:style-name="Tabla35.D"/>
        <table:table-column table:style-name="Tabla35.A"/>
        <table:table-row>
          <table:table-cell table:style-name="Tabla35.A1" office:value-type="string">
            <text:p text:style-name="P23">Fase</text:p>
          </table:table-cell>
          <table:table-cell table:style-name="Tabla35.A1" office:value-type="string">
            <text:p text:style-name="P23">Dias</text:p>
          </table:table-cell>
          <table:table-cell table:style-name="Tabla35.A1" office:value-type="string">
            <text:p text:style-name="P23">EV generado</text:p>
          </table:table-cell>
          <table:table-cell table:style-name="Tabla35.A1" office:value-type="string">
            <text:p text:style-name="P23">Gasto principal</text:p>
          </table:table-cell>
          <table:table-cell table:style-name="Tabla35.A1" office:value-type="string">
            <text:p text:style-name="P23">EV final</text:p>
          </table:table-cell>
        </table:table-row>
        <table:table-row>
          <table:table-cell table:style-name="Tabla35.A2" office:value-type="string">
            <text:p text:style-name="P18">Inicio y exploracion</text:p>
          </table:table-cell>
          <table:table-cell table:style-name="Tabla35.A2" office:value-type="string">
            <text:p text:style-name="P18">1-3</text:p>
          </table:table-cell>
          <table:table-cell table:style-name="Tabla35.A2" office:value-type="string">
            <text:p text:style-name="P18">12,000 EV</text:p>
          </table:table-cell>
          <table:table-cell table:style-name="Tabla35.A2" office:value-type="string">
            <text:p text:style-name="P18">Variable segun estrategia elegida por el jugador</text:p>
          </table:table-cell>
          <table:table-cell table:style-name="Tabla35.A2" office:value-type="string">
            <text:p text:style-name="P18">~8,000-12,000 EV</text:p>
          </table:table-cell>
        </table:table-row>
        <table:table-row>
          <table:table-cell table:style-name="Tabla35.A3" office:value-type="string">
            <text:p text:style-name="P18">Crianza de los 5 Genos</text:p>
          </table:table-cell>
          <table:table-cell table:style-name="Tabla35.A3" office:value-type="string">
            <text:p text:style-name="P18">4-7</text:p>
          </table:table-cell>
          <table:table-cell table:style-name="Tabla35.A3" office:value-type="string">
            <text:p text:style-name="P18">+16,000 EV</text:p>
          </table:table-cell>
          <table:table-cell table:style-name="Tabla35.A3" office:value-type="string">
            <text:p text:style-name="P18">Tasas crianza ~7,000 + incubadoras 5,000</text:p>
          </table:table-cell>
          <table:table-cell table:style-name="Tabla35.A3" office:value-type="string">
            <text:p text:style-name="P18">~1,500-4,000 EV</text:p>
          </table:table-cell>
        </table:table-row>
        <table:table-row>
          <table:table-cell table:style-name="Tabla35.A2" office:value-type="string">
            <text:p text:style-name="P18">Primera fusion</text:p>
          </table:table-cell>
          <table:table-cell table:style-name="Tabla35.A2" office:value-type="string">
            <text:p text:style-name="P18">8-10</text:p>
          </table:table-cell>
          <table:table-cell table:style-name="Tabla35.A2" office:value-type="string">
            <text:p text:style-name="P18">+12,000 EV</text:p>
          </table:table-cell>
          <table:table-cell table:style-name="Tabla35.A2" office:value-type="string">
            <text:p text:style-name="P18">Tasa Reactor Nv.1: 5,000 EV</text:p>
          </table:table-cell>
          <table:table-cell table:style-name="Tabla35.A2" office:value-type="string">
            <text:p text:style-name="P18">~8,500 EV</text:p>
          </table:table-cell>
        </table:table-row>
        <table:table-row>
          <table:table-cell table:style-name="Tabla35.A3" office:value-type="string">
            <text:p text:style-name="P18">Reintento si Colapso</text:p>
          </table:table-cell>
          <table:table-cell table:style-name="Tabla35.A3" office:value-type="string">
            <text:p text:style-name="P18">11-12</text:p>
          </table:table-cell>
          <table:table-cell table:style-name="Tabla35.A3" office:value-type="string">
            <text:p text:style-name="P18">+4,000 EV/dia</text:p>
          </table:table-cell>
          <table:table-cell table:style-name="Tabla35.A3" office:value-type="string">
            <text:p text:style-name="P18">Crianza 7,000 + incubadoras 5,000 + Reactor 5,000</text:p>
          </table:table-cell>
          <table:table-cell table:style-name="Tabla35.A3" office:value-type="string">
            <text:p text:style-name="P18">~3,500 EV</text:p>
          </table:table-cell>
        </table:table-row>
      </table:table>
      <text:p text:style-name="P15"> </text:p>
      <text:h text:style-name="P12" text:outline-level="2">10.2  Desglose por fases</text:h>
      <text:p text:style-name="P13"> </text:p>
      <text:h text:style-name="P22" text:outline-level="3">Fase 1: Inicio y exploracion (Dias 1 a 3)</text:h>
      <text:p text:style-name="P21"><text:span text:style-name="T3">•      </text:span><text:span text:style-name="T4">El jugador explora la Energia Nexo en el Arcade y el Coliseo IA, completa misiones diarias, y aprende el loop basico del juego.</text:span></text:p>
      <text:p text:style-name="P21"><text:soft-page-break/><text:span text:style-name="T3">•      </text:span><text:span text:style-name="T4">Balance acumulado al final del Dia 3: aproximadamente 12,000 EV.</text:span></text:p>
      <text:p text:style-name="P21"><text:span text:style-name="T3">•      </text:span><text:span text:style-name="T4">Decisiones opcionales en esta fase: comprar ranuras adicionales, ensenar ataques en el Dojo, adquirir Bio-Nucleos en tienda. Ninguna es obligatoria para llegar a la primera fusion con las 6 ranuras base.</text:span></text:p>
      <text:p text:style-name="P21"><text:span text:style-name="T3">•      </text:span><text:span text:style-name="T4">Los 6 slots gratuitos cubren exactamente lo necesario: 5 Genos de sacrificio + 1 Geno activo.</text:span></text:p>
      <text:p text:style-name="P11"> </text:p>
      <text:h text:style-name="P22" text:outline-level="3">Fase 2: Crianza (Dias 4 a 7)</text:h>
      <text:p text:style-name="P21"><text:span text:style-name="T3">•      </text:span><text:span text:style-name="T4">Los primeros Genos alcanzan Nivel 10 de forma natural combatiendo. El jugador comienza a cruzarlos para producir los 5 Genos de sacrificio.</text:span></text:p>
      <text:p text:style-name="P21"><text:span text:style-name="T3">•      </text:span><text:span text:style-name="T4">Estrategia optima: usar solo las crias 1 y 2 de cada pareja (las mas baratas) rotando multiples parejas en lugar de agotar una sola.</text:span></text:p>
      <text:p text:style-name="P21"><text:span text:style-name="T3">•      </text:span><text:span text:style-name="T4">Las incubadoras de 4 horas crean el primer momento de expectacion genuina del ciclo: el jugador ve sus temporizadores activos.</text:span></text:p>
      <text:p text:style-name="P11"> </text:p>
      <text:h text:style-name="P22" text:outline-level="3">Fase 3: Primera fusion (Dias 8 a 10)</text:h>
      <text:p text:style-name="P21"><text:span text:style-name="T3">•      </text:span><text:span text:style-name="T4">Los 5 Genos Comunes eclosionan. El jugador farmea 3 dias adicionales y llega al Reactor con suficiente EV para la tasa de 5,000 EV y conservar un colchon de seguridad.</text:span></text:p>
      <text:p text:style-name="P13"> </text:p>
      <text:p text:style-name="P10">Analisis de los 4 posibles resultados el Dia 10:</text:p>
      <text:p text:style-name="P24"> </text:p>
      <table:table table:name="Tabla36" table:style-name="Tabla36">
        <table:table-column table:style-name="Tabla36.A"/>
        <table:table-row>
          <table:table-cell table:style-name="Tabla36.A1" office:value-type="string">
            <text:p text:style-name="P20">Exito Normal o Critico (38% de probabilidad)</text:p>
          </table:table-cell>
        </table:table-row>
        <table:table-row>
          <table:table-cell table:style-name="Tabla36.A2" office:value-type="string">
            <text:p text:style-name="P7">Obtiene un Geno Raro o Epico en 10 dias de juego F2P puro.</text:p>
          </table:table-cell>
        </table:table-row>
        <table:table-row>
          <table:table-cell table:style-name="Tabla36.A2" office:value-type="string">
            <text:p text:style-name="P7">Con las 8,500 EV restantes puede entrenar a su nuevo campeon en el Dojo al dia siguiente.</text:p>
          </table:table-cell>
        </table:table-row>
        <table:table-row>
          <table:table-cell table:style-name="Tabla36.A2" office:value-type="string">
            <text:p text:style-name="P7">Retencion esperada: muy alta. El jugador tiene exactamente lo que vino a buscar.</text:p>
          </table:table-cell>
        </table:table-row>
      </table:table>
      <text:p text:style-name="P13"> </text:p>
      <table:table table:name="Tabla37" table:style-name="Tabla37">
        <table:table-column table:style-name="Tabla37.A"/>
        <table:table-row>
          <table:table-cell table:style-name="Tabla37.A1" office:value-type="string">
            <text:p text:style-name="P27">Mutacion Estancada (35% de probabilidad)</text:p>
          </table:table-cell>
        </table:table-row>
        <table:table-row>
          <table:table-cell table:style-name="Tabla37.A2" office:value-type="string">
            <text:p text:style-name="P7">Recibe un Geno Comun+ con +15% de estadisticas base ocultas y un gen dominante.</text:p>
          </table:table-cell>
        </table:table-row>
        <table:table-row>
          <table:table-cell table:style-name="Tabla37.A2" office:value-type="string">
            <text:p text:style-name="P7">No es una derrota: es un especimen de edicion especial, mas fuerte que cualquier Comun normal.</text:p>
          </table:table-cell>
        </table:table-row>
        <table:table-row>
          <table:table-cell table:style-name="Tabla37.A2" office:value-type="string">
            <text:p text:style-name="P7">Es competitivo en torneos de su categoria y un excelente padre de crianza.</text:p>
          </table:table-cell>
        </table:table-row>
        <table:table-row>
          <table:table-cell table:style-name="Tabla37.A2" office:value-type="string">
            <text:p text:style-name="P7">El jugador lo equipa, avanza en la Torre y espera el siguiente torneo de Comunes para competir por $POL.</text:p>
          </table:table-cell>
        </table:table-row>
        <text:soft-page-break/>
        <table:table-row>
          <table:table-cell table:style-name="Tabla37.A2" office:value-type="string">
            <text:p text:style-name="P7">Retencion esperada: alta.</text:p>
          </table:table-cell>
        </table:table-row>
      </table:table>
      <text:p text:style-name="P13"> </text:p>
      <table:table table:name="Tabla38" table:style-name="Tabla38">
        <table:table-column table:style-name="Tabla38.A"/>
        <table:table-row>
          <table:table-cell table:style-name="Tabla38.A1" office:value-type="string">
            <text:p text:style-name="P28">Colapso (27% de probabilidad - el peor escenario)</text:p>
          </table:table-cell>
        </table:table-row>
        <table:table-row>
          <table:table-cell table:style-name="Tabla38.A2" office:value-type="string">
            <text:p text:style-name="P7">Los 5 Genos son destruidos. Hay un impacto emocional inmediato.</text:p>
          </table:table-cell>
        </table:table-row>
        <table:table-row>
          <table:table-cell table:style-name="Tabla38.A2" office:value-type="string">
            <text:p text:style-name="P7">El Reactor reembolsa 8,000 EV al instante como seguro automatico.</text:p>
          </table:table-cell>
        </table:table-row>
        <table:table-row>
          <table:table-cell table:style-name="Tabla38.A2" office:value-type="string">
            <text:p text:style-name="P7">Las EV guardadas (~8,500) + el seguro = 16,500 EV liquidas disponibles de inmediato.</text:p>
          </table:table-cell>
        </table:table-row>
        <table:table-row>
          <table:table-cell table:style-name="Tabla38.A2" office:value-type="string">
            <text:p text:style-name="P7">El ciclo de reintento completo (crianza + incubadoras + tasa Reactor) cuesta ~17,000 EV.</text:p>
          </table:table-cell>
        </table:table-row>
        <table:table-row>
          <table:table-cell table:style-name="Tabla38.A2" office:value-type="string">
            <text:p text:style-name="P7">Resultado: el jugador puede reintentar la fusion en solo 48 horas, no en otros 10 dias.</text:p>
          </table:table-cell>
        </table:table-row>
      </table:table>
      <text:p text:style-name="P11"> </text:p>
      <text:h text:style-name="P22" text:outline-level="3">Fase 4: Segunda oportunidad (Dias 11 y 12, solo si hubo Colapso)</text:h>
      <text:p text:style-name="P21"><text:span text:style-name="T3">•      </text:span><text:span text:style-name="T4">Dia 11: el jugador se despierta con 16,500 EV. Farmea su sesion habitual: 20,500 EV disponibles.</text:span></text:p>
      <text:p text:style-name="P21"><text:span text:style-name="T3">•      </text:span><text:span text:style-name="T4">Paga una nueva tanda de crianza (~7,000 EV) y 5 incubadoras (5,000 EV). Le quedan ~8,500 EV.</text:span></text:p>
      <text:p text:style-name="P21"><text:span text:style-name="T3">•      </text:span><text:span text:style-name="T4">CLAVE: las ranuras de almacen ya estan compradas. No hay ningun coste adicional de infraestructura.</text:span></text:p>
      <text:p text:style-name="P21"><text:span text:style-name="T3">•      </text:span><text:span text:style-name="T4">Dia 12: los huevos eclosionan en 4 horas. El jugador farmea (4,000 EV) y ejecuta su segundo intento de fusion 48 horas despues del primero.</text:span></text:p>
      <text:p text:style-name="P16">El segundo intento ocurre 48 horas despues del primer fallo, no 10 dias. Este es el argumento matematico mas solido contra el abandono del jugador F2P tras un Colapso.</text:p>
      <text:p text:style-name="P15"> </text:p>
      <text:h text:style-name="P12" text:outline-level="2">10.3  Los tres arquetipos de jugador F2P</text:h>
      <text:p text:style-name="P10">El diseno soporta multiples rutas estrategicas sin que sea necesario codificar caminos separados. Tres arquetipos emergen de forma natural con la misma arquitectura economica:</text:p>
      <text:p text:style-name="P13"> </text:p>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23">Arquetipo</text:p>
          </table:table-cell>
          <table:table-cell table:style-name="Tabla39.A1" office:value-type="string">
            <text:p text:style-name="P23">Estrategia</text:p>
          </table:table-cell>
          <table:table-cell table:style-name="Tabla39.A1" office:value-type="string">
            <text:p text:style-name="P23">Primer fusion</text:p>
          </table:table-cell>
          <table:table-cell table:style-name="Tabla39.A1" office:value-type="string">
            <text:p text:style-name="P23">Ventaja principal</text:p>
          </table:table-cell>
        </table:table-row>
        <table:table-row>
          <table:table-cell table:style-name="Tabla39.A2" office:value-type="string">
            <text:p text:style-name="P18">El fusionador rapido</text:p>
          </table:table-cell>
          <table:table-cell table:style-name="Tabla39.A2" office:value-type="string">
            <text:p text:style-name="P18">Sacrifica todo incluyendo su campeon inicial. Maximiza la velocidad al Reactor.</text:p>
          </table:table-cell>
          <table:table-cell table:style-name="Tabla39.A2" office:value-type="string">
            <text:p text:style-name="P18">Dia 8-10</text:p>
          </table:table-cell>
          <table:table-cell table:style-name="Tabla39.A2" office:value-type="string">
            <text:p text:style-name="P18">Llega al Raro mas rapido. Alto riesgo.</text:p>
          </table:table-cell>
        </table:table-row>
        <table:table-row>
          <table:table-cell table:style-name="Tabla39.A3" office:value-type="string">
            <text:p text:style-name="P18">El conservador</text:p>
          </table:table-cell>
          <table:table-cell table:style-name="Tabla39.A3" office:value-type="string">
            <text:p text:style-name="P18">Preserva su mejor Geno. Cria con los demas. Fusiona en paralelo.</text:p>
          </table:table-cell>
          <table:table-cell table:style-name="Tabla39.A3" office:value-type="string">
            <text:p text:style-name="P18">Dia 12-15</text:p>
          </table:table-cell>
          <table:table-cell table:style-name="Tabla39.A3" office:value-type="string">
            <text:p text:style-name="P18">Siempre tiene un campeon activo. Progresion mas lenta pero mas estable.</text:p>
          </table:table-cell>
        </table:table-row>
        <text:soft-page-break/>
        <table:table-row>
          <table:table-cell table:style-name="Tabla39.A2" office:value-type="string">
            <text:p text:style-name="P18">El explorador de Torre</text:p>
          </table:table-cell>
          <table:table-cell table:style-name="Tabla39.A2" office:value-type="string">
            <text:p text:style-name="P18">Prioriza la Torre para acumular mas EV antes de tocar el Reactor.</text:p>
          </table:table-cell>
          <table:table-cell table:style-name="Tabla39.A2" office:value-type="string">
            <text:p text:style-name="P18">Dia 15-20</text:p>
          </table:table-cell>
          <table:table-cell table:style-name="Tabla39.A2" office:value-type="string">
            <text:p text:style-name="P18">Llega con mas colchon economico. Menor riesgo de abandono por Colapso.</text:p>
          </table:table-cell>
        </table:table-row>
      </table:table>
      <text:p text:style-name="P16">Los tres arquetipos son viables y rentables para el proyecto. No es necesario favorecer ninguno: la libertad de eleccion es uno de los argumentos mas fuertes del diseno para la solicitud de grants y para la comunidad.</text:p>
      <text:p text:style-name="P8"> </text:p>
      <text:p text:style-name="Text_20_body"/>
      <text:p text:style-name="P19"> </text:p>
      <text:h text:style-name="P9" text:outline-level="1">Seccion 11 — Resumen macro para desarrolladores (balance de flujo)</text:h>
      <text:p text:style-name="P5"> </text:p>
      <text:p text:style-name="P10">Esta seccion proporciona las metricas exactas de control del sistema economico para el equipo tecnico que programe Supabase, los scripts de recompensa del backend y los smart contracts de la Plaza de Comercio.</text:p>
      <text:p text:style-name="P15"> </text:p>
      <text:h text:style-name="P12" text:outline-level="2">11.1  Desglose del ingreso diario medio</text:h>
      <text:p text:style-name="P10">Al integrar todas las fuentes de recompensa, la economia de un jugador comun que consuma su energia diaria de forma equilibrada y recolecte sus bonos de retencion se comporta bajo las siguientes metricas exactas:</text:p>
      <text:p text:style-name="P13"> </text:p>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23">Fuente de EV</text:p>
          </table:table-cell>
          <table:table-cell table:style-name="Tabla40.A1" office:value-type="string">
            <text:p text:style-name="P23">EV diarios</text:p>
          </table:table-cell>
          <table:table-cell table:style-name="Tabla40.A1" office:value-type="string">
            <text:p text:style-name="P23">Tipo</text:p>
          </table:table-cell>
          <table:table-cell table:style-name="Tabla40.A1" office:value-type="string">
            <text:p text:style-name="P23">Notas</text:p>
          </table:table-cell>
        </table:table-row>
        <table:table-row>
          <table:table-cell table:style-name="Tabla40.A2" office:value-type="string">
            <text:p text:style-name="P18">Cap diario de Cuidado (3 Genos activos)</text:p>
          </table:table-cell>
          <table:table-cell table:style-name="Tabla40.A2" office:value-type="string">
            <text:p text:style-name="P18">150 EV</text:p>
          </table:table-cell>
          <table:table-cell table:style-name="Tabla40.A2" office:value-type="string">
            <text:p text:style-name="P18">Pasivo/fijo</text:p>
          </table:table-cell>
          <table:table-cell table:style-name="Tabla40.A2" office:value-type="string">
            <text:p text:style-name="P18">Tope absoluto por cuenta. No escalable con mas Genos.</text:p>
          </table:table-cell>
        </table:table-row>
        <table:table-row>
          <table:table-cell table:style-name="Tabla40.A3" office:value-type="string">
            <text:p text:style-name="P18">Misiones diarias (3 de 3)</text:p>
          </table:table-cell>
          <table:table-cell table:style-name="Tabla40.A3" office:value-type="string">
            <text:p text:style-name="P18">300 EV</text:p>
          </table:table-cell>
          <table:table-cell table:style-name="Tabla40.A3" office:value-type="string">
            <text:p text:style-name="P18">Activo/fijo</text:p>
          </table:table-cell>
          <table:table-cell table:style-name="Tabla40.A3" office:value-type="string">
            <text:p text:style-name="P18">100 EV x 3 misiones completadas.</text:p>
          </table:table-cell>
        </table:table-row>
        <table:table-row>
          <table:table-cell table:style-name="Tabla40.A2" office:value-type="string">
            <text:p text:style-name="P18">Cofre de bonificacion diario</text:p>
          </table:table-cell>
          <table:table-cell table:style-name="Tabla40.A2" office:value-type="string">
            <text:p text:style-name="P18">300 EV</text:p>
          </table:table-cell>
          <table:table-cell table:style-name="Tabla40.A2" office:value-type="string">
            <text:p text:style-name="P18">Activo/fijo</text:p>
          </table:table-cell>
          <table:table-cell table:style-name="Tabla40.A2" office:value-type="string">
            <text:p text:style-name="P18">Se libera al completar las 3 misiones del dia.</text:p>
          </table:table-cell>
        </table:table-row>
        <table:table-row>
          <table:table-cell table:style-name="Tabla40.A3" office:value-type="string">
            <text:p text:style-name="P18">Racha de login (media semanal)</text:p>
          </table:table-cell>
          <table:table-cell table:style-name="Tabla40.A3" office:value-type="string">
            <text:p text:style-name="P18">~200 EV</text:p>
          </table:table-cell>
          <table:table-cell table:style-name="Tabla40.A3" office:value-type="string">
            <text:p text:style-name="P18">Pasivo/variable</text:p>
          </table:table-cell>
          <table:table-cell table:style-name="Tabla40.A3" office:value-type="string">
            <text:p text:style-name="P18">Media del ciclo de 7 dias dividida entre 7.</text:p>
          </table:table-cell>
        </table:table-row>
        <text:soft-page-break/>
        <table:table-row>
          <table:table-cell table:style-name="Tabla40.A2" office:value-type="string">
            <text:p text:style-name="P18">Subtotal pasivo y de baja exigencia</text:p>
          </table:table-cell>
          <table:table-cell table:style-name="Tabla40.A2" office:value-type="string">
            <text:p text:style-name="P18">~950 EV</text:p>
          </table:table-cell>
          <table:table-cell table:style-name="Tabla40.A2" office:value-type="string">
            <text:p text:style-name="P18">SUBTOTAL</text:p>
          </table:table-cell>
          <table:table-cell table:style-name="Tabla40.A2" office:value-type="string">
            <text:p text:style-name="P18">EV garantizados por actividad minima diaria.</text:p>
          </table:table-cell>
        </table:table-row>
        <table:table-row>
          <table:table-cell table:style-name="Tabla40.A3" office:value-type="string">
            <text:p text:style-name="P18">Juego activo (100 Energia Nexo, ruta mixta)</text:p>
          </table:table-cell>
          <table:table-cell table:style-name="Tabla40.A3" office:value-type="string">
            <text:p text:style-name="P18">~3,000 EV</text:p>
          </table:table-cell>
          <table:table-cell table:style-name="Tabla40.A3" office:value-type="string">
            <text:p text:style-name="P18">Activo/variable</text:p>
          </table:table-cell>
          <table:table-cell table:style-name="Tabla40.A3" office:value-type="string">
            <text:p text:style-name="P18">Arcade + Coliseo + Torre en combinacion optima.</text:p>
          </table:table-cell>
        </table:table-row>
        <table:table-row>
          <table:table-cell table:style-name="Tabla40.A2" office:value-type="string">
            <text:p text:style-name="P18">TOTAL MEDIO DIARIO</text:p>
          </table:table-cell>
          <table:table-cell table:style-name="Tabla40.A2" office:value-type="string">
            <text:p text:style-name="P18">~4,000 EV</text:p>
          </table:table-cell>
          <table:table-cell table:style-name="Tabla40.A2" office:value-type="string">
            <text:p text:style-name="P18">TOTAL</text:p>
          </table:table-cell>
          <table:table-cell table:style-name="Tabla40.A2" office:value-type="string">
            <text:p text:style-name="P18">Jugador activo que consume toda su energia.</text:p>
          </table:table-cell>
        </table:table-row>
      </table:table>
      <text:p text:style-name="P15"> </text:p>
      <text:h text:style-name="P12" text:outline-level="2">11.2  Tiempo para alcanzar los sumideros principales</text:h>
      <text:p text:style-name="P10">Referencia practica para calibrar la velocidad de progresion y detectar desbalances:</text:p>
      <text:p text:style-name="P13"> </text:p>
      <table:table table:name="Tabla41" table:style-name="Tabla41">
        <table:table-column table:style-name="Tabla41.A"/>
        <table:table-column table:style-name="Tabla41.B"/>
        <table:table-column table:style-name="Tabla41.C"/>
        <table:table-column table:style-name="Tabla41.D"/>
        <table:table-row>
          <table:table-cell table:style-name="Tabla41.A1" office:value-type="string">
            <text:p text:style-name="P23">Objetivo (sink)</text:p>
          </table:table-cell>
          <table:table-cell table:style-name="Tabla41.A1" office:value-type="string">
            <text:p text:style-name="P23">Coste en EV</text:p>
          </table:table-cell>
          <table:table-cell table:style-name="Tabla41.A1" office:value-type="string">
            <text:p text:style-name="P23">Dias de juego activo necesarios</text:p>
          </table:table-cell>
          <table:table-cell table:style-name="Tabla41.A1" office:value-type="string">
            <text:p text:style-name="P23">Nota estrategica</text:p>
          </table:table-cell>
        </table:table-row>
        <table:table-row>
          <table:table-cell table:style-name="Tabla41.A2" office:value-type="string">
            <text:p text:style-name="P18">Aprender Ataque Basico (Dojo)</text:p>
          </table:table-cell>
          <table:table-cell table:style-name="Tabla41.A2" office:value-type="string">
            <text:p text:style-name="P18">1,000 EV</text:p>
          </table:table-cell>
          <table:table-cell table:style-name="Tabla41.A2" office:value-type="string">
            <text:p text:style-name="P18">0.25 dias</text:p>
          </table:table-cell>
          <table:table-cell table:style-name="Tabla41.A2" office:value-type="string">
            <text:p text:style-name="P18">Accesible el primer dia de juego.</text:p>
          </table:table-cell>
        </table:table-row>
        <table:table-row>
          <table:table-cell table:style-name="Tabla41.A3" office:value-type="string">
            <text:p text:style-name="P18">Aprender Ataque Especial Slot 2 (Dojo)</text:p>
          </table:table-cell>
          <table:table-cell table:style-name="Tabla41.A3" office:value-type="string">
            <text:p text:style-name="P18">4,000 EV</text:p>
          </table:table-cell>
          <table:table-cell table:style-name="Tabla41.A3" office:value-type="string">
            <text:p text:style-name="P18">1 dia</text:p>
          </table:table-cell>
          <table:table-cell table:style-name="Tabla41.A3" office:value-type="string">
            <text:p text:style-name="P18">Meta del primer o segundo dia.</text:p>
          </table:table-cell>
        </table:table-row>
        <table:table-row>
          <table:table-cell table:style-name="Tabla41.A2" office:value-type="string">
            <text:p text:style-name="P18">Aprender Ataque Definitivo (Dojo)</text:p>
          </table:table-cell>
          <table:table-cell table:style-name="Tabla41.A2" office:value-type="string">
            <text:p text:style-name="P18">10,000 EV</text:p>
          </table:table-cell>
          <table:table-cell table:style-name="Tabla41.A2" office:value-type="string">
            <text:p text:style-name="P18">2.5 dias</text:p>
          </table:table-cell>
          <table:table-cell table:style-name="Tabla41.A2" office:value-type="string">
            <text:p text:style-name="P18">Meta perfecta calibrada para retener sin inflar.</text:p>
          </table:table-cell>
        </table:table-row>
        <table:table-row>
          <table:table-cell table:style-name="Tabla41.A3" office:value-type="string">
            <text:p text:style-name="P18">Escaner de ADN Basico</text:p>
          </table:table-cell>
          <table:table-cell table:style-name="Tabla41.A3" office:value-type="string">
            <text:p text:style-name="P18">1,500 EV</text:p>
          </table:table-cell>
          <table:table-cell table:style-name="Tabla41.A3" office:value-type="string">
            <text:p text:style-name="P18">~0.4 dias</text:p>
          </table:table-cell>
          <table:table-cell table:style-name="Tabla41.A3" office:value-type="string">
            <text:p text:style-name="P18">Herramienta de diagnostico accesible.</text:p>
          </table:table-cell>
        </table:table-row>
        <table:table-row>
          <table:table-cell table:style-name="Tabla41.A2" office:value-type="string">
            <text:p text:style-name="P18">Escaner de ADN Completo</text:p>
          </table:table-cell>
          <table:table-cell table:style-name="Tabla41.A2" office:value-type="string">
            <text:p text:style-name="P18">5,000 EV</text:p>
          </table:table-cell>
          <table:table-cell table:style-name="Tabla41.A2" office:value-type="string">
            <text:p text:style-name="P18">1.25 dias</text:p>
          </table:table-cell>
          <table:table-cell table:style-name="Tabla41.A2" office:value-type="string">
            <text:p text:style-name="P18">Inversion significativa pero justificada.</text:p>
          </table:table-cell>
        </table:table-row>
        <table:table-row>
          <table:table-cell table:style-name="Tabla41.A3" office:value-type="string">
            <text:p text:style-name="P18">Incubadora Basica x5 (tanda de fusion)</text:p>
          </table:table-cell>
          <table:table-cell table:style-name="Tabla41.A3" office:value-type="string">
            <text:p text:style-name="P18">5,000 EV</text:p>
          </table:table-cell>
          <table:table-cell table:style-name="Tabla41.A3" office:value-type="string">
            <text:p text:style-name="P18">1.25 dias</text:p>
          </table:table-cell>
          <table:table-cell table:style-name="Tabla41.A3" office:value-type="string">
            <text:p text:style-name="P18">Coste de eclosionar los 5 Genos de sacrificio.</text:p>
          </table:table-cell>
        </table:table-row>
        <table:table-row>
          <table:table-cell table:style-name="Tabla41.A2" office:value-type="string">
            <text:p text:style-name="P18">Tasa Reactor Nivel 1</text:p>
          </table:table-cell>
          <table:table-cell table:style-name="Tabla41.A2" office:value-type="string">
            <text:p text:style-name="P18">5,000 EV</text:p>
          </table:table-cell>
          <table:table-cell table:style-name="Tabla41.A2" office:value-type="string">
            <text:p text:style-name="P18">1.25 dias</text:p>
          </table:table-cell>
          <table:table-cell table:style-name="Tabla41.A2" office:value-type="string">
            <text:p text:style-name="P18">Solo la tasa; no incluye la crianza.</text:p>
          </table:table-cell>
        </table:table-row>
        <table:table-row>
          <table:table-cell table:style-name="Tabla41.A3" office:value-type="string">
            <text:p text:style-name="P18">Licencia de Comercio Web3</text:p>
          </table:table-cell>
          <table:table-cell table:style-name="Tabla41.A3" office:value-type="string">
            <text:p text:style-name="P18">3,000 EV</text:p>
          </table:table-cell>
          <table:table-cell table:style-name="Tabla41.A3" office:value-type="string">
            <text:p text:style-name="P18">0.75 dias</text:p>
          </table:table-cell>
          <table:table-cell table:style-name="Tabla41.A3" office:value-type="string">
            <text:p text:style-name="P18">Requiere Lab Nv.5 antes del pago.</text:p>
          </table:table-cell>
        </table:table-row>
        <table:table-row>
          <table:table-cell table:style-name="Tabla41.A2" office:value-type="string">
            <text:p text:style-name="P18">Tasa Reactor Nivel 2</text:p>
          </table:table-cell>
          <table:table-cell table:style-name="Tabla41.A2" office:value-type="string">
            <text:p text:style-name="P18">15,000 EV</text:p>
          </table:table-cell>
          <table:table-cell table:style-name="Tabla41.A2" office:value-type="string">
            <text:p text:style-name="P18">3.75 dias</text:p>
          </table:table-cell>
          <table:table-cell table:style-name="Tabla41.A2" office:value-type="string">
            <text:p text:style-name="P18">Exige una base economica solida.</text:p>
          </table:table-cell>
        </table:table-row>
        <table:table-row>
          <table:table-cell table:style-name="Tabla41.A3" office:value-type="string">
            <text:p text:style-name="P18">Tasa Reactor Nivel 3</text:p>
          </table:table-cell>
          <table:table-cell table:style-name="Tabla41.A3" office:value-type="string">
            <text:p text:style-name="P18">30,000 EV</text:p>
          </table:table-cell>
          <table:table-cell table:style-name="Tabla41.A3" office:value-type="string">
            <text:p text:style-name="P18">7.5 dias</text:p>
          </table:table-cell>
          <table:table-cell table:style-name="Tabla41.A3" office:value-type="string">
            <text:p text:style-name="P18">Inversion de alto riesgo. Estabilizador recomendado.</text:p>
          </table:table-cell>
        </table:table-row>
      </table:table>
      <text:p text:style-name="P15"> </text:p>
      <text:h text:style-name="P12" text:outline-level="2"><text:soft-page-break/>11.3  Verificacion del RORS (Ratio de Retorno de Sumideros)</text:h>
      <text:p text:style-name="P10">El RORS de 0.81 indica que por cada 4,000 EV generados en un dia de juego activo, el conjunto de sumideros diseados absorbe en promedio 3,240 EV, dejando 760 EV de acumulacion neta en la cuenta del jugador. Esta acumulacion gradual:</text:p>
      <text:p text:style-name="P13"> </text:p>
      <text:p text:style-name="P21"><text:span text:style-name="T3">•      </text:span><text:span text:style-name="T4">Genera la sensacion de progreso y ahorro que motiva las grandes inversiones (Reactor Nivel 2 o 3).</text:span></text:p>
      <text:p text:style-name="P21"><text:span text:style-name="T3">•      </text:span><text:span text:style-name="T4">No produce hiperinflacion porque los sumideros de alto valor (Dojo Definitivo, Reactor Nivel 3, expansion de almacen) absorben periodicamente los balances acumulados.</text:span></text:p>
      <text:p text:style-name="P21"><text:span text:style-name="T3">•      </text:span><text:span text:style-name="T4">Se equilibra naturalmente sin necesidad de intervenciones manuales del equipo de desarrollo.</text:span></text:p>
      <text:p text:style-name="P37"> </text:p>
      <text:p text:style-name="P5"> </text:p>
      <text:p text:style-name="P38">Proyecto Genos  —  Documento consolidado V1.4  —  Confidencial</text:p>
      <text:p text:style-name="Text_20_body"><text:span text:style-name="T7"><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1T23:22:41.405093800</meta:creation-date>
    <dc:date>2026-06-11T23:23:11.442142800</dc:date>
    <meta:editing-duration>PT30S</meta:editing-duration>
    <meta:editing-cycles>1</meta:editing-cycles>
    <meta:document-statistic meta:table-count="41" meta:image-count="0" meta:object-count="0" meta:page-count="30" meta:paragraph-count="966" meta:word-count="7469" meta:character-count="44525" meta:non-whitespace-character-count="37302"/>
    <meta:generator>LibreOffice/26.2.1.2$Windows_X86_64 LibreOffice_project/620$Build-2</meta:generator>
  </office:meta>
</office:document-meta>
</file>