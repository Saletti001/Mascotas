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185cm" table:align="left"/>
    </style:style>
    <style:style style:name="Tabla1.A" style:family="table-column">
      <style:table-column-properties style:column-width="16.185cm"/>
    </style:style>
    <style:style style:name="Tabla1.A1" style:family="table-cell">
      <style:table-cell-properties style:vertical-align="middle" fo:background-color="#2e5f8a" fo:padding-left="0.282cm" fo:padding-right="0.282cm" fo:padding-top="0.176cm" fo:padding-bottom="0.141cm" fo:border="0.6pt solid #cccccc">
        <style:background-image/>
      </style:table-cell-properties>
    </style:style>
    <style:style style:name="Tabla1.A2" style:family="table-cell">
      <style:table-cell-properties style:vertical-align="middle" fo:background-color="#d5e8f0" fo:padding-left="0.282cm" fo:padding-right="0.282cm" fo:padding-top="0.106cm" fo:padding-bottom="0.106cm" fo:border="0.6pt solid #cccccc">
        <style:background-image/>
      </style:table-cell-properties>
    </style:style>
    <style:style style:name="Tabla2" style:family="table">
      <style:table-properties style:width="16.489cm" table:align="left"/>
    </style:style>
    <style:style style:name="Tabla2.A" style:family="table-column">
      <style:table-column-properties style:column-width="4.147cm"/>
    </style:style>
    <style:style style:name="Tabla2.B" style:family="table-column">
      <style:table-column-properties style:column-width="6.158cm"/>
    </style:style>
    <style:style style:name="Tabla2.C" style:family="table-column">
      <style:table-column-properties style:column-width="6.184cm"/>
    </style:style>
    <style:style style:name="Tabla2.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2.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3" style:family="table">
      <style:table-properties style:width="16.641cm" table:align="left"/>
    </style:style>
    <style:style style:name="Tabla3.A" style:family="table-column">
      <style:table-column-properties style:column-width="3.38cm"/>
    </style:style>
    <style:style style:name="Tabla3.B" style:family="table-column">
      <style:table-column-properties style:column-width="3.644cm"/>
    </style:style>
    <style:style style:name="Tabla3.C" style:family="table-column">
      <style:table-column-properties style:column-width="4.253cm"/>
    </style:style>
    <style:style style:name="Tabla3.D" style:family="table-column">
      <style:table-column-properties style:column-width="5.364cm"/>
    </style:style>
    <style:style style:name="Tabla3.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3.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3.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4" style:family="table">
      <style:table-properties style:width="16.337cm" table:align="left"/>
    </style:style>
    <style:style style:name="Tabla4.A" style:family="table-column">
      <style:table-column-properties style:column-width="8.142cm"/>
    </style:style>
    <style:style style:name="Tabla4.B" style:family="table-column">
      <style:table-column-properties style:column-width="8.195cm"/>
    </style:style>
    <style:style style:name="Tabla4.A1" style:family="table-cell">
      <style:table-cell-properties style:vertical-align="middle" fo:background-color="#2e5f8a" fo:padding-left="0.247cm" fo:padding-right="0.247cm" fo:padding-top="0.141cm" fo:padding-bottom="0.141cm" fo:border="0.6pt solid #cccccc">
        <style:background-image/>
      </style:table-cell-properties>
    </style:style>
    <style:style style:name="Tabla4.A2" style:family="table-cell">
      <style:table-cell-properties style:vertical-align="middle" fo:background-color="#ffffff" fo:padding-left="0.247cm" fo:padding-right="0.247cm" fo:padding-top="0.106cm" fo:padding-bottom="0.106cm" fo:border="0.6pt solid #cccccc">
        <style:background-image/>
      </style:table-cell-properties>
    </style:style>
    <style:style style:name="Tabla4.A3" style:family="table-cell">
      <style:table-cell-properties style:vertical-align="middle" fo:background-color="#f5f5f5" fo:padding-left="0.247cm" fo:padding-right="0.247cm" fo:padding-top="0.106cm" fo:padding-bottom="0.106cm" fo:border="0.6pt solid #cccccc">
        <style:background-image/>
      </style:table-cell-properties>
    </style:style>
    <style:style style:name="Tabla5" style:family="table">
      <style:table-properties style:width="16.489cm" table:align="left"/>
    </style:style>
    <style:style style:name="Tabla5.A" style:family="table-column">
      <style:table-column-properties style:column-width="3.485cm"/>
    </style:style>
    <style:style style:name="Tabla5.B" style:family="table-column">
      <style:table-column-properties style:column-width="5.602cm"/>
    </style:style>
    <style:style style:name="Tabla5.C" style:family="table-column">
      <style:table-column-properties style:column-width="7.401cm"/>
    </style:style>
    <style:style style:name="Tabla5.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5.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5.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6" style:family="table">
      <style:table-properties style:width="16.462cm" table:align="left"/>
    </style:style>
    <style:style style:name="Tabla6.A" style:family="table-column">
      <style:table-column-properties style:column-width="3.829cm"/>
    </style:style>
    <style:style style:name="Tabla6.B" style:family="table-column">
      <style:table-column-properties style:column-width="3.433cm"/>
    </style:style>
    <style:style style:name="Tabla6.C" style:family="table-column">
      <style:table-column-properties style:column-width="9.2cm"/>
    </style:style>
    <style:style style:name="Tabla6.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6.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6.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7" style:family="table">
      <style:table-properties style:width="16.614cm" table:align="left"/>
    </style:style>
    <style:style style:name="Tabla7.A" style:family="table-column">
      <style:table-column-properties style:column-width="4.835cm"/>
    </style:style>
    <style:style style:name="Tabla7.B" style:family="table-column">
      <style:table-column-properties style:column-width="3.115cm"/>
    </style:style>
    <style:style style:name="Tabla7.C" style:family="table-column">
      <style:table-column-properties style:column-width="4.068cm"/>
    </style:style>
    <style:style style:name="Tabla7.D" style:family="table-column">
      <style:table-column-properties style:column-width="4.597cm"/>
    </style:style>
    <style:style style:name="Tabla7.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7.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7.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8" style:family="table">
      <style:table-properties style:width="16.641cm" table:align="left"/>
    </style:style>
    <style:style style:name="Tabla8.A" style:family="table-column">
      <style:table-column-properties style:column-width="4.332cm"/>
    </style:style>
    <style:style style:name="Tabla8.B" style:family="table-column">
      <style:table-column-properties style:column-width="3.221cm"/>
    </style:style>
    <style:style style:name="Tabla8.C" style:family="table-column">
      <style:table-column-properties style:column-width="3.459cm"/>
    </style:style>
    <style:style style:name="Tabla8.D" style:family="table-column">
      <style:table-column-properties style:column-width="5.629cm"/>
    </style:style>
    <style:style style:name="Tabla8.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8.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8.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9" style:family="table">
      <style:table-properties style:width="16.311cm" table:align="left"/>
    </style:style>
    <style:style style:name="Tabla9.A" style:family="table-column">
      <style:table-column-properties style:column-width="8.116cm"/>
    </style:style>
    <style:style style:name="Tabla9.B" style:family="table-column">
      <style:table-column-properties style:column-width="8.195cm"/>
    </style:style>
    <style:style style:name="Tabla9.A1" style:family="table-cell">
      <style:table-cell-properties style:vertical-align="middle" fo:background-color="#2e5f8a" fo:padding-left="0.247cm" fo:padding-right="0.247cm" fo:padding-top="0.141cm" fo:padding-bottom="0.141cm" fo:border="0.6pt solid #cccccc">
        <style:background-image/>
      </style:table-cell-properties>
    </style:style>
    <style:style style:name="Tabla9.A2" style:family="table-cell">
      <style:table-cell-properties style:vertical-align="middle" fo:background-color="#ffffff" fo:padding-left="0.247cm" fo:padding-right="0.247cm" fo:padding-top="0.106cm" fo:padding-bottom="0.106cm" fo:border="0.6pt solid #cccccc">
        <style:background-image/>
      </style:table-cell-properties>
    </style:style>
    <style:style style:name="Tabla9.A3" style:family="table-cell">
      <style:table-cell-properties style:vertical-align="middle" fo:background-color="#f5f5f5" fo:padding-left="0.247cm" fo:padding-right="0.247cm" fo:padding-top="0.106cm" fo:padding-bottom="0.106cm" fo:border="0.6pt solid #cccccc">
        <style:background-image/>
      </style:table-cell-properties>
    </style:style>
    <style:style style:name="Tabla10" style:family="table">
      <style:table-properties style:width="16.489cm" table:align="left"/>
    </style:style>
    <style:style style:name="Tabla10.A" style:family="table-column">
      <style:table-column-properties style:column-width="2.956cm"/>
    </style:style>
    <style:style style:name="Tabla10.B" style:family="table-column">
      <style:table-column-properties style:column-width="4.015cm"/>
    </style:style>
    <style:style style:name="Tabla10.C" style:family="table-column">
      <style:table-column-properties style:column-width="9.518cm"/>
    </style:style>
    <style:style style:name="Tabla10.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0.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0.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1" style:family="table">
      <style:table-properties style:width="16.311cm" table:align="left"/>
    </style:style>
    <style:style style:name="Tabla11.A" style:family="table-column">
      <style:table-column-properties style:column-width="5.152cm"/>
    </style:style>
    <style:style style:name="Tabla11.B" style:family="table-column">
      <style:table-column-properties style:column-width="11.158cm"/>
    </style:style>
    <style:style style:name="Tabla11.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1.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1.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2" style:family="table">
      <style:table-properties style:width="16.311cm" table:align="left"/>
    </style:style>
    <style:style style:name="Tabla12.A" style:family="table-column">
      <style:table-column-properties style:column-width="5.152cm"/>
    </style:style>
    <style:style style:name="Tabla12.B" style:family="table-column">
      <style:table-column-properties style:column-width="11.158cm"/>
    </style:style>
    <style:style style:name="Tabla12.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2.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2.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3" style:family="table">
      <style:table-properties style:width="16.311cm" table:align="left"/>
    </style:style>
    <style:style style:name="Tabla13.A" style:family="table-column">
      <style:table-column-properties style:column-width="5.152cm"/>
    </style:style>
    <style:style style:name="Tabla13.B" style:family="table-column">
      <style:table-column-properties style:column-width="11.158cm"/>
    </style:style>
    <style:style style:name="Tabla13.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3.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3.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4" style:family="table">
      <style:table-properties style:width="16.311cm" table:align="left"/>
    </style:style>
    <style:style style:name="Tabla14.A" style:family="table-column">
      <style:table-column-properties style:column-width="5.152cm"/>
    </style:style>
    <style:style style:name="Tabla14.B" style:family="table-column">
      <style:table-column-properties style:column-width="11.158cm"/>
    </style:style>
    <style:style style:name="Tabla14.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4.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4.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5" style:family="table">
      <style:table-properties style:width="16.311cm" table:align="left"/>
    </style:style>
    <style:style style:name="Tabla15.A" style:family="table-column">
      <style:table-column-properties style:column-width="5.126cm"/>
    </style:style>
    <style:style style:name="Tabla15.B" style:family="table-column">
      <style:table-column-properties style:column-width="11.185cm"/>
    </style:style>
    <style:style style:name="Tabla15.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5.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5.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6" style:family="table">
      <style:table-properties style:width="16.311cm" table:align="left"/>
    </style:style>
    <style:style style:name="Tabla16.A" style:family="table-column">
      <style:table-column-properties style:column-width="5.152cm"/>
    </style:style>
    <style:style style:name="Tabla16.B" style:family="table-column">
      <style:table-column-properties style:column-width="11.158cm"/>
    </style:style>
    <style:style style:name="Tabla16.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6.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6.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17" style:family="table">
      <style:table-properties style:width="16.185cm" table:align="left"/>
    </style:style>
    <style:style style:name="Tabla17.A" style:family="table-column">
      <style:table-column-properties style:column-width="16.185cm"/>
    </style:style>
    <style:style style:name="Tabla17.A1" style:family="table-cell">
      <style:table-cell-properties style:vertical-align="middle" fo:background-color="#1a6b5c" fo:padding-left="0.282cm" fo:padding-right="0.282cm" fo:padding-top="0.176cm" fo:padding-bottom="0.141cm" fo:border="0.6pt solid #cccccc">
        <style:background-image/>
      </style:table-cell-properties>
    </style:style>
    <style:style style:name="Tabla17.A2" style:family="table-cell">
      <style:table-cell-properties style:vertical-align="middle" fo:background-color="#d5ede8" fo:padding-left="0.282cm" fo:padding-right="0.282cm" fo:padding-top="0.106cm" fo:padding-bottom="0.106cm" fo:border="0.6pt solid #cccccc">
        <style:background-image/>
      </style:table-cell-properties>
    </style:style>
    <style:style style:name="Tabla18" style:family="table">
      <style:table-properties style:width="16.185cm" table:align="left"/>
    </style:style>
    <style:style style:name="Tabla18.A" style:family="table-column">
      <style:table-column-properties style:column-width="16.185cm"/>
    </style:style>
    <style:style style:name="Tabla18.A1" style:family="table-cell">
      <style:table-cell-properties style:vertical-align="middle" fo:background-color="#1f3864" fo:padding-left="0.282cm" fo:padding-right="0.282cm" fo:padding-top="0.176cm" fo:padding-bottom="0.141cm" fo:border="0.6pt solid #cccccc">
        <style:background-image/>
      </style:table-cell-properties>
    </style:style>
    <style:style style:name="Tabla18.A2" style:family="table-cell">
      <style:table-cell-properties style:vertical-align="middle" fo:background-color="#d5e8f0" fo:padding-left="0.282cm" fo:padding-right="0.282cm" fo:padding-top="0.106cm" fo:padding-bottom="0.106cm" fo:border="0.6pt solid #cccccc">
        <style:background-image/>
      </style:table-cell-properties>
    </style:style>
    <style:style style:name="Tabla19" style:family="table">
      <style:table-properties style:width="16.489cm" table:align="left"/>
    </style:style>
    <style:style style:name="Tabla19.A" style:family="table-column">
      <style:table-column-properties style:column-width="3.538cm"/>
    </style:style>
    <style:style style:name="Tabla19.B" style:family="table-column">
      <style:table-column-properties style:column-width="4.041cm"/>
    </style:style>
    <style:style style:name="Tabla19.C" style:family="table-column">
      <style:table-column-properties style:column-width="8.909cm"/>
    </style:style>
    <style:style style:name="Tabla19.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19.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19.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20" style:family="table">
      <style:table-properties style:width="16.185cm" table:align="left"/>
    </style:style>
    <style:style style:name="Tabla20.A" style:family="table-column">
      <style:table-column-properties style:column-width="16.185cm"/>
    </style:style>
    <style:style style:name="Tabla20.A1" style:family="table-cell">
      <style:table-cell-properties style:vertical-align="middle" fo:background-color="#7a4a00" fo:padding-left="0.282cm" fo:padding-right="0.282cm" fo:padding-top="0.176cm" fo:padding-bottom="0.141cm" fo:border="0.6pt solid #cccccc">
        <style:background-image/>
      </style:table-cell-properties>
    </style:style>
    <style:style style:name="Tabla20.A2" style:family="table-cell">
      <style:table-cell-properties style:vertical-align="middle" fo:background-color="#fff3cd" fo:padding-left="0.282cm" fo:padding-right="0.282cm" fo:padding-top="0.106cm" fo:padding-bottom="0.106cm" fo:border="0.6pt solid #cccccc">
        <style:background-image/>
      </style:table-cell-properties>
    </style:style>
    <style:style style:name="Tabla21" style:family="table">
      <style:table-properties style:width="16.489cm" table:align="left"/>
    </style:style>
    <style:style style:name="Tabla21.A" style:family="table-column">
      <style:table-column-properties style:column-width="5.046cm"/>
    </style:style>
    <style:style style:name="Tabla21.B" style:family="table-column">
      <style:table-column-properties style:column-width="5.258cm"/>
    </style:style>
    <style:style style:name="Tabla21.C" style:family="table-column">
      <style:table-column-properties style:column-width="6.184cm"/>
    </style:style>
    <style:style style:name="Tabla21.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1.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21.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22" style:family="table">
      <style:table-properties style:width="16.614cm" table:align="left"/>
    </style:style>
    <style:style style:name="Tabla22.A" style:family="table-column">
      <style:table-column-properties style:column-width="4.226cm"/>
    </style:style>
    <style:style style:name="Tabla22.B" style:family="table-column">
      <style:table-column-properties style:column-width="4.147cm"/>
    </style:style>
    <style:style style:name="Tabla22.C" style:family="table-column">
      <style:table-column-properties style:column-width="4.544cm"/>
    </style:style>
    <style:style style:name="Tabla22.D" style:family="table-column">
      <style:table-column-properties style:column-width="3.697cm"/>
    </style:style>
    <style:style style:name="Tabla22.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2.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22.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23" style:family="table">
      <style:table-properties style:width="16.185cm" table:align="left"/>
    </style:style>
    <style:style style:name="Tabla23.A" style:family="table-column">
      <style:table-column-properties style:column-width="16.185cm"/>
    </style:style>
    <style:style style:name="Tabla23.A1" style:family="table-cell">
      <style:table-cell-properties style:vertical-align="middle" fo:background-color="#1a6b5c" fo:padding-left="0.282cm" fo:padding-right="0.282cm" fo:padding-top="0.176cm" fo:padding-bottom="0.141cm" fo:border="0.6pt solid #cccccc">
        <style:background-image/>
      </style:table-cell-properties>
    </style:style>
    <style:style style:name="Tabla23.A2" style:family="table-cell">
      <style:table-cell-properties style:vertical-align="middle" fo:background-color="#d5ede8" fo:padding-left="0.282cm" fo:padding-right="0.282cm" fo:padding-top="0.106cm" fo:padding-bottom="0.106cm" fo:border="0.6pt solid #cccccc">
        <style:background-image/>
      </style:table-cell-properties>
    </style:style>
    <style:style style:name="Tabla24" style:family="table">
      <style:table-properties style:width="16.489cm" table:align="left"/>
    </style:style>
    <style:style style:name="Tabla24.A" style:family="table-column">
      <style:table-column-properties style:column-width="5.602cm"/>
    </style:style>
    <style:style style:name="Tabla24.B" style:family="table-column">
      <style:table-column-properties style:column-width="4.411cm"/>
    </style:style>
    <style:style style:name="Tabla24.C" style:family="table-column">
      <style:table-column-properties style:column-width="6.475cm"/>
    </style:style>
    <style:style style:name="Tabla24.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4.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24.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Tabla25" style:family="table">
      <style:table-properties style:width="16.462cm" table:align="left"/>
    </style:style>
    <style:style style:name="Tabla25.A" style:family="table-column">
      <style:table-column-properties style:column-width="4.755cm"/>
    </style:style>
    <style:style style:name="Tabla25.B" style:family="table-column">
      <style:table-column-properties style:column-width="5.814cm"/>
    </style:style>
    <style:style style:name="Tabla25.C" style:family="table-column">
      <style:table-column-properties style:column-width="5.893cm"/>
    </style:style>
    <style:style style:name="Tabla25.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5.A2" style:family="table-cell">
      <style:table-cell-properties style:vertical-align="middle" fo:background-color="#ffffff" fo:padding-left="0.212cm" fo:padding-right="0.212cm" fo:padding-top="0.141cm" fo:padding-bottom="0.141cm" fo:border="0.6pt solid #cccccc">
        <style:background-image/>
      </style:table-cell-properties>
    </style:style>
    <style:style style:name="Tabla25.A3" style:family="table-cell">
      <style:table-cell-properties style:vertical-align="middle" fo:background-color="#f5f5f5" fo:padding-left="0.212cm" fo:padding-right="0.212cm" fo:padding-top="0.141cm" fo:padding-bottom="0.141cm" fo:border="0.6pt solid #cccccc">
        <style:background-image/>
      </style:table-cell-properties>
    </style:style>
    <style:style style:name="P1" style:family="paragraph" style:parent-style-name="Text_20_body">
      <style:paragraph-properties fo:margin-left="0cm" fo:margin-right="0cm" fo:margin-top="2.117cm" fo:margin-bottom="0.176cm" style:contextual-spacing="false" fo:line-height="138%" fo:text-align="center" style:justify-single-word="false" fo:text-indent="0cm" style:auto-text-indent="false" style:writing-mode="lr-tb"/>
      <style:text-properties fo:font-variant="normal" fo:text-transform="none" fo:color="#1f3864" loext:opacity="100%" style:text-line-through-style="none" style:text-line-through-type="none" style:font-name="Arial2" fo:font-size="28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141cm" style:contextual-spacing="false" fo:line-height="138%" fo:text-align="center" style:justify-single-word="false" fo:text-indent="0cm" style:auto-text-indent="false" style:writing-mode="lr-tb"/>
      <style:text-properties fo:font-variant="normal" fo:text-transform="none" fo:color="#2e5f8a" loext:opacity="100%" style:text-line-through-style="none" style:text-line-through-type="none" style:font-name="Arial2" fo:font-size="14pt" fo:font-style="italic" style:text-underline-style="none" fo:font-weight="normal" style:text-blinking="false" fo:background-color="transparent"/>
    </style:style>
    <style:style style:name="P3" style:family="paragraph" style:parent-style-name="Text_20_body">
      <style:paragraph-properties fo:margin-left="0cm" fo:margin-right="0cm" fo:margin-top="0cm" fo:margin-bottom="0.071cm" style:contextual-spacing="false" fo:line-height="138%" fo:text-align="center" style:justify-single-word="false" fo:text-indent="0cm" style:auto-text-indent="false" style:writing-mode="lr-tb"/>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style:style>
    <style:style style:name="P4" style:family="paragraph" style:parent-style-name="Text_20_body">
      <style:paragraph-properties fo:margin-left="0cm" fo:margin-right="0cm" fo:margin-top="0.141cm" fo:margin-bottom="2.117cm" style:contextual-spacing="false" fo:line-height="138%" fo:text-align="center" style:justify-single-word="false" fo:text-indent="0cm" style:auto-text-indent="false" style:writing-mode="lr-tb"/>
      <style:text-properties fo:font-variant="normal" fo:text-transform="none" fo:color="#cccccc" loext:opacity="100%" style:text-line-through-style="none" style:text-line-through-type="none" style:font-name="Arial2" fo:font-size="9pt" fo:font-style="normal" style:text-underline-style="none" fo:font-weight="normal" style:text-blinking="false" fo:background-color="transparent"/>
    </style:style>
    <style:style style:name="P5"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ext_20_body">
      <style:paragraph-properties fo:margin-left="0cm" fo:margin-right="0cm" fo:margin-top="0.282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23pt" fo:font-style="normal" style:text-underline-style="none" fo:font-weight="bold" style:text-blinking="false" fo:background-color="transparent"/>
    </style:style>
    <style:style style:name="P8"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2" fo:font-size="11pt" fo:font-style="normal" style:text-underline-style="none" fo:font-weight="bold" style:text-blinking="false" fo:background-color="transparent"/>
    </style:style>
    <style:style style:name="P9"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44444" loext:opacity="100%" style:text-line-through-style="none" style:text-line-through-type="none" style:font-name="Arial2" fo:font-size="10pt" fo:font-style="normal" style:text-underline-style="none" fo:font-weight="normal" style:text-blinking="false" fo:background-color="transparent"/>
    </style:style>
    <style:style style:name="P1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44444" loext:opacity="100%" style:text-line-through-style="none" style:text-line-through-type="none" style:text-underline-style="none" style:text-blinking="false" fo:background-color="transparent"/>
    </style:style>
    <style:style style:name="P11"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2" style:family="paragraph" style:parent-style-name="Text_20_body">
      <style:paragraph-properties fo:margin-left="0cm" fo:margin-right="0cm" fo:margin-top="0.318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4" style:family="paragraph" style:parent-style-name="Text_20_body">
      <style:paragraph-properties fo:margin-left="0cm" fo:margin-right="0cm" fo:margin-top="0.106cm" fo:margin-bottom="0.106cm" style:contextual-spacing="false" fo:line-height="138%" fo:text-indent="0cm" style:auto-text-indent="false" style:writing-mode="lr-tb"/>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style:style>
    <style:style style:name="P15" style:family="paragraph" style:parent-style-name="Text_20_body">
      <style:paragraph-properties fo:margin-left="0cm" fo:margin-right="0cm" fo:margin-top="0.141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ext_20_body">
      <style:paragraph-properties fo:margin-left="0.988cm" fo:margin-right="0cm" fo:margin-top="0.071cm" fo:margin-bottom="0.071cm" style:contextual-spacing="false" fo:line-height="138%" fo:text-indent="-0.494cm" style:auto-text-indent="false" fo:padding="0cm" fo:border="none" style:writing-mode="lr-tb"/>
    </style:style>
    <style:style style:name="P17"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ffffff" loext:opacity="100%" style:text-line-through-style="none" style:text-line-through-type="none" style:font-name="Arial2" fo:font-size="10pt" fo:font-style="normal" style:text-underline-style="none" fo:font-weight="bold" style:text-blinking="false" fo:background-color="transparent"/>
    </style:style>
    <style:style style:name="P18"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7pt" fo:font-style="normal" style:text-underline-style="none" fo:font-weight="bold" style:text-blinking="false" fo:background-color="transparent"/>
    </style:style>
    <style:style style:name="P19" style:family="paragraph" style:parent-style-name="Text_20_body">
      <style:paragraph-properties fo:margin-left="0cm" fo:margin-right="0cm" fo:margin-top="0.212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0"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21" style:family="paragraph" style:parent-style-name="Text_20_body">
      <style:paragraph-properties fo:margin-left="0cm" fo:margin-right="0cm" fo:margin-top="0.071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2" style:family="paragraph" style:parent-style-name="Text_20_body">
      <style:paragraph-properties fo:margin-left="0cm" fo:margin-right="0cm" fo:margin-top="0.106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3" style:family="paragraph" style:parent-style-name="Text_20_body">
      <style:paragraph-properties fo:margin-left="0.635cm" fo:margin-right="0cm" fo:margin-top="0.141cm" fo:margin-bottom="0.141cm" style:contextual-spacing="false" fo:line-height="138%" fo:text-indent="0cm" style:auto-text-indent="false" style:writing-mode="lr-tb"/>
      <style:text-properties fo:font-variant="normal" fo:text-transform="none" fo:color="#2e5f8a" loext:opacity="100%" style:text-line-through-style="none" style:text-line-through-type="none" style:font-name="Arial2" fo:font-size="10pt" fo:font-style="italic" style:text-underline-style="none" fo:font-weight="normal" style:text-blinking="false" fo:background-color="transparent"/>
    </style:style>
    <style:style style:name="P24"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2" fo:font-size="10pt" fo:font-style="normal" style:text-underline-style="none" fo:font-weight="bold" style:text-blinking="false" fo:background-color="transparent"/>
    </style:style>
    <style:style style:name="P25" style:family="paragraph" style:parent-style-name="Text_20_body">
      <style:text-properties fo:font-weight="normal"/>
    </style:style>
    <style:style style:name="P26"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7" style:family="paragraph" style:parent-style-name="Text_20_body">
      <style:paragraph-properties fo:margin-left="0cm" fo:margin-right="0cm" fo:margin-top="0.212cm" fo:margin-bottom="0.106cm" style:contextual-spacing="false" fo:line-height="138%" fo:text-align="center" style:justify-single-word="false" fo:text-indent="0cm" style:auto-text-indent="false" style:writing-mode="lr-tb"/>
      <style:text-properties fo:font-variant="normal" fo:text-transform="none" fo:color="#cccccc" loext:opacity="100%" style:text-line-through-style="none" style:text-line-through-type="none" style:font-name="Arial2" fo:font-size="9pt" fo:font-style="italic" style:text-underline-style="none" fo:font-weight="normal" style:text-blinking="false" fo:background-color="transparent"/>
    </style:style>
    <style:style style:name="P28"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cccccc" loext:opacity="100%" style:text-line-through-style="none" style:text-line-through-type="none" style:font-name="Arial2" fo:font-size="8pt" fo:font-style="italic" style:text-underline-style="none" fo:font-weight="normal" style:text-blinking="false" fo:background-color="transparent"/>
    </style:style>
    <style:style style:name="T1" style:family="text">
      <style:text-properties style:font-name="Arial2" fo:font-size="10pt" fo:font-style="normal" fo:font-weight="normal"/>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444444"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4" style:family="text">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7"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1459854-7fff-d3f8-94c6-35a1ae2e8131"/>PROYECTO GENOS</text:p>
      <text:p text:style-name="P2">Documento de Especificaciones Técnicas y Económicas</text:p>
      <text:p text:style-name="P3">Coliseo  ·  Arena del Nexo  ·  Sistema de Torneos Temáticos</text:p>
      <text:p text:style-name="P4">Versión 1.0 Consolidada  |  Documento Confidencial  |  Uso Interno</text:p>
      <text:p text:style-name="P5"> </text:p>
      <text:p text:style-name="P6"> </text:p>
      <text:h text:style-name="P7" text:outline-level="1">Resumen del documento</text:h>
      <text:p text:style-name="P5"> </text:p>
      <table:table table:name="Tabla1" table:style-name="Tabla1">
        <table:table-column table:style-name="Tabla1.A"/>
        <table:table-row>
          <table:table-cell table:style-name="Tabla1.A1" office:value-type="string">
            <text:p text:style-name="P8">¿Qué contiene este documento?</text:p>
          </table:table-cell>
        </table:table-row>
        <table:table-row>
          <table:table-cell table:style-name="Tabla1.A2" office:value-type="string">
            <text:p text:style-name="P9">Este documento consolida dos fuentes previas en una única referencia técnica:</text:p>
          </table:table-cell>
        </table:table-row>
        <table:table-row>
          <table:table-cell table:style-name="Tabla1.A2" office:value-type="string">
            <text:p text:style-name="P10">  <text:span text:style-name="T1">· Doc A — Reestructuración de Arquitectura: Coliseo, Arena del Nexo y Monedas</text:span></text:p>
          </table:table-cell>
        </table:table-row>
        <table:table-row>
          <table:table-cell table:style-name="Tabla1.A2" office:value-type="string">
            <text:p text:style-name="P10">  <text:span text:style-name="T1">· Doc B — Especificaciones Técnicas: Sistema de Torneos Temáticos (Fase 7)</text:span></text:p>
          </table:table-cell>
        </table:table-row>
        <table:table-row>
          <table:table-cell table:style-name="Tabla1.A2" office:value-type="string">
            <text:p text:style-name="P11"> </text:p>
          </table:table-cell>
        </table:table-row>
        <table:table-row>
          <table:table-cell table:style-name="Tabla1.A2" office:value-type="string">
            <text:p text:style-name="P9">Cubre: separación radical PvE/PvP, modos del Coliseo, ligas de la Arena del Nexo,</text:p>
          </table:table-cell>
        </table:table-row>
        <table:table-row>
          <table:table-cell table:style-name="Tabla1.A2" office:value-type="string">
            <text:p text:style-name="P9">sistema de Pase de Arena diario, algoritmo de matchmaking híbrido (en vivo + IFTTT),</text:p>
          </table:table-cell>
        </table:table-row>
        <table:table-row>
          <table:table-cell table:style-name="Tabla1.A2" office:value-type="string">
            <text:p text:style-name="P9">ciclo de gobernanza semanal con votación, catálogo completo de 6 torneos maestros,</text:p>
          </table:table-cell>
        </table:table-row>
        <table:table-row>
          <table:table-cell table:style-name="Tabla1.A2" office:value-type="string">
            <text:p text:style-name="P9">cola unificada con cascada FIFO, ingeniería económica de payouts en $POL,</text:p>
          </table:table-cell>
        </table:table-row>
        <table:table-row>
          <table:table-cell table:style-name="Tabla1.A2" office:value-type="string">
            <text:p text:style-name="P9">protocolo de desconexión asíncrona, e inscripción anticipada con recompensa en EV.</text:p>
          </table:table-cell>
        </table:table-row>
        <table:table-row>
          <table:table-cell table:style-name="Tabla1.A2" office:value-type="string">
            <text:p text:style-name="P11"> </text:p>
          </table:table-cell>
        </table:table-row>
        <table:table-row>
          <table:table-cell table:style-name="Tabla1.A2" office:value-type="string">
            <text:p text:style-name="P9">Regla de desarrollo: nunca modificar los 11 estados de combate, las fórmulas de daño,</text:p>
          </table:table-cell>
        </table:table-row>
        <table:table-row>
          <table:table-cell table:style-name="Tabla1.A2" office:value-type="string">
            <text:p text:style-name="P9">los multiplicadores elementales (×1.35 / ×0.75) ni el STAB (×1.20) sin aprobación explícita.</text:p>
          </table:table-cell>
        </table:table-row>
      </table:table>
      <text:p text:style-name="P12"> </text:p>
      <text:p text:style-name="Text_20_body"><text:soft-page-break/></text:p>
      <text:p text:style-name="P13"> </text:p>
      <text:h text:style-name="P7" text:outline-level="1">Sección 1 — Reglas de desarrollo (conservación de código)</text:h>
      <text:p text:style-name="P5"> </text:p>
      <text:p text:style-name="P14">Directiva estricta aplicable a todos los gestores involucrados en este módulo: TournamentManager.js, ColiseumLogic.js, CloudManager.js y contratos asociados.</text:p>
      <text:p text:style-name="P15"> </text:p>
      <text:p text:style-name="P16"><text:span text:style-name="T2">•      </text:span><text:span text:style-name="T3">Modificaciones quirúrgicas: </text:span><text:span text:style-name="T4">Solo se añaden o eliminan las líneas estrictamente necesarias para implementar nuevas mecánicas. No se reescriben módulos completos.</text:span></text:p>
      <text:p text:style-name="P16"><text:span text:style-name="T2">•      </text:span><text:span text:style-name="T3">Última versión funcional: </text:span><text:span text:style-name="T4">Cualquier modificación o entrega de código completo usa obligatoriamente el último script funcional como base, nunca una versión anterior.</text:span></text:p>
      <text:p text:style-name="P16"><text:span text:style-name="T2">•      </text:span><text:span text:style-name="T3">Prohibición de cambios extremos sin aprobación: </text:span><text:span text:style-name="T4">Quedan bloqueados sin discusión previa explícita los cambios a los 11 estados de combate, las fórmulas de daño validadas, los multiplicadores elementales (×1.35 ataque con ventaja / ×0.75 ataque con desventaja) y el STAB (×1.20 por ataque del tipo propio del Geno).</text:span></text:p>
      <text:p text:style-name="Text_20_body"/>
      <text:h text:style-name="P7" text:outline-level="1">Sección 2 — Separación radical de entornos: PvE vs. PvP</text:h>
      <text:p text:style-name="P5"> </text:p>
      <text:p text:style-name="P14">El menú del Coliseo se divide de forma tajante en dos pestañas independientes con sus propias reglas de acceso, costes y recompensas. Esta separación es irrevocable: ningún modo cruza sus reglas con el otro.</text:p>
      <text:p text:style-name="P15"> </text:p>
      <table:table table:name="Tabla2" table:style-name="Tabla2">
        <table:table-column table:style-name="Tabla2.A"/>
        <table:table-column table:style-name="Tabla2.B"/>
        <table:table-column table:style-name="Tabla2.C"/>
        <table:table-row>
          <table:table-cell table:style-name="Tabla2.A1" office:value-type="string">
            <text:p text:style-name="P17">Característica</text:p>
          </table:table-cell>
          <table:table-cell table:style-name="Tabla2.A1" office:value-type="string">
            <text:p text:style-name="P17">Ala de Investigación (PvE)</text:p>
          </table:table-cell>
          <table:table-cell table:style-name="Tabla2.A1" office:value-type="string">
            <text:p text:style-name="P17">Arena del Nexo (PvP)</text:p>
          </table:table-cell>
        </table:table-row>
        <table:table-row>
          <table:table-cell table:style-name="Tabla2.A2" office:value-type="string">
            <text:p text:style-name="P9">Acceso</text:p>
          </table:table-cell>
          <table:table-cell table:style-name="Tabla2.A2" office:value-type="string">
            <text:p text:style-name="P9">100% gratuito. No consume $POL.</text:p>
          </table:table-cell>
          <table:table-cell table:style-name="Tabla2.A2" office:value-type="string">
            <text:p text:style-name="P9">Requiere compra de Pase de Arena en $POL.</text:p>
          </table:table-cell>
        </table:table-row>
        <table:table-row>
          <table:table-cell table:style-name="Tabla2.A3" office:value-type="string">
            <text:p text:style-name="P9">Rival</text:p>
          </table:table-cell>
          <table:table-cell table:style-name="Tabla2.A3" office:value-type="string">
            <text:p text:style-name="P9">Inteligencia Artificial del servidor.</text:p>
          </table:table-cell>
          <table:table-cell table:style-name="Tabla2.A3" office:value-type="string">
            <text:p text:style-name="P9">Jugador humano en vivo o fantasma <text:soft-page-break/>IFTTT asíncrono.</text:p>
          </table:table-cell>
        </table:table-row>
        <table:table-row>
          <table:table-cell table:style-name="Tabla2.A2" office:value-type="string">
            <text:p text:style-name="P9">Recompensas</text:p>
          </table:table-cell>
          <table:table-cell table:style-name="Tabla2.A2" office:value-type="string">
            <text:p text:style-name="P9">Esencia Vital (EV) + Puntos de Experiencia (EXP).</text:p>
          </table:table-cell>
          <table:table-cell table:style-name="Tabla2.A2" office:value-type="string">
            <text:p text:style-name="P9">Pool de $POL neto + Puntos de Rango (PR).</text:p>
          </table:table-cell>
        </table:table-row>
        <table:table-row>
          <table:table-cell table:style-name="Tabla2.A3" office:value-type="string">
            <text:p text:style-name="P9">Riesgo financiero</text:p>
          </table:table-cell>
          <table:table-cell table:style-name="Tabla2.A3" office:value-type="string">
            <text:p text:style-name="P9">Ninguno.</text:p>
          </table:table-cell>
          <table:table-cell table:style-name="Tabla2.A3" office:value-type="string">
            <text:p text:style-name="P9">El $POL apostado puede no recuperarse según el resultado.</text:p>
          </table:table-cell>
        </table:table-row>
        <table:table-row>
          <table:table-cell table:style-name="Tabla2.A2" office:value-type="string">
            <text:p text:style-name="P9">Propósito</text:p>
          </table:table-cell>
          <table:table-cell table:style-name="Tabla2.A2" office:value-type="string">
            <text:p text:style-name="P9">Entrenamiento, prueba de configuraciones, farmeo de EV.</text:p>
          </table:table-cell>
          <table:table-cell table:style-name="Tabla2.A2" office:value-type="string">
            <text:p text:style-name="P9">Competencia real, escalada en el leaderboard, ganancias en cripto.</text:p>
          </table:table-cell>
        </table:table-row>
      </table:table>
      <text:p text:style-name="P12"> </text:p>
      <text:p text:style-name="Text_20_body"/>
      <text:p text:style-name="P13"> </text:p>
      <text:h text:style-name="P7" text:outline-level="1">Sección 3 — Ala de Investigación (modos PvE)</text:h>
      <text:p text:style-name="P5"> </text:p>
      <text:p text:style-name="P14">Entorno de riesgo cero diseñado para que el jugador entrene, pruebe configuraciones IFTTT de forma segura y recolecte recursos básicos off-chain.</text:p>
      <text:p text:style-name="P15"> </text:p>
      <text:h text:style-name="P18" text:outline-level="2">3.1  Combate Estándar contra la IA</text:h>
      <text:p text:style-name="P16"><text:span text:style-name="T2">•      </text:span><text:span text:style-name="T3">Coste de entrada: </text:span><text:span text:style-name="T4">Completamente gratuito. No consume $POL ni Manzanas de la mochila.</text:span></text:p>
      <text:p text:style-name="P16"><text:span text:style-name="T2">•      </text:span><text:span text:style-name="T3">Funcionamiento: </text:span><text:span text:style-name="T4">Un botón directo empareja al jugador de forma instantánea contra un rival controlado por la IA del servidor de manera aleatoria.</text:span></text:p>
      <text:p text:style-name="P16"><text:span text:style-name="T2">•      </text:span><text:span text:style-name="T3">Recompensas: </text:span><text:span text:style-name="T4">Esencia Vital (EV) y Puntos de Experiencia (EXP) para subir el nivel del Geno.</text:span></text:p>
      <text:p text:style-name="P19"> </text:p>
      <text:h text:style-name="P18" text:outline-level="2">3.2  Torre de Mutación (Modo Supervivencia)</text:h>
      <text:p text:style-name="P14">Modo de escalada infinita por pisos. El sistema registra el piso máximo alcanzado (max_floor) en la tabla de perfiles de Supabase. El EV de cada piso solo puede reclamarse una vez.</text:p>
      <text:p text:style-name="P15"> </text:p>
      <text:h text:style-name="P20" text:outline-level="3"><text:soft-page-break/>Escalado genético de la IA (anti-techo técnico)</text:h>
      <text:p text:style-name="P14">Los rivales de la IA progresan imitando la escala biológica de crianza del juego para evitar estadísticas artificiales injustas:</text:p>
      <text:p text:style-name="P21"> </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Rango de pisos</text:p>
          </table:table-cell>
          <table:table-cell table:style-name="Tabla3.A1" office:value-type="string">
            <text:p text:style-name="P17">Rareza del rival IA</text:p>
          </table:table-cell>
          <table:table-cell table:style-name="Tabla3.A1" office:value-type="string">
            <text:p text:style-name="P17">Progresión de rangos</text:p>
          </table:table-cell>
          <table:table-cell table:style-name="Tabla3.A1" office:value-type="string">
            <text:p text:style-name="P17">Mecánica especial</text:p>
          </table:table-cell>
        </table:table-row>
        <table:table-row>
          <table:table-cell table:style-name="Tabla3.A2" office:value-type="string">
            <text:p text:style-name="P9">Pisos 1–25</text:p>
          </table:table-cell>
          <table:table-cell table:style-name="Tabla3.A2" office:value-type="string">
            <text:p text:style-name="P9">Común</text:p>
          </table:table-cell>
          <table:table-cell table:style-name="Tabla3.A2" office:value-type="string">
            <text:p text:style-name="P9">Rango D → C → B → A → S perfecto</text:p>
          </table:table-cell>
          <table:table-cell table:style-name="Tabla3.A2" office:value-type="string">
            <text:p text:style-name="P9">Escalado gradual dentro de la rareza Común.</text:p>
          </table:table-cell>
        </table:table-row>
        <table:table-row>
          <table:table-cell table:style-name="Tabla3.A3" office:value-type="string">
            <text:p text:style-name="P9">Piso 26 (salto)</text:p>
          </table:table-cell>
          <table:table-cell table:style-name="Tabla3.A3" office:value-type="string">
            <text:p text:style-name="P9">Rara (Rango D)</text:p>
          </table:table-cell>
          <table:table-cell table:style-name="Tabla3.A3" office:value-type="string">
            <text:p text:style-name="P9">Raro D supera estadísticas al Común S</text:p>
          </table:table-cell>
          <table:table-cell table:style-name="Tabla3.A3" office:value-type="string">
            <text:p text:style-name="P9">El cambio de rareza fuerza al jugador a evolucionar su estrategia.</text:p>
          </table:table-cell>
        </table:table-row>
        <table:table-row>
          <table:table-cell table:style-name="Tabla3.A2" office:value-type="string">
            <text:p text:style-name="P9">Pisos siguientes</text:p>
          </table:table-cell>
          <table:table-cell table:style-name="Tabla3.A2" office:value-type="string">
            <text:p text:style-name="P9">Rara → Épica → Legendaria → Mítica</text:p>
          </table:table-cell>
          <table:table-cell table:style-name="Tabla3.A2" office:value-type="string">
            <text:p text:style-name="P9">D → S en cada bloque de rareza</text:p>
          </table:table-cell>
          <table:table-cell table:style-name="Tabla3.A2" office:value-type="string">
            <text:p text:style-name="P9">La curva se repite ascendente por rareza.</text:p>
          </table:table-cell>
        </table:table-row>
      </table:table>
      <text:p text:style-name="P22"> </text:p>
      <text:p text:style-name="P23">Si un jugador llega a la Torre con un Geno Mítico sin haber subido los pisos anteriores, el juego lo eleva automáticamente al primer piso que represente un reto real para sus estadísticas, entregando todas las recompensas de los pisos anteriores de forma automática. Esto impide el abuso de reinicio en pisos fáciles con Genos de rareza alta.</text:p>
      <text:p text:style-name="P15"> </text:p>
      <text:h text:style-name="P20" text:outline-level="3">Mecánica de retirada vs. muerte</text:h>
      <table:table table:name="Tabla4" table:style-name="Tabla4">
        <table:table-column table:style-name="Tabla4.A"/>
        <table:table-column table:style-name="Tabla4.B"/>
        <table:table-row>
          <table:table-cell table:style-name="Tabla4.A1" office:value-type="string">
            <text:p text:style-name="P24">Retirada Voluntaria</text:p>
          </table:table-cell>
          <table:table-cell table:style-name="Tabla4.A1" office:value-type="string">
            <text:p text:style-name="P24">Muerte en Combate</text:p>
          </table:table-cell>
        </table:table-row>
        <table:table-row>
          <table:table-cell table:style-name="Tabla4.A2" office:value-type="string">
            <text:p text:style-name="P9">Retirada Voluntaria</text:p>
          </table:table-cell>
          <table:table-cell table:style-name="Tabla4.A2" office:value-type="string">
            <text:p text:style-name="P9">Muerte en Combate</text:p>
          </table:table-cell>
        </table:table-row>
        <table:table-row>
          <table:table-cell table:style-name="Tabla4.A3" office:value-type="string">
            <text:p text:style-name="P9">El jugador pulsa el botón de salida.</text:p>
          </table:table-cell>
          <table:table-cell table:style-name="Tabla4.A3" office:value-type="string">
            <text:p text:style-name="P9">El Geno es derrotado por la IA.</text:p>
          </table:table-cell>
        </table:table-row>
        <table:table-row>
          <table:table-cell table:style-name="Tabla4.A2" office:value-type="string">
            <text:p text:style-name="P9">Recibe el 100% del EV acumulado en la tanda.</text:p>
          </table:table-cell>
          <table:table-cell table:style-name="Tabla4.A2" office:value-type="string">
            <text:p text:style-name="P9">Recibe el 100% del EV acumulado en la tanda.</text:p>
          </table:table-cell>
        </table:table-row>
        <table:table-row>
          <table:table-cell table:style-name="Tabla4.A3" office:value-type="string">
            <text:p text:style-name="P9">Los accesorios cosméticos obtenidos se guardan.</text:p>
          </table:table-cell>
          <table:table-cell table:style-name="Tabla4.A3" office:value-type="string">
            <text:p text:style-name="P9">Los accesorios cosméticos se guardan siempre.</text:p>
          </table:table-cell>
        </table:table-row>
      </table:table>
      <text:p text:style-name="P15"> </text:p>
      <text:p text:style-name="P23">Los Checkpoints cada 10 pisos evitan repetir contenido trivial. Si el jugador muere en el Piso 17, su próximo ticket le permite reanudar desde el Piso 11, consiguiendo pisos seguros para farmear EV antes de volver a enfrentarse al muro de su récord.</text:p>
      <text:h text:style-name="P7" text:outline-level="1"><text:soft-page-break/>Sección 4 — Arena del Nexo (modo PvP híbrido competitivo)</text:h>
      <text:p text:style-name="P5"> </text:p>
      <text:p text:style-name="P14">Núcleo de la economía Web3 asíncrona del juego. Funciona bajo un modelo híbrido en tiempo real y diferido controlado por Supabase. Toda la lógica económica de la Arena opera fuera de los torneos de fin de semana, que tienen su propio módulo (Sección 6 en adelante).</text:p>
      <text:h text:style-name="P18" text:outline-level="2">4.1  Segmentación estricta por ligas ligadas al Geno</text:h>
      <text:p text:style-name="P14">Las ligas están ligadas obligatoriamente a la rareza o nivel del Geno activo equipado en ese instante, no al nivel global de la cuenta del jugador. Esto garantiza el ratio de emparejamiento seguro 85/15 del Parche de Balance de Matchmaking V13.9.</text:p>
      <text:p text:style-name="P22"> </text:p>
      <table:table table:name="Tabla5" table:style-name="Tabla5">
        <table:table-column table:style-name="Tabla5.A"/>
        <table:table-column table:style-name="Tabla5.B"/>
        <table:table-column table:style-name="Tabla5.C"/>
        <table:table-row>
          <table:table-cell table:style-name="Tabla5.A1" office:value-type="string">
            <text:p text:style-name="P17">Liga</text:p>
          </table:table-cell>
          <table:table-cell table:style-name="Tabla5.A1" office:value-type="string">
            <text:p text:style-name="P17">Requisito de acceso</text:p>
          </table:table-cell>
          <table:table-cell table:style-name="Tabla5.A1" office:value-type="string">
            <text:p text:style-name="P17">Perfil de jugador</text:p>
          </table:table-cell>
        </table:table-row>
        <table:table-row>
          <table:table-cell table:style-name="Tabla5.A2" office:value-type="string">
            <text:p text:style-name="P9">Liga Bronce</text:p>
          </table:table-cell>
          <table:table-cell table:style-name="Tabla5.A2" office:value-type="string">
            <text:p text:style-name="P9">Acceso libre. Genos de rareza Común.</text:p>
          </table:table-cell>
          <table:table-cell table:style-name="Tabla5.A2" office:value-type="string">
            <text:p text:style-name="P9">Cuentas nuevas y jugadores casual.</text:p>
          </table:table-cell>
        </table:table-row>
        <table:table-row>
          <table:table-cell table:style-name="Tabla5.A3" office:value-type="string">
            <text:p text:style-name="P9">Liga Plata</text:p>
          </table:table-cell>
          <table:table-cell table:style-name="Tabla5.A3" office:value-type="string">
            <text:p text:style-name="P9">Geno equipado con Nivel 20 o superior en estadísticas.</text:p>
          </table:table-cell>
          <table:table-cell table:style-name="Tabla5.A3" office:value-type="string">
            <text:p text:style-name="P9">Jugadores intermedios con Genos nivelados.</text:p>
          </table:table-cell>
        </table:table-row>
        <table:table-row>
          <table:table-cell table:style-name="Tabla5.A2" office:value-type="string">
            <text:p text:style-name="P9">Liga Oro</text:p>
          </table:table-cell>
          <table:table-cell table:style-name="Tabla5.A2" office:value-type="string">
            <text:p text:style-name="P9">Geno de rareza Rara o superior equipado e inscrito.</text:p>
          </table:table-cell>
          <table:table-cell table:style-name="Tabla5.A2" office:value-type="string">
            <text:p text:style-name="P9">Jugadores avanzados con crianza optimizada.</text:p>
          </table:table-cell>
        </table:table-row>
        <table:table-row>
          <table:table-cell table:style-name="Tabla5.A3" office:value-type="string">
            <text:p text:style-name="P9">Liga Diamante</text:p>
          </table:table-cell>
          <table:table-cell table:style-name="Tabla5.A3" office:value-type="string">
            <text:p text:style-name="P9">Exclusiva para Genos de rareza Épica o Legendaria.</text:p>
          </table:table-cell>
          <table:table-cell table:style-name="Tabla5.A3" office:value-type="string">
            <text:p text:style-name="P9">Élite competitiva. Mayores stakes en $POL.</text:p>
          </table:table-cell>
        </table:table-row>
      </table:table>
      <text:p text:style-name="P22"> </text:p>
      <text:p text:style-name="P23">Regla anti-exploit: si un jugador en lo más alto de la Liga Diamante desequipa su Geno Legendario y equipa un Común de Nivel 1, el sistema de Supabase lo desplaza automáticamente a la Liga Bronce. Empieza desde cero en el ranking de esa liga, impidiendo el aplastamiento de jugadores novatos por parte de usuarios avanzados.</text:p>
      <text:p text:style-name="P15"> </text:p>
      <text:h text:style-name="P18" text:outline-level="2">4.2  Separación absoluta de Puntos de Rango (PR)</text:h>
      <text:p text:style-name="P14">Los PR del leaderboard no son globales. Cada perfil mantiene en la base de datos columnas numéricas separadas para cada liga:</text:p>
      <text:p text:style-name="P21"> </text:p>
      <table:table table:name="Tabla6" table:style-name="Tabla6">
        <table:table-column table:style-name="Tabla6.A"/>
        <table:table-column table:style-name="Tabla6.B"/>
        <table:table-column table:style-name="Tabla6.C"/>
        <text:soft-page-break/>
        <table:table-row>
          <table:table-cell table:style-name="Tabla6.A1" office:value-type="string">
            <text:p text:style-name="P17">Campo en Supabase</text:p>
          </table:table-cell>
          <table:table-cell table:style-name="Tabla6.A1" office:value-type="string">
            <text:p text:style-name="P17">Liga</text:p>
          </table:table-cell>
          <table:table-cell table:style-name="Tabla6.A1" office:value-type="string">
            <text:p text:style-name="P17">Descripción</text:p>
          </table:table-cell>
        </table:table-row>
        <table:table-row>
          <table:table-cell table:style-name="Tabla6.A2" office:value-type="string">
            <text:p text:style-name="P9">pr_bronce</text:p>
          </table:table-cell>
          <table:table-cell table:style-name="Tabla6.A2" office:value-type="string">
            <text:p text:style-name="P9">Liga Bronce</text:p>
          </table:table-cell>
          <table:table-cell table:style-name="Tabla6.A2" office:value-type="string">
            <text:p text:style-name="P9">Puntos acumulados exclusivamente en combates de la Liga Bronce.</text:p>
          </table:table-cell>
        </table:table-row>
        <table:table-row>
          <table:table-cell table:style-name="Tabla6.A3" office:value-type="string">
            <text:p text:style-name="P9">pr_plata</text:p>
          </table:table-cell>
          <table:table-cell table:style-name="Tabla6.A3" office:value-type="string">
            <text:p text:style-name="P9">Liga Plata</text:p>
          </table:table-cell>
          <table:table-cell table:style-name="Tabla6.A3" office:value-type="string">
            <text:p text:style-name="P9">Puntos acumulados exclusivamente en la Liga Plata.</text:p>
          </table:table-cell>
        </table:table-row>
        <table:table-row>
          <table:table-cell table:style-name="Tabla6.A2" office:value-type="string">
            <text:p text:style-name="P9">pr_oro</text:p>
          </table:table-cell>
          <table:table-cell table:style-name="Tabla6.A2" office:value-type="string">
            <text:p text:style-name="P9">Liga Oro</text:p>
          </table:table-cell>
          <table:table-cell table:style-name="Tabla6.A2" office:value-type="string">
            <text:p text:style-name="P9">Puntos acumulados exclusivamente en la Liga Oro.</text:p>
          </table:table-cell>
        </table:table-row>
        <table:table-row>
          <table:table-cell table:style-name="Tabla6.A3" office:value-type="string">
            <text:p text:style-name="P9">pr_diamante</text:p>
          </table:table-cell>
          <table:table-cell table:style-name="Tabla6.A3" office:value-type="string">
            <text:p text:style-name="P9">Liga Diamante</text:p>
          </table:table-cell>
          <table:table-cell table:style-name="Tabla6.A3" office:value-type="string">
            <text:p text:style-name="P9">Puntos acumulados exclusivamente en la Liga Diamante.</text:p>
          </table:table-cell>
        </table:table-row>
      </table:table>
      <text:p text:style-name="P12"> </text:p>
      <text:p text:style-name="Text_20_body"/>
      <text:p text:style-name="P13"> </text:p>
      <text:h text:style-name="P7" text:outline-level="1">Sección 5 — Economía de fichas: el Pase de Arena y premios diarios</text:h>
      <text:p text:style-name="P5"> </text:p>
      <text:p text:style-name="P14">La Arena del Nexo no cobra por combates individuales (modelo todo-o-nada destructivo para el jugador casual). En su lugar usa un sistema de Pases de Arena de mitigación de riesgo por ronda de 5 combates.</text:p>
      <text:p text:style-name="P15"> </text:p>
      <text:h text:style-name="P18" text:outline-level="2">5.1  Mecánica del Pase de Arena (ronda de 5 combates)</text:h>
      <text:p text:style-name="P16"><text:span text:style-name="T2">•      </text:span><text:span text:style-name="T3">Compra del pase: </text:span><text:span text:style-name="T4">El jugador realiza una única compra consciente de un Pase de Arena válido para su categoría de liga. Ejemplo base: 0.50 $POL en Liga Plata.</text:span></text:p>
      <text:p text:style-name="P16"><text:span text:style-name="T2">•      </text:span><text:span text:style-name="T3">Crédito cerrado: </text:span><text:span text:style-name="T4">La compra otorga exactamente 5 combates. Se genera un estado persistente en la base de datos: arena_ticket_active = true, battles_played = 0.</text:span></text:p>
      <text:p text:style-name="P16"><text:span text:style-name="T2">•      </text:span><text:span text:style-name="T3">El Geno no pelea de forma autónoma: </text:span><text:span text:style-name="T4">El ticket queda congelado esperando la interacción directa del usuario. El jugador debe pulsar físicamente el botón BUSCAR OPONENTE para disputar cada combate.</text:span></text:p>
      <text:p text:style-name="P16"><text:span text:style-name="T2">•      </text:span><text:span text:style-name="T3">Estado persistente entre sesiones: </text:span><text:span text:style-name="T4">Si el jugador cierra la app tras jugar 2 combates, el estado se congela en 2/5. El contrato inteligente no liquida ni paga nada hasta que se complete formalmente el combate número 5.</text:span></text:p>
      <text:p text:style-name="P15"> </text:p>
      <text:h text:style-name="P18" text:outline-level="2"><text:soft-page-break/>5.2  Distribución atómica de la entrada en el contrato inteligente</text:h>
      <text:p text:style-name="P14">En el momento exacto en que el jugador compra el pase de 0.50 $POL, el contrato inteligente de Polygon divide los fondos de forma automática e irreversible:</text:p>
      <text:p text:style-name="P22"> </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7">Destino</text:p>
          </table:table-cell>
          <table:table-cell table:style-name="Tabla7.A1" office:value-type="string">
            <text:p text:style-name="P17">Porcentaje</text:p>
          </table:table-cell>
          <table:table-cell table:style-name="Tabla7.A1" office:value-type="string">
            <text:p text:style-name="P17">Importe (base 0.50 $POL)</text:p>
          </table:table-cell>
          <table:table-cell table:style-name="Tabla7.A1" office:value-type="string">
            <text:p text:style-name="P17">Propósito</text:p>
          </table:table-cell>
        </table:table-row>
        <table:table-row>
          <table:table-cell table:style-name="Tabla7.A2" office:value-type="string">
            <text:p text:style-name="P9">Safe de Tesorería (desarrollador)</text:p>
          </table:table-cell>
          <table:table-cell table:style-name="Tabla7.A2" office:value-type="string">
            <text:p text:style-name="P9">10%</text:p>
          </table:table-cell>
          <table:table-cell table:style-name="Tabla7.A2" office:value-type="string">
            <text:p text:style-name="P9">0.05 $POL</text:p>
          </table:table-cell>
          <table:table-cell table:style-name="Tabla7.A2" office:value-type="string">
            <text:p text:style-name="P9">Infraestructura, servidores, gas del Paymaster para Session Keys.</text:p>
          </table:table-cell>
        </table:table-row>
        <table:table-row>
          <table:table-cell table:style-name="Tabla7.A3" office:value-type="string">
            <text:p text:style-name="P9">Bote Acumulado de Temporada</text:p>
          </table:table-cell>
          <table:table-cell table:style-name="Tabla7.A3" office:value-type="string">
            <text:p text:style-name="P9">10%</text:p>
          </table:table-cell>
          <table:table-cell table:style-name="Tabla7.A3" office:value-type="string">
            <text:p text:style-name="P9">0.05 $POL</text:p>
          </table:table-cell>
          <table:table-cell table:style-name="Tabla7.A3" office:value-type="string">
            <text:p text:style-name="P9">Distribuido al final del mes entre los 10 mejores del leaderboard de la liga.</text:p>
          </table:table-cell>
        </table:table-row>
        <table:table-row>
          <table:table-cell table:style-name="Tabla7.A2" office:value-type="string">
            <text:p text:style-name="P9">Pool de Premios Inmediatos Global</text:p>
          </table:table-cell>
          <table:table-cell table:style-name="Tabla7.A2" office:value-type="string">
            <text:p text:style-name="P9">80%</text:p>
          </table:table-cell>
          <table:table-cell table:style-name="Tabla7.A2" office:value-type="string">
            <text:p text:style-name="P9">0.40 $POL</text:p>
          </table:table-cell>
          <table:table-cell table:style-name="Tabla7.A2" office:value-type="string">
            <text:p text:style-name="P9">Bolsa de liquidez unificada para financiar los payouts inmediatos de todas las rondas activas.</text:p>
          </table:table-cell>
        </table:table-row>
      </table:table>
      <text:p text:style-name="P15"> </text:p>
      <text:p text:style-name="P25"><text:line-break/><text:line-break/><text:line-break/><text:line-break/><text:line-break/></text:p>
      <text:h text:style-name="P18" text:outline-level="2">5.3  Tabla actuarial de liquidación inmediata</text:h>
      <text:p text:style-name="P14">Al terminar el quinto combate de la ronda, el gestor lee el balance de victorias/derrotas del ticket y ejecuta el pago correspondiente desde el pool global de premios:</text:p>
      <text:p text:style-name="P22"> </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Récord final de la ronda</text:p>
          </table:table-cell>
          <table:table-cell table:style-name="Tabla8.A1" office:value-type="string">
            <text:p text:style-name="P17">Pago en $POL</text:p>
          </table:table-cell>
          <table:table-cell table:style-name="Tabla8.A1" office:value-type="string">
            <text:p text:style-name="P17">Recompensa en EV</text:p>
          </table:table-cell>
          <table:table-cell table:style-name="Tabla8.A1" office:value-type="string">
            <text:p text:style-name="P17">Items adicionales</text:p>
          </table:table-cell>
        </table:table-row>
        <table:table-row>
          <table:table-cell table:style-name="Tabla8.A2" office:value-type="string">
            <text:p text:style-name="P9">5V / 0D  (perfecto)</text:p>
          </table:table-cell>
          <table:table-cell table:style-name="Tabla8.A2" office:value-type="string">
            <text:p text:style-name="P9">1.50 $POL</text:p>
          </table:table-cell>
          <table:table-cell table:style-name="Tabla8.A2" office:value-type="string">
            <text:p text:style-name="P9">0.50 EV (simbólico)</text:p>
          </table:table-cell>
          <table:table-cell table:style-name="Tabla8.A2" office:value-type="string">
            <text:p text:style-name="P9">Desbloqueo de ítems raros.</text:p>
          </table:table-cell>
        </table:table-row>
        <table:table-row>
          <table:table-cell table:style-name="Tabla8.A3" office:value-type="string">
            <text:p text:style-name="P9">4V / 1D</text:p>
          </table:table-cell>
          <table:table-cell table:style-name="Tabla8.A3" office:value-type="string">
            <text:p text:style-name="P9">0.80 $POL</text:p>
          </table:table-cell>
          <table:table-cell table:style-name="Tabla8.A3" office:value-type="string">
            <text:p text:style-name="P9">1.00 EV</text:p>
          </table:table-cell>
          <table:table-cell table:style-name="Tabla8.A3" office:value-type="string">
            <text:p text:style-name="P9">Desbloqueo de implantes comunes.</text:p>
          </table:table-cell>
        </table:table-row>
        <text:soft-page-break/>
        <table:table-row>
          <table:table-cell table:style-name="Tabla8.A2" office:value-type="string">
            <text:p text:style-name="P9">3V / 2D  (break-even)</text:p>
          </table:table-cell>
          <table:table-cell table:style-name="Tabla8.A2" office:value-type="string">
            <text:p text:style-name="P9">0.50 $POL</text:p>
          </table:table-cell>
          <table:table-cell table:style-name="Tabla8.A2" office:value-type="string">
            <text:p text:style-name="P9">2.50 EV</text:p>
          </table:table-cell>
          <table:table-cell table:style-name="Tabla8.A2" office:value-type="string">
            <text:p text:style-name="P9">Ninguno.</text:p>
          </table:table-cell>
        </table:table-row>
        <table:table-row>
          <table:table-cell table:style-name="Tabla8.A3" office:value-type="string">
            <text:p text:style-name="P9">2V / 3D  (amortiguación)</text:p>
          </table:table-cell>
          <table:table-cell table:style-name="Tabla8.A3" office:value-type="string">
            <text:p text:style-name="P9">0.20 $POL</text:p>
          </table:table-cell>
          <table:table-cell table:style-name="Tabla8.A3" office:value-type="string">
            <text:p text:style-name="P9">5.00 EV (consolación)</text:p>
          </table:table-cell>
          <table:table-cell table:style-name="Tabla8.A3" office:value-type="string">
            <text:p text:style-name="P9">Ninguno.</text:p>
          </table:table-cell>
        </table:table-row>
        <table:table-row>
          <table:table-cell table:style-name="Tabla8.A2" office:value-type="string">
            <text:p text:style-name="P9">1V / 4D</text:p>
          </table:table-cell>
          <table:table-cell table:style-name="Tabla8.A2" office:value-type="string">
            <text:p text:style-name="P9">0.00 $POL</text:p>
          </table:table-cell>
          <table:table-cell table:style-name="Tabla8.A2" office:value-type="string">
            <text:p text:style-name="P9">2.00 EV</text:p>
          </table:table-cell>
          <table:table-cell table:style-name="Tabla8.A2" office:value-type="string">
            <text:p text:style-name="P9">Ninguno.</text:p>
          </table:table-cell>
        </table:table-row>
        <table:table-row>
          <table:table-cell table:style-name="Tabla8.A3" office:value-type="string">
            <text:p text:style-name="P9">0V / 5D</text:p>
          </table:table-cell>
          <table:table-cell table:style-name="Tabla8.A3" office:value-type="string">
            <text:p text:style-name="P9">0.00 $POL</text:p>
          </table:table-cell>
          <table:table-cell table:style-name="Tabla8.A3" office:value-type="string">
            <text:p text:style-name="P9">0.50 EV</text:p>
          </table:table-cell>
          <table:table-cell table:style-name="Tabla8.A3" office:value-type="string">
            <text:p text:style-name="P9">Ninguno.</text:p>
          </table:table-cell>
        </table:table-row>
      </table:table>
      <text:p text:style-name="P22"> </text:p>
      <text:p text:style-name="P23">Mecanismo de seguridad actuarial: los premios de los jugadores con 4-5 victorias se financian con las pérdidas de quienes obtienen 0-2 victorias. Si la comunidad supera la tasa de éxito estándar del 50% de forma inusual, el contrato toma fondos del colchón del Bote Acumulado de Temporada para garantizar que el juego nunca entre en déficit. El fantasma IFTTT solo es un modelo de combate: no reclama dinero del pool.</text:p>
      <text:p text:style-name="P12"> </text:p>
      <text:p text:style-name="Text_20_body"/>
      <text:p text:style-name="P13"> </text:p>
      <text:h text:style-name="P7" text:outline-level="1">Sección 6 — Algoritmo de matchmaking híbrido y sistema de dados asíncrono</text:h>
      <text:p text:style-name="P5"> </text:p>
      <text:p text:style-name="P14">Cuando el jugador pulsa BUSCAR OPONENTE en la Arena del Nexo, el backend ejecuta un escaneo de dos etapas para emparejar la partida con cero esperas garantizadas.</text:p>
      <text:p text:style-name="P15"> </text:p>
      <text:h text:style-name="P18" text:outline-level="2">6.1  Etapa 1 — Filtro de tiempo real (modo manual en vivo)</text:h>
      <text:p text:style-name="P16"><text:span text:style-name="T2">•      </text:span><text:span text:style-name="T3">Duración del escaneo: </text:span><text:span text:style-name="T4">El sistema analiza durante 10 segundos exactos los canales Realtime Broadcast de Supabase en busca de otro jugador online de la misma liga buscando partida en ese mismo instante.</text:span></text:p>
      <text:p text:style-name="P16"><text:span text:style-name="T2">•      </text:span><text:span text:style-name="T3">Si encuentra rival: </text:span><text:span text:style-name="T4">Se abre un canal interactivo bidireccional punto a punto. Ambos jugadores controlan sus acciones de forma manual turno por turno.</text:span></text:p>
      <text:p text:style-name="P16"><text:span text:style-name="T2">•      </text:span><text:span text:style-name="T3">Incentivo en vivo: </text:span><text:span text:style-name="T4">Una victoria en modo tiempo real otorga un +15% de Puntos de Rango (PR) adicionales de bonificación sobre los PR estándar de esa victoria.</text:span></text:p>
      <text:p text:style-name="P15"> </text:p>
      <text:h text:style-name="P18" text:outline-level="2"><text:soft-page-break/>6.2  Etapa 2 — Respaldo asíncrono (el fantasma IFTTT)</text:h>
      <text:p text:style-name="P14">Si el temporizador de 10 segundos expira sin encontrar rival online, el sistema activa el modo asíncrono para garantizar cero esperas:</text:p>
      <text:p text:style-name="P22"> </text:p>
      <text:p text:style-name="P16"><text:span text:style-name="T2">•      </text:span><text:span text:style-name="T3">Selección del fantasma: </text:span><text:span text:style-name="T4">El algoritmo busca en Supabase el registro de un jugador offline de la misma liga y extrae sus estadísticas y su script defensivo IFTTT preprogramado.</text:span></text:p>
      <text:p text:style-name="P16"><text:span text:style-name="T2">•      </text:span><text:span text:style-name="T3">Ejecución del combate: </text:span><text:span text:style-name="T4">El jugador activo controla sus turnos manualmente. El rival offline combate de forma pasiva mediante su script IFTTT.</text:span></text:p>
      <text:p text:style-name="P16"><text:span text:style-name="T2">•      </text:span><text:span text:style-name="T3">Impacto para el jugador desconectado: </text:span><text:span text:style-name="T4">El combate ocurre exclusivamente en el servidor del jugador activo. El usuario offline NO consume sus tickets ni altera su ronda de 5 combates. Su saldo de $POL jamás se altera de forma pasiva. Si su script gana la defensa, suma PR gratis; si pierde, se le restan PR.</text:span></text:p>
      <text:p text:style-name="P15"> </text:p>
      <text:h text:style-name="P18" text:outline-level="2">6.3  Sistema de dados genéticos (asimetría orgánica)</text:h>
      <text:p text:style-name="P14">Para contrarrestar la ventaja cognitiva del jugador humano frente a un script IFTTT estático, el motor no selecciona un rival exactamente simétrico. En su lugar, ejecuta dos dados probabilísticos:</text:p>
      <text:p text:style-name="P22"> </text:p>
      <table:table table:name="Tabla9" table:style-name="Tabla9">
        <table:table-column table:style-name="Tabla9.A"/>
        <table:table-column table:style-name="Tabla9.B"/>
        <table:table-row>
          <table:table-cell table:style-name="Tabla9.A1" office:value-type="string">
            <text:p text:style-name="P24">Dado de Nivel</text:p>
          </table:table-cell>
          <table:table-cell table:style-name="Tabla9.A1" office:value-type="string">
            <text:p text:style-name="P24">Dado de Calidad Genética</text:p>
          </table:table-cell>
        </table:table-row>
        <table:table-row>
          <table:table-cell table:style-name="Tabla9.A2" office:value-type="string">
            <text:p text:style-name="P9">Dado de Nivel del Rival</text:p>
          </table:table-cell>
          <table:table-cell table:style-name="Tabla9.A2" office:value-type="string">
            <text:p text:style-name="P9">Dado de Calidad Genética (Purity/IVs)</text:p>
          </table:table-cell>
        </table:table-row>
        <table:table-row>
          <table:table-cell table:style-name="Tabla9.A3" office:value-type="string">
            <text:p text:style-name="P9">Resultado posible A: mismo nivel que el jugador activo.</text:p>
          </table:table-cell>
          <table:table-cell table:style-name="Tabla9.A3" office:value-type="string">
            <text:p text:style-name="P9">Resultado posible A: misma calidad genética.</text:p>
          </table:table-cell>
        </table:table-row>
        <table:table-row>
          <table:table-cell table:style-name="Tabla9.A2" office:value-type="string">
            <text:p text:style-name="P9">Resultado posible B: +1 nivel por encima.</text:p>
          </table:table-cell>
          <table:table-cell table:style-name="Tabla9.A2" office:value-type="string">
            <text:p text:style-name="P9">Resultado posible B: +1 rango de calidad (ej. B → A).</text:p>
          </table:table-cell>
        </table:table-row>
        <table:table-row>
          <table:table-cell table:style-name="Tabla9.A3" office:value-type="string">
            <text:p text:style-name="P9">Resultado posible C: +2 niveles por encima.</text:p>
          </table:table-cell>
          <table:table-cell table:style-name="Tabla9.A3" office:value-type="string">
            <text:p text:style-name="P9">Resultado posible C: +2 rangos de calidad (ej. B → S).</text:p>
          </table:table-cell>
        </table:table-row>
      </table:table>
      <text:p text:style-name="P22"> </text:p>
      <text:p text:style-name="P23">Filtro de Inmunidad de Tipo (Exclusión Elemental): la consulta SQL/RPC de Supabase prohíbe de forma estricta seleccionar fantasmas cuyo elemento principal tenga desventaja elemental directa frente al Geno del jugador activo. El fantasma solo puede ser seleccionado si el emparejamiento elemental es neutral o ventajoso para él. Esto neutraliza los counters automáticos malintencionados.</text:p>
      <text:p text:style-name="P12"> </text:p>
      <text:p text:style-name="Text_20_body"/>
      <text:p text:style-name="P13"> </text:p>
      <text:h text:style-name="P7" text:outline-level="1"><text:soft-page-break/>Sección 7 — Ciclo de gobernanza semanal (Lunes a Jueves)</text:h>
      <text:p text:style-name="P5"> </text:p>
      <text:p text:style-name="P14">El modificador del torneo de fin de semana se determina mediante un sistema de votación descentralizado off-chain gestionado por Supabase. La comunidad elige el torneo, lo que mantiene el juego en constante evolución táctica y genera expectación semana a semana.</text:p>
      <text:p text:style-name="P15"> </text:p>
      <text:h text:style-name="P18" text:outline-level="2">7.1  Flujo semanal paso a paso</text:h>
      <text:p text:style-name="P22"> </text:p>
      <table:table table:name="Tabla10" table:style-name="Tabla10">
        <table:table-column table:style-name="Tabla10.A"/>
        <table:table-column table:style-name="Tabla10.B"/>
        <table:table-column table:style-name="Tabla10.C"/>
        <table:table-row>
          <table:table-cell table:style-name="Tabla10.A1" office:value-type="string">
            <text:p text:style-name="P17">Día</text:p>
          </table:table-cell>
          <table:table-cell table:style-name="Tabla10.A1" office:value-type="string">
            <text:p text:style-name="P17">Evento</text:p>
          </table:table-cell>
          <table:table-cell table:style-name="Tabla10.A1" office:value-type="string">
            <text:p text:style-name="P17">Acción técnica del sistema</text:p>
          </table:table-cell>
        </table:table-row>
        <table:table-row>
          <table:table-cell table:style-name="Tabla10.A2" office:value-type="string">
            <text:p text:style-name="P9">Lunes</text:p>
          </table:table-cell>
          <table:table-cell table:style-name="Tabla10.A2" office:value-type="string">
            <text:p text:style-name="P9">Selección aleatoria</text:p>
          </table:table-cell>
          <table:table-cell table:style-name="Tabla10.A2" office:value-type="string">
            <text:p text:style-name="P9">Cron Job ejecuta función que selecciona al azar 3 opciones del catálogo cerrado de 6 torneos maestros.</text:p>
          </table:table-cell>
        </table:table-row>
        <table:table-row>
          <table:table-cell table:style-name="Tabla10.A3" office:value-type="string">
            <text:p text:style-name="P9">Lunes – Jueves</text:p>
          </table:table-cell>
          <table:table-cell table:style-name="Tabla10.A3" office:value-type="string">
            <text:p text:style-name="P9">Ventana de votación</text:p>
          </table:table-cell>
          <table:table-cell table:style-name="Tabla10.A3" office:value-type="string">
            <text:p text:style-name="P9">Los jugadores elegibles votan por su torneo preferido del fin de semana.</text:p>
          </table:table-cell>
        </table:table-row>
        <table:table-row>
          <table:table-cell table:style-name="Tabla10.A2" office:value-type="string">
            <text:p text:style-name="P9">Jueves noche</text:p>
          </table:table-cell>
          <table:table-cell table:style-name="Tabla10.A2" office:value-type="string">
            <text:p text:style-name="P9">Cierre de urnas</text:p>
          </table:table-cell>
          <table:table-cell table:style-name="Tabla10.A2" office:value-type="string">
            <text:p text:style-name="P9">El sistema cierra las urnas, hace el recuento en la tabla tournament_votes y actualiza current_weekend_tournament.</text:p>
          </table:table-cell>
        </table:table-row>
        <table:table-row>
          <table:table-cell table:style-name="Tabla10.A3" office:value-type="string">
            <text:p text:style-name="P9">Viernes</text:p>
          </table:table-cell>
          <table:table-cell table:style-name="Tabla10.A3" office:value-type="string">
            <text:p text:style-name="P9">Ventana de preparación</text:p>
          </table:table-cell>
          <table:table-cell table:style-name="Tabla10.A3" office:value-type="string">
            <text:p text:style-name="P9">24h para adaptar builds, comprar ataques en el Laboratorio y reconfigurar scripts IFTTT.</text:p>
          </table:table-cell>
        </table:table-row>
        <table:table-row>
          <table:table-cell table:style-name="Tabla10.A2" office:value-type="string">
            <text:p text:style-name="P9">Fin de semana</text:p>
          </table:table-cell>
          <table:table-cell table:style-name="Tabla10.A2" office:value-type="string">
            <text:p text:style-name="P9">Ventanas Sit &amp; Go</text:p>
          </table:table-cell>
          <table:table-cell table:style-name="Tabla10.A2" office:value-type="string">
            <text:p text:style-name="P9">Se abre la cola unificada de 1:30 hora y 30 minutos para el torneo ganador de la votación.</text:p>
          </table:table-cell>
        </table:table-row>
      </table:table>
      <text:p text:style-name="P15"> </text:p>
      <text:h text:style-name="P18" text:outline-level="2">7.2  Muro de seguridad del voto (anti-bots)</text:h>
      <text:p text:style-name="P14">No todos los perfiles pueden votar. El sistema valida en la tabla profiles de Supabase que el usuario cumpla ambas condiciones:</text:p>
      <text:p text:style-name="P22"> </text:p>
      <text:p text:style-name="P16"><text:span text:style-name="T2">•      </text:span><text:span text:style-name="T3">Condición 1: </text:span><text:span text:style-name="T4">Nivel 5 de Laboratorio (Lab_level &gt;= 5 en Supabase). Requiere aproximadamente 7-10 días de juego activo real.</text:span></text:p>
      <text:p text:style-name="P16"><text:span text:style-name="T2">•      </text:span><text:span text:style-name="T3">Condición 2: </text:span><text:span text:style-name="T4">Licencia de Comercio Web3 adquirida (has_commerce_license = true). Coste: 3,000 EV en el Bazar Nivel 5.</text:span></text:p>
      <text:p text:style-name="P22"><text:soft-page-break/> </text:p>
      <text:p text:style-name="P23">Este doble filtro neutraliza matemáticamente los ataques de granjas de bots e impide que cuentas falsas o recién creadas manipulen el meta del juego. Solo los jugadores comprometidos con el juego durante al menos una semana pueden influir en el torneo del fin de semana.</text:p>
      <text:p text:style-name="P12"> </text:p>
      <text:p text:style-name="Text_20_body"/>
      <text:p text:style-name="P13"> </text:p>
      <text:h text:style-name="P7" text:outline-level="1">Sección 8 — Catálogo cerrado de los 6 torneos maestros</text:h>
      <text:p text:style-name="P5"> </text:p>
      <text:p text:style-name="P14">El bombo de votación semanal se compone exclusivamente de estos 6 formatos, optimizados para maximizar la masa crítica de participantes. Las rarezas Épica, Legendaria y Mítica están excluidas de la rotación semanal; su terreno es los Eventos de Gala trimestrales.</text:p>
      <text:p text:style-name="P15"> </text:p>
      <text:h text:style-name="P18" text:outline-level="2">Torneo 1 — Solo Comunes</text:h>
      <table:table table:name="Tabla11" table:style-name="Tabla11">
        <table:table-column table:style-name="Tabla11.A"/>
        <table:table-column table:style-name="Tabla11.B"/>
        <table:table-row>
          <table:table-cell table:style-name="Tabla11.A1" office:value-type="string">
            <text:p text:style-name="P17">Parámetro</text:p>
          </table:table-cell>
          <table:table-cell table:style-name="Tabla11.A1" office:value-type="string">
            <text:p text:style-name="P17">Detalle</text:p>
          </table:table-cell>
        </table:table-row>
        <table:table-row>
          <table:table-cell table:style-name="Tabla11.A2" office:value-type="string">
            <text:p text:style-name="P9">Restricción de acceso</text:p>
          </table:table-cell>
          <table:table-cell table:style-name="Tabla11.A2" office:value-type="string">
            <text:p text:style-name="P9">Solo Genos de rareza Común. Cualquier nivel.</text:p>
          </table:table-cell>
        </table:table-row>
        <table:table-row>
          <table:table-cell table:style-name="Tabla11.A3" office:value-type="string">
            <text:p text:style-name="P9">Filtro de rareza en brackets</text:p>
          </table:table-cell>
          <table:table-cell table:style-name="Tabla11.A3" office:value-type="string">
            <text:p text:style-name="P9">No aplica. Comunes compiten contra Comunes directamente.</text:p>
          </table:table-cell>
        </table:table-row>
        <table:table-row>
          <table:table-cell table:style-name="Tabla11.A2" office:value-type="string">
            <text:p text:style-name="P9">Mecánica especial</text:p>
          </table:table-cell>
          <table:table-cell table:style-name="Tabla11.A2" office:value-type="string">
            <text:p text:style-name="P9">Ninguna. Formato estándar.</text:p>
          </table:table-cell>
        </table:table-row>
        <table:table-row>
          <table:table-cell table:style-name="Tabla11.A3" office:value-type="string">
            <text:p text:style-name="P9">Perfil que favorece</text:p>
          </table:table-cell>
          <table:table-cell table:style-name="Tabla11.A3" office:value-type="string">
            <text:p text:style-name="P9">Jugadores F2P con mucho tiempo de farmeo y optimización de Genos básicos.</text:p>
          </table:table-cell>
        </table:table-row>
      </table:table>
      <text:p text:style-name="P15"> </text:p>
      <text:h text:style-name="P18" text:outline-level="2">Torneo 2 — Copa Raro</text:h>
      <table:table table:name="Tabla12" table:style-name="Tabla12">
        <table:table-column table:style-name="Tabla12.A"/>
        <table:table-column table:style-name="Tabla12.B"/>
        <table:table-row>
          <table:table-cell table:style-name="Tabla12.A1" office:value-type="string">
            <text:p text:style-name="P17">Parámetro</text:p>
          </table:table-cell>
          <table:table-cell table:style-name="Tabla12.A1" office:value-type="string">
            <text:p text:style-name="P17">Detalle</text:p>
          </table:table-cell>
        </table:table-row>
        <table:table-row>
          <table:table-cell table:style-name="Tabla12.A2" office:value-type="string">
            <text:p text:style-name="P9">Restricción de acceso</text:p>
          </table:table-cell>
          <table:table-cell table:style-name="Tabla12.A2" office:value-type="string">
            <text:p text:style-name="P9">Solo Genos de rareza Rara.</text:p>
          </table:table-cell>
        </table:table-row>
        <table:table-row>
          <table:table-cell table:style-name="Tabla12.A3" office:value-type="string">
            <text:p text:style-name="P9">Filtro de rareza en brackets</text:p>
          </table:table-cell>
          <table:table-cell table:style-name="Tabla12.A3" office:value-type="string">
            <text:p text:style-name="P9">No aplica. Raros compiten contra Raros directamente.</text:p>
          </table:table-cell>
        </table:table-row>
        <table:table-row>
          <table:table-cell table:style-name="Tabla12.A2" office:value-type="string">
            <text:p text:style-name="P9">Mecánica especial</text:p>
          </table:table-cell>
          <table:table-cell table:style-name="Tabla12.A2" office:value-type="string">
            <text:p text:style-name="P9">Ninguna. Destaca la herencia avanzada y los alelos idénticos.</text:p>
          </table:table-cell>
        </table:table-row>
        <text:soft-page-break/>
        <table:table-row>
          <table:table-cell table:style-name="Tabla12.A3" office:value-type="string">
            <text:p text:style-name="P9">Perfil que favorece</text:p>
          </table:table-cell>
          <table:table-cell table:style-name="Tabla12.A3" office:value-type="string">
            <text:p text:style-name="P9">Jugadores intermedios con inversión en crianza optimizada.</text:p>
          </table:table-cell>
        </table:table-row>
      </table:table>
      <text:p text:style-name="P15"> </text:p>
      <text:h text:style-name="P18" text:outline-level="2">Torneo 3 — Modo Berserker</text:h>
      <table:table table:name="Tabla13" table:style-name="Tabla13">
        <table:table-column table:style-name="Tabla13.A"/>
        <table:table-column table:style-name="Tabla13.B"/>
        <table:table-row>
          <table:table-cell table:style-name="Tabla13.A1" office:value-type="string">
            <text:p text:style-name="P17">Parámetro</text:p>
          </table:table-cell>
          <table:table-cell table:style-name="Tabla13.A1" office:value-type="string">
            <text:p text:style-name="P17">Detalle</text:p>
          </table:table-cell>
        </table:table-row>
        <table:table-row>
          <table:table-cell table:style-name="Tabla13.A2" office:value-type="string">
            <text:p text:style-name="P9">Restricción de acceso</text:p>
          </table:table-cell>
          <table:table-cell table:style-name="Tabla13.A2" office:value-type="string">
            <text:p text:style-name="P9">Cualquier rareza.</text:p>
          </table:table-cell>
        </table:table-row>
        <table:table-row>
          <table:table-cell table:style-name="Tabla13.A3" office:value-type="string">
            <text:p text:style-name="P9">Filtro de rareza en brackets</text:p>
          </table:table-cell>
          <table:table-cell table:style-name="Tabla13.A3" office:value-type="string">
            <text:p text:style-name="P9">APLICADO. Brackets segregados estrictamente por rareza (Comunes vs Comunes, Raros vs Raros).</text:p>
          </table:table-cell>
        </table:table-row>
        <table:table-row>
          <table:table-cell table:style-name="Tabla13.A2" office:value-type="string">
            <text:p text:style-name="P9">Mecánica especial</text:p>
          </table:table-cell>
          <table:table-cell table:style-name="Tabla13.A2" office:value-type="string">
            <text:p text:style-name="P9">El stat de Defensa (DEF) se reduce a cero globalmente en el motor de combate para todos los combatientes. Los combates duran 3-5 turnos. Puro daño por turnos.</text:p>
          </table:table-cell>
        </table:table-row>
        <table:table-row>
          <table:table-cell table:style-name="Tabla13.A3" office:value-type="string">
            <text:p text:style-name="P9">Perfil que favorece</text:p>
          </table:table-cell>
          <table:table-cell table:style-name="Tabla13.A3" office:value-type="string">
            <text:p text:style-name="P9">Jugadores agresivos con builds de máximo ATK. La defensa no importa; solo el primer golpe.</text:p>
          </table:table-cell>
        </table:table-row>
      </table:table>
      <text:p text:style-name="P15"> </text:p>
      <text:h text:style-name="P18" text:outline-level="2">Torneo 4 — Sin Genes</text:h>
      <table:table table:name="Tabla14" table:style-name="Tabla14">
        <table:table-column table:style-name="Tabla14.A"/>
        <table:table-column table:style-name="Tabla14.B"/>
        <table:table-row>
          <table:table-cell table:style-name="Tabla14.A1" office:value-type="string">
            <text:p text:style-name="P17">Parámetro</text:p>
          </table:table-cell>
          <table:table-cell table:style-name="Tabla14.A1" office:value-type="string">
            <text:p text:style-name="P17">Detalle</text:p>
          </table:table-cell>
        </table:table-row>
        <table:table-row>
          <table:table-cell table:style-name="Tabla14.A2" office:value-type="string">
            <text:p text:style-name="P9">Restricción de acceso</text:p>
          </table:table-cell>
          <table:table-cell table:style-name="Tabla14.A2" office:value-type="string">
            <text:p text:style-name="P9">Cualquier rareza.</text:p>
          </table:table-cell>
        </table:table-row>
        <table:table-row>
          <table:table-cell table:style-name="Tabla14.A3" office:value-type="string">
            <text:p text:style-name="P9">Filtro de rareza en brackets</text:p>
          </table:table-cell>
          <table:table-cell table:style-name="Tabla14.A3" office:value-type="string">
            <text:p text:style-name="P9">APLICADO. Brackets segregados por rareza para equilibrar stats base.</text:p>
          </table:table-cell>
        </table:table-row>
        <table:table-row>
          <table:table-cell table:style-name="Tabla14.A2" office:value-type="string">
            <text:p text:style-name="P9">Mecánica especial</text:p>
          </table:table-cell>
          <table:table-cell table:style-name="Tabla14.A2" office:value-type="string">
            <text:p text:style-name="P9">Toda la cadena de genes ocultos y pasivas biológicas del ADN queda desactivada. Solo importan los 5 stats base numéricos, el nivel y la sinergia del catálogo de ataques.</text:p>
          </table:table-cell>
        </table:table-row>
        <table:table-row>
          <table:table-cell table:style-name="Tabla14.A3" office:value-type="string">
            <text:p text:style-name="P9">Perfil que favorece</text:p>
          </table:table-cell>
          <table:table-cell table:style-name="Tabla14.A3" office:value-type="string">
            <text:p text:style-name="P9">Jugadores con alto conocimiento táctico del sistema de ataques. Habilidad pura sin ventaja genética.</text:p>
          </table:table-cell>
        </table:table-row>
      </table:table>
      <text:p text:style-name="P15"> </text:p>
      <text:h text:style-name="P18" text:outline-level="2">Torneo 5 — Liga Elemental Pura</text:h>
      <table:table table:name="Tabla15" table:style-name="Tabla15">
        <table:table-column table:style-name="Tabla15.A"/>
        <table:table-column table:style-name="Tabla15.B"/>
        <table:table-row>
          <table:table-cell table:style-name="Tabla15.A1" office:value-type="string">
            <text:p text:style-name="P17">Parámetro</text:p>
          </table:table-cell>
          <table:table-cell table:style-name="Tabla15.A1" office:value-type="string">
            <text:p text:style-name="P17">Detalle</text:p>
          </table:table-cell>
        </table:table-row>
        <table:table-row>
          <table:table-cell table:style-name="Tabla15.A2" office:value-type="string">
            <text:p text:style-name="P9">Restricción de acceso</text:p>
          </table:table-cell>
          <table:table-cell table:style-name="Tabla15.A2" office:value-type="string">
            <text:p text:style-name="P9">Solo Genos del elemento activado ese fin de semana + sus elementos adyacentes de ventaja/desventaja directa.</text:p>
          </table:table-cell>
        </table:table-row>
        <table:table-row>
          <table:table-cell table:style-name="Tabla15.A3" office:value-type="string">
            <text:p text:style-name="P9">Filtro de rareza en brackets</text:p>
          </table:table-cell>
          <table:table-cell table:style-name="Tabla15.A3" office:value-type="string">
            <text:p text:style-name="P9">APLICADO. Cuadros de 16 divididos por rareza para evitar que diferencias de poder numérico pisen las estrategias de contrarresto <text:soft-page-break/>elemental.</text:p>
          </table:table-cell>
        </table:table-row>
        <table:table-row>
          <table:table-cell table:style-name="Tabla15.A2" office:value-type="string">
            <text:p text:style-name="P9">Mecánica especial</text:p>
          </table:table-cell>
          <table:table-cell table:style-name="Tabla15.A2" office:value-type="string">
            <text:p text:style-name="P9">El servidor activa un elemento específico del ciclo circular (ej. Radiactivo). Solo los Genos de ese tipo o sus adyacentes pueden inscribirse.</text:p>
          </table:table-cell>
        </table:table-row>
        <table:table-row>
          <table:table-cell table:style-name="Tabla15.A3" office:value-type="string">
            <text:p text:style-name="P9">Perfil que favorece</text:p>
          </table:table-cell>
          <table:table-cell table:style-name="Tabla15.A3" office:value-type="string">
            <text:p text:style-name="P9">Jugadores con colecciones diversas y conocimiento del sistema elemental circular del juego.</text:p>
          </table:table-cell>
        </table:table-row>
      </table:table>
      <text:p text:style-name="P15"> </text:p>
      <text:h text:style-name="P18" text:outline-level="2">Torneo 6 — El Espejo</text:h>
      <table:table table:name="Tabla16" table:style-name="Tabla16">
        <table:table-column table:style-name="Tabla16.A"/>
        <table:table-column table:style-name="Tabla16.B"/>
        <table:table-row>
          <table:table-cell table:style-name="Tabla16.A1" office:value-type="string">
            <text:p text:style-name="P17">Parámetro</text:p>
          </table:table-cell>
          <table:table-cell table:style-name="Tabla16.A1" office:value-type="string">
            <text:p text:style-name="P17">Detalle</text:p>
          </table:table-cell>
        </table:table-row>
        <table:table-row>
          <table:table-cell table:style-name="Tabla16.A2" office:value-type="string">
            <text:p text:style-name="P9">Restricción de acceso</text:p>
          </table:table-cell>
          <table:table-cell table:style-name="Tabla16.A2" office:value-type="string">
            <text:p text:style-name="P9">Cualquier jugador de cualquier nivel e inventario.</text:p>
          </table:table-cell>
        </table:table-row>
        <table:table-row>
          <table:table-cell table:style-name="Tabla16.A3" office:value-type="string">
            <text:p text:style-name="P9">Filtro de rareza en brackets</text:p>
          </table:table-cell>
          <table:table-cell table:style-name="Tabla16.A3" office:value-type="string">
            <text:p text:style-name="P9">No aplica. Todos compiten en los mismos brackets.</text:p>
          </table:table-cell>
        </table:table-row>
        <table:table-row>
          <table:table-cell table:style-name="Tabla16.A2" office:value-type="string">
            <text:p text:style-name="P9">Mecánica especial</text:p>
          </table:table-cell>
          <table:table-cell table:style-name="Tabla16.A2" office:value-type="string">
            <text:p text:style-name="P9">El sistema clona un Geno exactamente idéntico (mismo nivel, stats y rareza) para todos los participantes del bracket. La victoria depende 100% de la selección de movimientos para los Slots 2, 3 y 4 (Ataque Especial, Soporte y Definitivo).</text:p>
          </table:table-cell>
        </table:table-row>
        <table:table-row>
          <table:table-cell table:style-name="Tabla16.A3" office:value-type="string">
            <text:p text:style-name="P9">Perfil que favorece</text:p>
          </table:table-cell>
          <table:table-cell table:style-name="Tabla16.A3" office:value-type="string">
            <text:p text:style-name="P9">El ecualizador absoluto. Un jugador nuevo con buena táctica puede vencer a una ballena. El conocimiento del juego importa más que el inventario.</text:p>
          </table:table-cell>
        </table:table-row>
      </table:table>
      <text:p text:style-name="P15"> </text:p>
      <text:p text:style-name="P23">Épicos, Legendarios y Míticos están excluidos de la rotación semanal de torneos. Su terreno exclusivo son los Eventos de Gala de Fin de Temporada (Torneo del Fundador y similares), organizados de forma síncrona cada 3 meses como campañas de marketing masivas para elevar el valor del marketplace P2P.</text:p>
      <text:p text:style-name="P12"> </text:p>
      <text:p text:style-name="Text_20_body"/>
      <text:p text:style-name="P13"> </text:p>
      <text:h text:style-name="P7" text:outline-level="1">Sección 9 — Sistema de inscripción anticipada con recompensa en EV</text:h>
      <text:p text:style-name="P5"> </text:p>
      <text:p text:style-name="P14">La inscripción anticipada es un sistema paralelo a las ventanas Sit &amp; Go del fin de semana. Permite a los jugadores comprometerse con un torneo antes de que comience, generando datos <text:soft-page-break/>de participación valiosos para el servidor y ofreciendo un incentivo económico a quienes planifican con antelación.</text:p>
      <text:p text:style-name="P15"> </text:p>
      <text:h text:style-name="P18" text:outline-level="2">9.1  Propósito y valor para el servidor</text:h>
      <text:p text:style-name="P16"><text:span text:style-name="T2">•      </text:span><text:span text:style-name="T3">Base de datos de participación: </text:span><text:span text:style-name="T4">El servidor conoce con antelación cuántos jugadores hay inscritos para cada tipo de torneo y en qué tier de precio de entrada están posicionados. Esto permite ajustar el pozo de premios, verificar si el torneo tiene quórum suficiente para lanzarse y segmentar comunicaciones.</text:span></text:p>
      <text:p text:style-name="P16"><text:span text:style-name="T2">•      </text:span><text:span text:style-name="T3">Actividad durante la semana: </text:span><text:span text:style-name="T4">La ventana de inscripción abierta desde el lunes genera engagement con el juego durante los días laborables, no solo el fin de semana.</text:span></text:p>
      <text:p text:style-name="P16"><text:span text:style-name="T2">•      </text:span><text:span text:style-name="T3">Métricas de diseño: </text:span><text:span text:style-name="T4">Los datos de inscripción por torneo y tier informan las decisiones de qué torneos incluir en la rotación semanal y qué niveles de precio tienen mayor demanda real.</text:span></text:p>
      <text:p text:style-name="P15"> </text:p>
      <text:h text:style-name="P18" text:outline-level="2">9.2  Ventana de inscripción</text:h>
      <text:p text:style-name="P16"><text:span text:style-name="T2">•      </text:span><text:span text:style-name="T3">Apertura: </text:span><text:span text:style-name="T4">La inscripción anticipada se abre el mismo lunes en que se anuncia el torneo ganador de la votación.</text:span></text:p>
      <text:p text:style-name="P16"><text:span text:style-name="T2">•      </text:span><text:span text:style-name="T3">Cierre: </text:span><text:span text:style-name="T4">La inscripción se cierra en el momento exacto en que comienza la primera ventana Sit &amp; Go del fin de semana.</text:span></text:p>
      <text:p text:style-name="P16"><text:span text:style-name="T2">•      </text:span><text:span text:style-name="T3">Inscripción durante el torneo: </text:span><text:span text:style-name="T4">Durante el tiempo que dure la ventana activa del torneo, los jugadores que aún no se hayan inscrito pueden seguir haciéndolo, pero no recibirán la recompensa anticipada.</text:span></text:p>
      <text:p text:style-name="P15"> </text:p>
      <text:h text:style-name="P18" text:outline-level="2">9.3  Regla de no cancelación</text:h>
      <text:p text:style-name="P14">Una vez que el jugador completa la inscripción anticipada, el compromiso es irrevocable. No existe opción de cancelación bajo ninguna circunstancia.</text:p>
      <text:p text:style-name="P22"> </text:p>
      <table:table table:name="Tabla17" table:style-name="Tabla17">
        <table:table-column table:style-name="Tabla17.A"/>
        <table:table-row>
          <table:table-cell table:style-name="Tabla17.A1" office:value-type="string">
            <text:p text:style-name="P8">¿Por qué no permitir cancelación?</text:p>
          </table:table-cell>
        </table:table-row>
        <table:table-row>
          <table:table-cell table:style-name="Tabla17.A2" office:value-type="string">
            <text:p text:style-name="P9">El sistema IFTTT hace innecesaria cualquier cancelación: si el jugador no puede conectarse</text:p>
          </table:table-cell>
        </table:table-row>
        <table:table-row>
          <table:table-cell table:style-name="Tabla17.A2" office:value-type="string">
            <text:p text:style-name="P9">el día del torneo, su Geno combatirá de forma autónoma con la configuración IFTTT activa.</text:p>
          </table:table-cell>
        </table:table-row>
        <table:table-row>
          <table:table-cell table:style-name="Tabla17.A2" office:value-type="string">
            <text:p text:style-name="P11"> </text:p>
          </table:table-cell>
        </table:table-row>
        <text:soft-page-break/>
        <table:table-row>
          <table:table-cell table:style-name="Tabla17.A2" office:value-type="string">
            <text:p text:style-name="P9">Esto significa que técnicamente no existe el concepto de 'no-show': siempre hay un</text:p>
          </table:table-cell>
        </table:table-row>
        <table:table-row>
          <table:table-cell table:style-name="Tabla17.A2" office:value-type="string">
            <text:p text:style-name="P9">combatiente activo en el torneo independientemente de si el jugador está conectado o no.</text:p>
          </table:table-cell>
        </table:table-row>
        <table:table-row>
          <table:table-cell table:style-name="Tabla17.A2" office:value-type="string">
            <text:p text:style-name="P11"> </text:p>
          </table:table-cell>
        </table:table-row>
        <table:table-row>
          <table:table-cell table:style-name="Tabla17.A2" office:value-type="string">
            <text:p text:style-name="P9">La no cancelación garantiza que todos los datos de inscripción que maneja el servidor</text:p>
          </table:table-cell>
        </table:table-row>
        <table:table-row>
          <table:table-cell table:style-name="Tabla17.A2" office:value-type="string">
            <text:p text:style-name="P9">correspondan a participantes reales que sí van a competir, sin huecos vacíos ni emparejamientos rotos.</text:p>
          </table:table-cell>
        </table:table-row>
      </table:table>
      <text:p text:style-name="P15"> </text:p>
      <text:h text:style-name="P18" text:outline-level="2">9.4  Congelación del IFTTT al inicio del torneo</text:h>
      <text:p text:style-name="P16"><text:span text:style-name="T2">•      </text:span><text:span text:style-name="T3">Libre hasta el inicio: </text:span><text:span text:style-name="T4">El jugador puede modificar su configuración IFTTT libremente en cualquier momento desde que se inscribe hasta el instante exacto en que el torneo comienza.</text:span></text:p>
      <text:p text:style-name="P16"><text:span text:style-name="T2">•      </text:span><text:span text:style-name="T3">Congelación automática: </text:span><text:span text:style-name="T4">En el momento en que el torneo arranca, la configuración IFTTT de todos los participantes se congela de forma simultánea. No se permiten modificaciones mientras el torneo esté activo.</text:span></text:p>
      <text:p text:style-name="P16"><text:span text:style-name="T2">•      </text:span><text:span text:style-name="T3">Descongelación: </text:span><text:span text:style-name="T4">La configuración IFTTT vuelve a ser editable en cuanto el torneo finaliza o el Geno es eliminado de la competición.</text:span></text:p>
      <text:p text:style-name="P16"><text:span text:style-name="T2">•      </text:span><text:span text:style-name="T3">Configuración por defecto: </text:span><text:span text:style-name="T4">Si un jugador inscrito no tiene ninguna configuración IFTTT personalizada en el momento del inicio, el sistema aplica automáticamente la configuración por defecto del servidor. El Geno no queda paralizado.</text:span></text:p>
      <text:p text:style-name="P22"> </text:p>
      <text:p text:style-name="P23">La Sala de Pruebas es la herramienta clave de preparación: el jugador sabe que tiene hasta el inicio del torneo para afinar y verificar que su combinación IFTTT funciona correctamente contra distintos tipos de rivales. El límite de tiempo crea urgencia de uso de la Sala de Pruebas durante la semana previa.</text:p>
      <text:p text:style-name="P15"> </text:p>
      <text:h text:style-name="P18" text:outline-level="2">9.5  Privacidad de rivales</text:h>
      <text:p text:style-name="P14">Los emparejamientos del torneo se revelan únicamente en el momento en que éste comienza. Durante toda la semana de inscripción anticipada y preparación, ningún jugador sabe contra quién va a competir.</text:p>
      <text:p text:style-name="P22"> </text:p>
      <text:p text:style-name="P16"><text:span text:style-name="T2">•      </text:span><text:span text:style-name="T3">Consecuencia táctica: </text:span><text:span text:style-name="T4">La única forma de prepararse es construir una configuración IFTTT robusta y versátil, no una diseñada para contraatacar a un rival específico conocido. Esto eleva el nivel estratégico general y elimina el metagaming de counter personalizado.</text:span></text:p>
      <text:p text:style-name="P16"><text:soft-page-break/><text:span text:style-name="T2">•      </text:span><text:span text:style-name="T3">Consecuencia competitiva: </text:span><text:span text:style-name="T4">Inscribirse antes no da ventaja de información sobre los rivales. La ventaja de la inscripción anticipada es exclusivamente económica (la recompensa en EV), no táctica.</text:span></text:p>
      <text:p text:style-name="P15"> </text:p>
      <text:h text:style-name="P18" text:outline-level="2">9.6  Recompensa por inscripción anticipada</text:h>
      <text:p text:style-name="P16"><text:span text:style-name="T2">•      </text:span><text:span text:style-name="T3">Cuándo se entrega: </text:span><text:span text:style-name="T4">La recompensa en EV se entrega automáticamente después de que el torneo finaliza, independientemente del resultado del jugador en la competición.</text:span></text:p>
      <text:p text:style-name="P16"><text:span text:style-name="T2">•      </text:span><text:span text:style-name="T3">Condición única: </text:span><text:span text:style-name="T4">Haberse inscrito durante la ventana anticipada (antes del inicio del torneo). Los jugadores que se inscriban durante la ventana activa del torneo NO reciben esta recompensa.</text:span></text:p>
      <text:p text:style-name="P16"><text:span text:style-name="T2">•      </text:span><text:span text:style-name="T3">Valor de la recompensa: </text:span><text:span text:style-name="T4">A definir en el balance final. Debe ser suficientemente atractivo para incentivar la inscripción anticipada pero no tan alto como para convertirse en una fuente primaria de farmeo de EV.</text:span></text:p>
      <text:p text:style-name="P22"> </text:p>
      <table:table table:name="Tabla18" table:style-name="Tabla18">
        <table:table-column table:style-name="Tabla18.A"/>
        <table:table-row>
          <table:table-cell table:style-name="Tabla18.A1" office:value-type="string">
            <text:p text:style-name="P8">Campos necesarios en Supabase para esta mecánica</text:p>
          </table:table-cell>
        </table:table-row>
        <table:table-row>
          <table:table-cell table:style-name="Tabla18.A2" office:value-type="string">
            <text:p text:style-name="P9">tournament_registrations: tabla con player_id, tournament_id, tier ($POL), registered_at, is_early (boolean).</text:p>
          </table:table-cell>
        </table:table-row>
        <table:table-row>
          <table:table-cell table:style-name="Tabla18.A2" office:value-type="string">
            <text:p text:style-name="P9">is_early = true si registered_at &lt; tournament_start_time.</text:p>
          </table:table-cell>
        </table:table-row>
        <table:table-row>
          <table:table-cell table:style-name="Tabla18.A2" office:value-type="string">
            <text:p text:style-name="P9">early_ev_reward_paid: boolean, se actualiza a true cuando se entrega la recompensa post-torneo.</text:p>
          </table:table-cell>
        </table:table-row>
        <table:table-row>
          <table:table-cell table:style-name="Tabla18.A2" office:value-type="string">
            <text:p text:style-name="P9">ifttt_snapshot: snapshot de la configuración IFTTT del jugador en el momento de la congelación.</text:p>
          </table:table-cell>
        </table:table-row>
      </table:table>
      <text:p text:style-name="P12"> </text:p>
      <text:p text:style-name="Text_20_body"/>
      <text:p text:style-name="P13"> </text:p>
      <text:h text:style-name="P7" text:outline-level="1">Sección 10 — Cola unificada de riesgo y cascada dinámica FIFO</text:h>
      <text:p text:style-name="P5"> </text:p>
      <text:p text:style-name="P14">Para que los jugadores veteranos puedan competir por bolsas altas sin fragmentar las salas de espera, el sistema implementa un Matchmaking Unificado de Riesgo Flexible controlado por capas de precio con descenso automático garantizado.</text:p>
      <text:p text:style-name="P15"> </text:p>
      <text:h text:style-name="P18" text:outline-level="2"><text:soft-page-break/>10.1  Los 3 niveles de entrada disponibles</text:h>
      <table:table table:name="Tabla19" table:style-name="Tabla19">
        <table:table-column table:style-name="Tabla19.A"/>
        <table:table-column table:style-name="Tabla19.B"/>
        <table:table-column table:style-name="Tabla19.C"/>
        <table:table-row>
          <table:table-cell table:style-name="Tabla19.A1" office:value-type="string">
            <text:p text:style-name="P17">Nivel</text:p>
          </table:table-cell>
          <table:table-cell table:style-name="Tabla19.A1" office:value-type="string">
            <text:p text:style-name="P17">Coste de entrada</text:p>
          </table:table-cell>
          <table:table-cell table:style-name="Tabla19.A1" office:value-type="string">
            <text:p text:style-name="P17">Perfil objetivo</text:p>
          </table:table-cell>
        </table:table-row>
        <table:table-row>
          <table:table-cell table:style-name="Tabla19.A2" office:value-type="string">
            <text:p text:style-name="P26">Practicante</text:p>
          </table:table-cell>
          <table:table-cell table:style-name="Tabla19.A2" office:value-type="string">
            <text:p text:style-name="P26">015 $ POL</text:p>
          </table:table-cell>
          <table:table-cell table:style-name="Tabla19.A2" office:value-type="string">
            <text:p text:style-name="P26">Jugadores que quieren probar sus Genos sin arriesgar.</text:p>
          </table:table-cell>
        </table:table-row>
        <table:table-row>
          <table:table-cell table:style-name="Tabla19.A3" office:value-type="string">
            <text:p text:style-name="P9">Casual</text:p>
          </table:table-cell>
          <table:table-cell table:style-name="Tabla19.A3" office:value-type="string">
            <text:p text:style-name="P9">0.50 $POL</text:p>
          </table:table-cell>
          <table:table-cell table:style-name="Tabla19.A3" office:value-type="string">
            <text:p text:style-name="P9">Jugadores F2P o de bajo riesgo. Nivel de volumen masivo: cierre garantizado.</text:p>
          </table:table-cell>
        </table:table-row>
        <table:table-row>
          <table:table-cell table:style-name="Tabla19.A2" office:value-type="string">
            <text:p text:style-name="P9">Competitivo</text:p>
          </table:table-cell>
          <table:table-cell table:style-name="Tabla19.A2" office:value-type="string">
            <text:p text:style-name="P9">2.00 $POL</text:p>
          </table:table-cell>
          <table:table-cell table:style-name="Tabla19.A2" office:value-type="string">
            <text:p text:style-name="P9">Jugadores regulares con experiencia en torneos.</text:p>
          </table:table-cell>
        </table:table-row>
        <table:table-row>
          <table:table-cell table:style-name="Tabla19.A2" office:value-type="string">
            <text:p text:style-name="P9">Élite</text:p>
          </table:table-cell>
          <table:table-cell table:style-name="Tabla19.A2" office:value-type="string">
            <text:p text:style-name="P9">5.00 $POL</text:p>
          </table:table-cell>
          <table:table-cell table:style-name="Tabla19.A2" office:value-type="string">
            <text:p text:style-name="P9">Ballenas y jugadores veteranos buscando bolsas altas.</text:p>
          </table:table-cell>
        </table:table-row>
      </table:table>
      <text:p text:style-name="P15"> </text:p>
      <text:h text:style-name="P18" text:outline-level="2">10.2  Algoritmo del flujo de cascada en servidor</text:h>
      <text:p text:style-name="P16"><text:span text:style-name="T2">•      </text:span><text:span text:style-name="T3">Paso 1 — Inscripción intencional: </text:span><text:span text:style-name="T4">El jugador selecciona su Geno elegible y elige el monto que está dispuesto a arriesgar (ej. 5.00 $POL). El contrato retiene los fondos y lo añade a la Cola Élite.</text:span></text:p>
      <text:p text:style-name="P16"><text:span text:style-name="T2">•      </text:span><text:span text:style-name="T3">Paso 2 — Temporizador de corte (6 minutos): </text:span><text:span text:style-name="T4">El backend abre un cuadro de espera de duración estricta de 6 minutos para reunir 16 jugadores reales al mismo nivel de entrada.</text:span></text:p>
      <text:p text:style-name="P16"><text:span text:style-name="T2">•      </text:span><text:span text:style-name="T3">Paso 3a — Si se llena (16/16): </text:span><text:span text:style-name="T4">Se cierra el bracket y arranca el torneo de inmediato.</text:span></text:p>
      <text:p text:style-name="P16"><text:span text:style-name="T2">•      </text:span><text:span text:style-name="T3">Paso 3b — Si el tiempo expira sin llenarse: </text:span><text:span text:style-name="T4">El sistema Verifica cuantos hay, si son 15 jugadores, el sistema añade 1 Geno IA, este se financia con el 10% de la comisión que se queda el juego por cada torneo de 16, si son menos de 15 activa el protocolo de Descenso FIFO (First In, First Out). Los jugadores se desplazan en bloque al siguiente nivel de entrada inferior.</text:span></text:p>
      <text:p text:style-name="P16"><text:span text:style-name="T2">•      </text:span><text:span text:style-name="T3">Garantía de cierre: </text:span><text:span text:style-name="T4">El nivel Practicante (0.15 $POL) es el suelo del sistema. Por ser el nivel de volumen masivo, el cuadro de 16 se cerrará de forma garantizada.</text:span></text:p>
      <text:p text:style-name="P16"><text:span text:style-name="T2">•      </text:span><text:span text:style-name="T3">Opcion adicional:</text:span><text:span text:style-name="T5"> </text:span><text:span text:style-name="T6">Se le permitirá activar una opción a los jugadores donde autorizan a comenzar torneos de 8 jugadores si hay menos de 15 jugadores en sala de espera, si algún jugador tampoco queda en el grupo de 8 seguira bajando de al nivel de entrada inferior. Esta opción le aparece al momento en el que se va activar el FIFO.</text:span></text:p>
      <text:p text:style-name="P15"> </text:p>
      <text:h text:style-name="P18" text:outline-level="2">10.3  Gestión de fondos en el descenso FIFO</text:h>
      <text:p text:style-name="P16"><text:span text:style-name="T2">•      </text:span><text:span text:style-name="T3">Patrón de Retiro (Pull-over-Push): </text:span><text:span text:style-name="T4">Al ejecutar el descenso, el contrato inteligente prohíbe realizar transferencias salientes automáticas a la wallet on-chain del usuario para evitar gasto innecesario de gas.</text:span></text:p>
      <text:p text:style-name="P16"><text:soft-page-break/><text:span text:style-name="T2">•      </text:span><text:span text:style-name="T3">Crédito interno: </text:span><text:span text:style-name="T4">El contrato calcula la diferencia exacta (ej. 5.00 - 2.00 = 3.00 $POL) y la acredita instantáneamente en la variable interna saldosPendientes del perfil del usuario.</text:span></text:p>
      <text:p text:style-name="P16"><text:span text:style-name="T2">•      </text:span><text:span text:style-name="T3">Visibilidad en UI: </text:span><text:span text:style-name="T4">El saldo queda reflejado en el Baúl del jugador como crédito interno libre de gas, disponible para reinvertir en otra inscripción de la ventana horaria o retirar físicamente hacia su wallet Privy bajo demanda.</text:span></text:p>
      <text:p text:style-name="P15"> </text:p>
      <text:h text:style-name="P18" text:outline-level="2">10.4  Pop-up de transparencia UX al ejecutar el descenso</text:h>
      <table:table table:name="Tabla20" table:style-name="Tabla20">
        <table:table-column table:style-name="Tabla20.A"/>
        <table:table-row>
          <table:table-cell table:style-name="Tabla20.A1" office:value-type="string">
            <text:p text:style-name="P8">Mensaje que el cliente muestra obligatoriamente al jugador cuando se ejecuta un descenso FIFO</text:p>
          </table:table-cell>
        </table:table-row>
        <table:table-row>
          <table:table-cell table:style-name="Tabla20.A2" office:value-type="string">
            <text:p text:style-name="P9">¡Ajuste de categoría para inicio rápido!</text:p>
          </table:table-cell>
        </table:table-row>
        <table:table-row>
          <table:table-cell table:style-name="Tabla20.A2" office:value-type="string">
            <text:p text:style-name="P11"> </text:p>
          </table:table-cell>
        </table:table-row>
        <table:table-row>
          <table:table-cell table:style-name="Tabla20.A2" office:value-type="string">
            <text:p text:style-name="P9">El temporizador de la cola Élite (5.00 $POL) ha expirado sin encontrar los 16 rivales</text:p>
          </table:table-cell>
        </table:table-row>
        <table:table-row>
          <table:table-cell table:style-name="Tabla20.A2" office:value-type="string">
            <text:p text:style-name="P9">requeridos para cerrar el cuadro. Para que no tengas que seguir esperando, el Laboratorio</text:p>
          </table:table-cell>
        </table:table-row>
        <table:table-row>
          <table:table-cell table:style-name="Tabla20.A2" office:value-type="string">
            <text:p text:style-name="P9">te ha trasladado automáticamente al próximo torneo de la categoría Competitiva (2.00 $POL),</text:p>
          </table:table-cell>
        </table:table-row>
        <table:table-row>
          <table:table-cell table:style-name="Tabla20.A2" office:value-type="string">
            <text:p text:style-name="P9">donde la batalla comienza ya.</text:p>
          </table:table-cell>
        </table:table-row>
        <table:table-row>
          <table:table-cell table:style-name="Tabla20.A2" office:value-type="string">
            <text:p text:style-name="P11"> </text:p>
          </table:table-cell>
        </table:table-row>
        <table:table-row>
          <table:table-cell table:style-name="Tabla20.A2" office:value-type="string">
            <text:p text:style-name="P9">¡Tus fondos están seguros! Los 3.00 $POL de diferencia han sido devueltos instantáneamente</text:p>
          </table:table-cell>
        </table:table-row>
        <table:table-row>
          <table:table-cell table:style-name="Tabla20.A2" office:value-type="string">
            <text:p text:style-name="P9">a tus saldosPendientes en el Baúl. Puedes usarlos para reinscribirte en esta misma ventana</text:p>
          </table:table-cell>
        </table:table-row>
        <table:table-row>
          <table:table-cell table:style-name="Tabla20.A2" office:value-type="string">
            <text:p text:style-name="P9">o retirarlos cuando desees.</text:p>
          </table:table-cell>
        </table:table-row>
      </table:table>
      <text:p text:style-name="P12"> </text:p>
      <text:p text:style-name="Text_20_body"/>
      <text:p text:style-name="P13"> </text:p>
      <text:h text:style-name="P7" text:outline-level="1">Sección 11 — Blindaje de equidad matemática y ajuste de llaves</text:h>
      <text:p text:style-name="P5"> </text:p>
      <text:p text:style-name="P14">Al manejar dinero real ($POL), el balance se convierte en un elemento crítico de seguridad. Se aplican tres protocolos de equidad estrictos.</text:p>
      <text:p text:style-name="P15"> </text:p>
      <text:h text:style-name="P18" text:outline-level="2"><text:soft-page-break/>11.1  Desactivación del Jefe de Liga (0% asimetría en torneos)</text:h>
      <text:p text:style-name="P16"><text:span text:style-name="T2">•      </text:span><text:span text:style-name="T4">La regla del 15% de probabilidad de cruzarse con una rareza superior queda completamente eliminada de los torneos de fin de semana.</text:span></text:p>
      <text:p text:style-name="P16"><text:span text:style-name="T2">•      </text:span><text:span text:style-name="T4">Ningún jugador que arriesgue capital real será emparejado en desventaja de estadísticas contra una escala biológica superior.</text:span></text:p>
      <text:p text:style-name="P16"><text:span text:style-name="T2">•      </text:span><text:span text:style-name="T4">Un Geno Común solo compite contra Genos Comunes en todos los torneos con filtro de rareza activo.</text:span></text:p>
      <text:p text:style-name="P15"> </text:p>
      <text:h text:style-name="P18" text:outline-level="2">11.2  Protocolo de contracción de bracket a 8 participantes</text:h>
      <text:p text:style-name="P16"><text:span text:style-name="T2">•      </text:span><text:span text:style-name="T3">8 a 14 inscritos: </text:span><text:span text:style-name="T4">El servidor Avisa a los jugadores para reducir el bracket de 16 a 8 participantes (Cuartos, Semifinal y Final). Si los jugadores aceptan el torneo arranca de inmediato respetando las entradas proporcionales.</text:span></text:p>
      <text:p text:style-name="P16"><text:span text:style-name="T2">•      </text:span><text:span text:style-name="T3">Menos de 7 inscritos: </text:span><text:span text:style-name="T4">Si no pueden bajar de categoría, el juego dará tiempo de gracia para conseguir al jugador faltante al finalizar ese tiempo el torneo de esa categoría se cancela off-chain. El 100% de las entradas se devuelve al pool saldosPendientes de los usuarios con el coste de gas de una sola firma de administración.</text:span></text:p>
      <text:p text:style-name="P15"> </text:p>
      <text:h text:style-name="P18" text:outline-level="2">11.3  Protocolo de inyección de NPC (bracket semicompleto)</text:h>
      <text:p text:style-name="P14">Si al expirar el matchmaking un torneo de 16 participantes registra exactamente 15 jugadores humanos reales, el juego inyecta un agente virtual (NPC) como competidor número 16:</text:p>
      <text:p text:style-name="P22"> </text:p>
      <text:p text:style-name="P16"><text:span text:style-name="T2">•      </text:span><text:span text:style-name="T3">Subvención del pozo: </text:span><text:span text:style-name="T4">El pool de premios se mantiene calculado sobre un torneo completo de 8 participantes. La entrada ficticia del NPC se subsidia a través de la retención del organizador (10%) cobrada a los 7 participantes humanos.</text:span></text:p>
      <text:p text:style-name="P16"><text:span text:style-name="T2">•      </text:span><text:span text:style-name="T3">Ejecución del NPC: </text:span><text:span text:style-name="T4">El NPC ejecuta de forma pasiva su script IFTTT en el servidor consumiendo cero firmas de gas.</text:span></text:p>
      <text:p text:style-name="P16"><text:span text:style-name="T2">•      </text:span><text:span text:style-name="T3">Rescate de liquidez si el NPC llega al podio: </text:span><text:span text:style-name="T4">Si el NPC finaliza en 1º, 2º o 3º lugar, el contrato inteligente desvía de forma atómica el premio en $POL de vuelta a la Safe de Tesorería multi-firma del equipo, usándose como colchón del Paymaster.</text:span></text:p>
      <text:p text:style-name="P12"> </text:p>
      <text:p text:style-name="Text_20_body"><text:soft-page-break/></text:p>
      <text:p text:style-name="P13"> </text:p>
      <text:h text:style-name="P7" text:outline-level="1">Sección 12 — Ingeniería económica: matemática del payout en $POL</text:h>
      <text:p text:style-name="P5"> </text:p>
      <text:p text:style-name="P14">Cada bracket de 16 jugadores (o 8 en contracción) constituye un circuito financiero cerrado e independiente en la blockchain de Polygon. No se crea dinero de la nada, garantizando liquidez inmediata y evitando inflación.</text:p>
      <text:p text:style-name="P15"> </text:p>
      <text:h text:style-name="P18" text:outline-level="2">12.1  Distribución de fondos de un bracket estándar</text:h>
      <text:p text:style-name="P14">Ejemplo base con entrada de 1.00 $POL y 16 jugadores:</text:p>
      <text:p text:style-name="P22"> </text:p>
      <table:table table:name="Tabla21" table:style-name="Tabla21">
        <table:table-column table:style-name="Tabla21.A"/>
        <table:table-column table:style-name="Tabla21.B"/>
        <table:table-column table:style-name="Tabla21.C"/>
        <table:table-row>
          <table:table-cell table:style-name="Tabla21.A1" office:value-type="string">
            <text:p text:style-name="P17">Concepto</text:p>
          </table:table-cell>
          <table:table-cell table:style-name="Tabla21.A1" office:value-type="string">
            <text:p text:style-name="P17">Cálculo</text:p>
          </table:table-cell>
          <table:table-cell table:style-name="Tabla21.A1" office:value-type="string">
            <text:p text:style-name="P17">Importe</text:p>
          </table:table-cell>
        </table:table-row>
        <table:table-row>
          <table:table-cell table:style-name="Tabla21.A2" office:value-type="string">
            <text:p text:style-name="P9">Recaudación bruta de la llave</text:p>
          </table:table-cell>
          <table:table-cell table:style-name="Tabla21.A2" office:value-type="string">
            <text:p text:style-name="P9">16 jugadores × 1.00 $POL</text:p>
          </table:table-cell>
          <table:table-cell table:style-name="Tabla21.A2" office:value-type="string">
            <text:p text:style-name="P9">16.00 $POL</text:p>
          </table:table-cell>
        </table:table-row>
        <table:table-row>
          <table:table-cell table:style-name="Tabla21.A3" office:value-type="string">
            <text:p text:style-name="P9">Retención de la casa (10%)</text:p>
          </table:table-cell>
          <table:table-cell table:style-name="Tabla21.A3" office:value-type="string">
            <text:p text:style-name="P9">16.00 × 10%</text:p>
          </table:table-cell>
          <table:table-cell table:style-name="Tabla21.A3" office:value-type="string">
            <text:p text:style-name="P9">1.60 $POL → Safe de Tesorería multi-firma (2 de 3 llaves físicas de hardware)</text:p>
          </table:table-cell>
        </table:table-row>
        <table:table-row>
          <table:table-cell table:style-name="Tabla21.A2" office:value-type="string">
            <text:p text:style-name="P9">Bolsa neta para el podio (90%)</text:p>
          </table:table-cell>
          <table:table-cell table:style-name="Tabla21.A2" office:value-type="string">
            <text:p text:style-name="P9">16.00 × 90%</text:p>
          </table:table-cell>
          <table:table-cell table:style-name="Tabla21.A2" office:value-type="string">
            <text:p text:style-name="P9">14.40 $POL → repartidos entre 1º, 2º y 3º puesto</text:p>
          </table:table-cell>
        </table:table-row>
      </table:table>
      <text:p text:style-name="P15"> </text:p>
      <text:h text:style-name="P18" text:outline-level="2">12.2  Distribución del podio</text:h>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17">Puesto</text:p>
          </table:table-cell>
          <table:table-cell table:style-name="Tabla22.A1" office:value-type="string">
            <text:p text:style-name="P17">Porcentaje del pool neto</text:p>
          </table:table-cell>
          <table:table-cell table:style-name="Tabla22.A1" office:value-type="string">
            <text:p text:style-name="P17">Pago en $POL (base 1.00)</text:p>
          </table:table-cell>
          <table:table-cell table:style-name="Tabla22.A1" office:value-type="string">
            <text:p text:style-name="P17">Multiplicador sobre la entrada</text:p>
          </table:table-cell>
        </table:table-row>
        <table:table-row>
          <table:table-cell table:style-name="Tabla22.A2" office:value-type="string">
            <text:p text:style-name="P9">1º — Campeón</text:p>
          </table:table-cell>
          <table:table-cell table:style-name="Tabla22.A2" office:value-type="string">
            <text:p text:style-name="P9">55.55%</text:p>
          </table:table-cell>
          <table:table-cell table:style-name="Tabla22.A2" office:value-type="string">
            <text:p text:style-name="P9">8.00 $POL</text:p>
          </table:table-cell>
          <table:table-cell table:style-name="Tabla22.A2" office:value-type="string">
            <text:p text:style-name="P9">×8 la inversión original</text:p>
          </table:table-cell>
        </table:table-row>
        <table:table-row>
          <table:table-cell table:style-name="Tabla22.A3" office:value-type="string">
            <text:p text:style-name="P9">2º — Subcampeón</text:p>
          </table:table-cell>
          <table:table-cell table:style-name="Tabla22.A3" office:value-type="string">
            <text:p text:style-name="P9">30.55%</text:p>
          </table:table-cell>
          <table:table-cell table:style-name="Tabla22.A3" office:value-type="string">
            <text:p text:style-name="P9">4.40 $POL</text:p>
          </table:table-cell>
          <table:table-cell table:style-name="Tabla22.A3" office:value-type="string">
            <text:p text:style-name="P9">×4.4 la inversión original</text:p>
          </table:table-cell>
        </table:table-row>
        <table:table-row>
          <table:table-cell table:style-name="Tabla22.A2" office:value-type="string">
            <text:p text:style-name="P9">3º — Ganador <text:soft-page-break/>consolación</text:p>
          </table:table-cell>
          <table:table-cell table:style-name="Tabla22.A2" office:value-type="string">
            <text:p text:style-name="P9">13.88%</text:p>
          </table:table-cell>
          <table:table-cell table:style-name="Tabla22.A2" office:value-type="string">
            <text:p text:style-name="P9">2.00 $POL</text:p>
          </table:table-cell>
          <table:table-cell table:style-name="Tabla22.A2" office:value-type="string">
            <text:p text:style-name="P9">×2 la inversión <text:soft-page-break/>original (fijo inmutable)</text:p>
          </table:table-cell>
        </table:table-row>
      </table:table>
      <text:p text:style-name="P22"> </text:p>
      <table:table table:name="Tabla23" table:style-name="Tabla23">
        <table:table-column table:style-name="Tabla23.A"/>
        <table:table-row>
          <table:table-cell table:style-name="Tabla23.A1" office:value-type="string">
            <text:p text:style-name="P8">Comprobación contable</text:p>
          </table:table-cell>
        </table:table-row>
        <table:table-row>
          <table:table-cell table:style-name="Tabla23.A2" office:value-type="string">
            <text:p text:style-name="P9">8.00 (1º) + 4.40 (2º) + 2.00 (3º) + 1.60 (casa) = 16.00 $POL  ✓</text:p>
          </table:table-cell>
        </table:table-row>
        <table:table-row>
          <table:table-cell table:style-name="Tabla23.A2" office:value-type="string">
            <text:p text:style-name="P9">El circuito es matemáticamente cerrado. Cada $POL que entra, sale a algún destino.</text:p>
          </table:table-cell>
        </table:table-row>
      </table:table>
      <text:p text:style-name="P15"> </text:p>
      <text:h text:style-name="P18" text:outline-level="2">12.3  Mitigación del riesgo financiero: consolación en EV para eliminados</text:h>
      <text:p text:style-name="P14">Para eliminar la frustración de los jugadores que quedan fuera del dinero, el backend de Supabase entrega recursos de progreso off-chain según la ronda alcanzada:</text:p>
      <text:p text:style-name="P22"> </text:p>
      <table:table table:name="Tabla24" table:style-name="Tabla24">
        <table:table-column table:style-name="Tabla24.A"/>
        <table:table-column table:style-name="Tabla24.B"/>
        <table:table-column table:style-name="Tabla24.C"/>
        <table:table-row>
          <table:table-cell table:style-name="Tabla24.A1" office:value-type="string">
            <text:p text:style-name="P17">Fase de eliminación</text:p>
          </table:table-cell>
          <table:table-cell table:style-name="Tabla24.A1" office:value-type="string">
            <text:p text:style-name="P17">Recompensa en EV</text:p>
          </table:table-cell>
          <table:table-cell table:style-name="Tabla24.A1" office:value-type="string">
            <text:p text:style-name="P17">Bonus adicional</text:p>
          </table:table-cell>
        </table:table-row>
        <table:table-row>
          <table:table-cell table:style-name="Tabla24.A2" office:value-type="string">
            <text:p text:style-name="P9">Eliminados en Octavos de Final (Ronda 1)</text:p>
          </table:table-cell>
          <table:table-cell table:style-name="Tabla24.A2" office:value-type="string">
            <text:p text:style-name="P9">15.00 EV</text:p>
          </table:table-cell>
          <table:table-cell table:style-name="Tabla24.A2" office:value-type="string">
            <text:p text:style-name="P9">Energía para ir directo al Laboratorio a modificar estrategia.</text:p>
          </table:table-cell>
        </table:table-row>
        <table:table-row>
          <table:table-cell table:style-name="Tabla24.A3" office:value-type="string">
            <text:p text:style-name="P9">Eliminados en Cuartos de Final (Ronda 2)</text:p>
          </table:table-cell>
          <table:table-cell table:style-name="Tabla24.A3" office:value-type="string">
            <text:p text:style-name="P9">8.00 EV</text:p>
          </table:table-cell>
          <table:table-cell table:style-name="Tabla24.A3" office:value-type="string">
            <text:p text:style-name="P10">—</text:p>
          </table:table-cell>
        </table:table-row>
        <table:table-row>
          <table:table-cell table:style-name="Tabla24.A2" office:value-type="string">
            <text:p text:style-name="P9">4º Puesto (pierde la final de consolación por el 3er puesto)</text:p>
          </table:table-cell>
          <table:table-cell table:style-name="Tabla24.A2" office:value-type="string">
            <text:p text:style-name="P9">4.00 EV</text:p>
          </table:table-cell>
          <table:table-cell table:style-name="Tabla24.A2" office:value-type="string">
            <text:p text:style-name="P9">Plano procedural para un Accesorio Cosmético de la Torre.</text:p>
          </table:table-cell>
        </table:table-row>
      </table:table>
      <text:p text:style-name="P12"> </text:p>
      <text:p text:style-name="P25"><text:line-break/><text:line-break/><text:line-break/><text:line-break/></text:p>
      <text:p text:style-name="P13"> </text:p>
      <text:h text:style-name="P7" text:outline-level="1">Sección 13 — Protocolo de desconexión asíncrona durante torneos</text:h>
      <text:p text:style-name="P5"> </text:p>
      <text:p text:style-name="P14"><text:soft-page-break/>Los torneos de fin de semana son eventos en vivo con horarios específicos. Para evitar que una caída de red o abandono congele el torneo de forma indefinida para el rival, el sistema activa el piloto automático IFTTT.</text:p>
      <text:p text:style-name="P15"> </text:p>
      <text:h text:style-name="P18" text:outline-level="2">13.1  Activación del piloto automático</text:h>
      <text:p text:style-name="P16"><text:span text:style-name="T2">•      </text:span><text:span text:style-name="T3">Detección de inactividad: </text:span><text:span text:style-name="T4">Si el temporizador de turno (30 segundos de decisión por turno) expira dos veces consecutivas sin recibir respuesta del cliente del Jugador A, el backend de Supabase cambia el estado del jugador a offline.</text:span></text:p>
      <text:p text:style-name="P16"><text:span text:style-name="T2">•      </text:span><text:span text:style-name="T3">Lectura del script IFTTT: </text:span><text:span text:style-name="T4">El motor de combate central (ColiseumLogic.js) lee de forma pasiva e instantánea el script de condiciones IFTTT que el Jugador A tenía configurado en su perfil al inicio del torneo (snapshot congelado).</text:span></text:p>
      <text:p text:style-name="P16"><text:span text:style-name="T2">•      </text:span><text:span text:style-name="T3">Continuidad del bracket: </text:span><text:span text:style-name="T4">El combate continúa ejecutándose en milisegundos en el servidor. El Jugador B (que sigue online) continúa jugando de forma manual en vivo contra la mente automatizada del rival, asegurando que el bracket no sufra retrasos y finalice dentro de los tiempos de la ventana horaria.</text:span></text:p>
      <text:p text:style-name="P15"> </text:p>
      <text:h text:style-name="P18" text:outline-level="2">13.2  Relación con la inscripción anticipada</text:h>
      <text:p text:style-name="P14">La mecánica de desconexión asíncrona y la inscripción anticipada son piezas complementarias del mismo diseño filosófico: el Geno siempre combate, independientemente de la presencia del jugador.</text:p>
      <text:p text:style-name="P22"> </text:p>
      <table:table table:name="Tabla25" table:style-name="Tabla25">
        <table:table-column table:style-name="Tabla25.A"/>
        <table:table-column table:style-name="Tabla25.B"/>
        <table:table-column table:style-name="Tabla25.C"/>
        <table:table-row>
          <table:table-cell table:style-name="Tabla25.A1" office:value-type="string">
            <text:p text:style-name="P17">Escenario</text:p>
          </table:table-cell>
          <table:table-cell table:style-name="Tabla25.A1" office:value-type="string">
            <text:p text:style-name="P17">Qué ocurre</text:p>
          </table:table-cell>
          <table:table-cell table:style-name="Tabla25.A1" office:value-type="string">
            <text:p text:style-name="P17">Impacto económico para el jugador</text:p>
          </table:table-cell>
        </table:table-row>
        <table:table-row>
          <table:table-cell table:style-name="Tabla25.A2" office:value-type="string">
            <text:p text:style-name="P9">Jugador inscrito anticipadamente que no se conecta el día del torneo</text:p>
          </table:table-cell>
          <table:table-cell table:style-name="Tabla25.A2" office:value-type="string">
            <text:p text:style-name="P9">Su Geno combate con la configuración IFTTT congelada al inicio.</text:p>
          </table:table-cell>
          <table:table-cell table:style-name="Tabla25.A2" office:value-type="string">
            <text:p text:style-name="P9">Ningún perjuicio. Si gana, recibe los premios. Si pierde, recibe la consolación en EV.</text:p>
          </table:table-cell>
        </table:table-row>
        <table:table-row>
          <table:table-cell table:style-name="Tabla25.A3" office:value-type="string">
            <text:p text:style-name="P9">Jugador conectado que pierde internet durante el torneo</text:p>
          </table:table-cell>
          <table:table-cell table:style-name="Tabla25.A3" office:value-type="string">
            <text:p text:style-name="P9">El sistema detecta 2 timeouts consecutivos y activa el piloto IFTTT.</text:p>
          </table:table-cell>
          <table:table-cell table:style-name="Tabla25.A3" office:value-type="string">
            <text:p text:style-name="P9">Ningún perjuicio. El torneo continúa con su configuración guardada.</text:p>
          </table:table-cell>
        </table:table-row>
        <table:table-row>
          <table:table-cell table:style-name="Tabla25.A2" office:value-type="string">
            <text:p text:style-name="P9">Jugador sin configuración IFTTT personalizada al inicio</text:p>
          </table:table-cell>
          <table:table-cell table:style-name="Tabla25.A2" office:value-type="string">
            <text:p text:style-name="P9">El sistema aplica la configuración por defecto del servidor.</text:p>
          </table:table-cell>
          <table:table-cell table:style-name="Tabla25.A2" office:value-type="string">
            <text:p text:style-name="P9">El Geno combate con comportamiento básico estándar.</text:p>
          </table:table-cell>
        </table:table-row>
      </table:table>
      <text:p text:style-name="P22"> </text:p>
      <text:p text:style-name="P23"><text:soft-page-break/>Esta arquitectura convierte la inscripción al torneo en un compromiso del Geno, no del jugador. La comunicación en el juego puede reforzarlo: 'Una vez inscrito, tu Geno combatirá con tu estrategia IFTTT aunque no estés conectado. Asegúrate de que tu configuración esté lista antes del inicio.'</text:p>
      <text:p text:style-name="P19"> </text:p>
      <text:p text:style-name="P5"> </text:p>
      <text:p text:style-name="P27">Proyecto Genos  —  Especificaciones Técnicas Coliseo y Torneos V1.0 Consolidada  —  Confidencial</text:p>
      <text:p text:style-name="P28">Todas las mecánicas, probabilidades y valores numéricos son definitivos hasta nueva versión firmada.</text:p>
      <text:p text:style-name="Text_20_body"><text:span text:style-name="T7"><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21:12:21.840722900</meta:creation-date>
    <dc:date>2026-06-11T21:13:01.178021700</dc:date>
    <meta:editing-duration>PT40S</meta:editing-duration>
    <meta:editing-cycles>1</meta:editing-cycles>
    <meta:document-statistic meta:table-count="25" meta:image-count="0" meta:object-count="0" meta:page-count="23" meta:paragraph-count="570" meta:word-count="5138" meta:character-count="32395" meta:non-whitespace-character-count="27244"/>
    <meta:generator>LibreOffice/26.2.1.2$Windows_X86_64 LibreOffice_project/620$Build-2</meta:generator>
  </office:meta>
</office:document-meta>
</file>